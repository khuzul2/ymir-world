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3.817cm" style:rel-column-width="14718*"/>
    </style:style>
    <style:style style:name="Tabella1.B" style:family="table-column">
      <style:table-column-properties style:column-width="1.034cm" style:rel-column-width="3986*"/>
    </style:style>
    <style:style style:name="Tabella1.C" style:family="table-column">
      <style:table-column-properties style:column-width="1.182cm" style:rel-column-width="4555*"/>
    </style:style>
    <style:style style:name="Tabella1.D" style:family="table-column">
      <style:table-column-properties style:column-width="0.986cm" style:rel-column-width="3798*"/>
    </style:style>
    <style:style style:name="Tabella1.E" style:family="table-column">
      <style:table-column-properties style:column-width="2.464cm" style:rel-column-width="9499*"/>
    </style:style>
    <style:style style:name="Tabella1.F" style:family="table-column">
      <style:table-column-properties style:column-width="6.403cm" style:rel-column-width="24687*"/>
    </style:style>
    <style:style style:name="Tabella1.G" style:family="table-column">
      <style:table-column-properties style:column-width="1.113cm" style:rel-column-width="4292*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3" style:family="table">
      <style:table-properties style:width="16.999cm" table:align="margins" style:writing-mode="lr-tb"/>
    </style:style>
    <style:style style:name="Tabella3.A" style:family="table-column">
      <style:table-column-properties style:column-width="3.817cm" style:rel-column-width="14718*"/>
    </style:style>
    <style:style style:name="Tabella3.B" style:family="table-column">
      <style:table-column-properties style:column-width="1.034cm" style:rel-column-width="3986*"/>
    </style:style>
    <style:style style:name="Tabella3.C" style:family="table-column">
      <style:table-column-properties style:column-width="1.182cm" style:rel-column-width="4555*"/>
    </style:style>
    <style:style style:name="Tabella3.D" style:family="table-column">
      <style:table-column-properties style:column-width="0.986cm" style:rel-column-width="3798*"/>
    </style:style>
    <style:style style:name="Tabella3.E" style:family="table-column">
      <style:table-column-properties style:column-width="2.464cm" style:rel-column-width="9499*"/>
    </style:style>
    <style:style style:name="Tabella3.F" style:family="table-column">
      <style:table-column-properties style:column-width="6.403cm" style:rel-column-width="24687*"/>
    </style:style>
    <style:style style:name="Tabella3.G" style:family="table-column">
      <style:table-column-properties style:column-width="1.113cm" style:rel-column-width="4292*"/>
    </style:style>
    <style:style style:name="Tabel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3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3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6.999cm" table:align="margins" style:writing-mode="lr-tb"/>
    </style:style>
    <style:style style:name="Tabella2.A" style:family="table-column">
      <style:table-column-properties style:column-width="3.817cm" style:rel-column-width="14718*"/>
    </style:style>
    <style:style style:name="Tabella2.B" style:family="table-column">
      <style:table-column-properties style:column-width="1.034cm" style:rel-column-width="3986*"/>
    </style:style>
    <style:style style:name="Tabella2.C" style:family="table-column">
      <style:table-column-properties style:column-width="1.182cm" style:rel-column-width="4555*"/>
    </style:style>
    <style:style style:name="Tabella2.D" style:family="table-column">
      <style:table-column-properties style:column-width="0.986cm" style:rel-column-width="3798*"/>
    </style:style>
    <style:style style:name="Tabella2.E" style:family="table-column">
      <style:table-column-properties style:column-width="2.464cm" style:rel-column-width="9499*"/>
    </style:style>
    <style:style style:name="Tabella2.F" style:family="table-column">
      <style:table-column-properties style:column-width="6.403cm" style:rel-column-width="24687*"/>
    </style:style>
    <style:style style:name="Tabella2.G" style:family="table-column">
      <style:table-column-properties style:column-width="1.113cm" style:rel-column-width="4292*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Garamond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Garamond" fo:font-size="10pt" fo:language="fr" fo:country="FR" style:font-size-asian="10pt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weight="normal" style:font-name-asian="MS Mincho" style:font-size-asian="12pt" style:language-asian="ja" style:country-asian="JP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ARMATE DI LORD SHURA</text:p>
      <text:p text:style-name="P2"/>
      <text:p text:style-name="P2"/>
      <text:p text:style-name="P2">IN SALVO</text:p>
      <text:p text:style-name="P2">I PG sono tratti in salvo da Logarth, Edain e Vincar. Questi ultimi però sono qui x arrestare Isidoro.</text:p>
      <text:p text:style-name="P2">Attraverso passaggi sotterranei sono condotti alla fortezza di Tor Varn.</text:p>
      <text:p text:style-name="P2"/>
      <text:p text:style-name="P2">Re di Tor Varn: Fundin</text:p>
      <text:p text:style-name="P2">Alto Sacerdote di Durkaam: Telor</text:p>
      <text:p text:style-name="P2"/>
      <text:p text:style-name="P2">Picozza da Guerra in Acciaio Nanico (+15 colpisce come Mithril)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3">Nome </text:p>
          </table:table-cell>
          <table:table-cell table:style-name="Tabella1.A1" office:value-type="string">
            <text:p text:style-name="P3">Lvl</text:p>
          </table:table-cell>
          <table:table-cell table:style-name="Tabella1.A1" office:value-type="string">
            <text:p text:style-name="P3">Tag </text:p>
          </table:table-cell>
          <table:table-cell table:style-name="Tabella1.A1" office:value-type="string">
            <text:p text:style-name="P4">PF</text:p>
          </table:table-cell>
          <table:table-cell table:style-name="Tabella1.A1" office:value-type="string">
            <text:p text:style-name="P4">TA (BD)</text:p>
          </table:table-cell>
          <table:table-cell table:style-name="Tabella1.A1" office:value-type="string">
            <text:p text:style-name="P3">BO</text:p>
          </table:table-cell>
          <table:table-cell table:style-name="Tabella1.G1" office:value-type="string">
            <text:p text:style-name="P3">Iniz </text:p>
          </table:table-cell>
        </table:table-row>
        <table:table-row>
          <table:table-cell table:style-name="Tabella1.A2" office:value-type="string">
            <text:p text:style-name="P3">Nano Guerriero</text:p>
          </table:table-cell>
          <table:table-cell table:style-name="Tabella1.A2" office:value-type="string">
            <text:p text:style-name="P3">3°</text:p>
          </table:table-cell>
          <table:table-cell table:style-name="Tabella1.A2" office:value-type="string">
            <text:p text:style-name="P3">M</text:p>
          </table:table-cell>
          <table:table-cell table:style-name="Tabella1.A2" office:value-type="string">
            <text:p text:style-name="P4">80</text:p>
          </table:table-cell>
          <table:table-cell table:style-name="Tabella1.A2" office:value-type="string">
            <text:p text:style-name="P4">18(40s)</text:p>
          </table:table-cell>
          <table:table-cell table:style-name="Tabella1.A2" office:value-type="string">
            <text:p text:style-name="P3">70Melee/50DartGun</text:p>
          </table:table-cell>
          <table:table-cell table:style-name="Tabella1.G2" office:value-type="string">
            <text:p text:style-name="P3">+0</text:p>
          </table:table-cell>
        </table:table-row>
        <table:table-row>
          <table:table-cell table:style-name="Tabella1.A2" office:value-type="string">
            <text:p text:style-name="P3">Nano Guerriero Elite</text:p>
          </table:table-cell>
          <table:table-cell table:style-name="Tabella1.A2" office:value-type="string">
            <text:p text:style-name="P3">7°</text:p>
          </table:table-cell>
          <table:table-cell table:style-name="Tabella1.A2" office:value-type="string">
            <text:p text:style-name="P3">M</text:p>
          </table:table-cell>
          <table:table-cell table:style-name="Tabella1.A2" office:value-type="string">
            <text:p text:style-name="P4">105</text:p>
          </table:table-cell>
          <table:table-cell table:style-name="Tabella1.A2" office:value-type="string">
            <text:p text:style-name="P4">20(40s)</text:p>
          </table:table-cell>
          <table:table-cell table:style-name="Tabella1.A2" office:value-type="string">
            <text:p text:style-name="P3">100Melee/90DG</text:p>
          </table:table-cell>
          <table:table-cell table:style-name="Tabella1.G2" office:value-type="string">
            <text:p text:style-name="P3">+4</text:p>
          </table:table-cell>
        </table:table-row>
        <table:table-row>
          <table:table-cell table:style-name="Tabella1.A2" office:value-type="string">
            <text:p text:style-name="P3">Lupo Meccanico</text:p>
          </table:table-cell>
          <table:table-cell table:style-name="Tabella1.A2" office:value-type="string">
            <text:p text:style-name="P3">9°</text:p>
          </table:table-cell>
          <table:table-cell table:style-name="Tabella1.A2" office:value-type="string">
            <text:p text:style-name="P3">II@</text:p>
          </table:table-cell>
          <table:table-cell table:style-name="Tabella1.A2" office:value-type="string">
            <text:p text:style-name="P4">150</text:p>
          </table:table-cell>
          <table:table-cell table:style-name="Tabella1.A2" office:value-type="string">
            <text:p text:style-name="P4">20(15)</text:p>
          </table:table-cell>
          <table:table-cell table:style-name="Tabella1.A2" office:value-type="string">
            <text:p text:style-name="P3">90LBi/60MCl</text:p>
          </table:table-cell>
          <table:table-cell table:style-name="Tabella1.G2" office:value-type="string">
            <text:p text:style-name="P3">+12</text:p>
          </table:table-cell>
        </table:table-row>
      </table:table>
      <text:p text:style-name="P5"/>
      <text:p text:style-name="P5">Logarth rivela l'identità del nemico invasore: si tratta del drago Gwalgamaur il dorato, che pare voler instaurare un proprio dominio sui Regni Giovani. </text:p>
      <text:p text:style-name="P5"/>
      <text:p text:style-name="P5">I nani sono assediati dalle armate di Lord Shura, dopo essere stati colti di sorpresa hanno resistio a lungo, ma l'assedio li sta logorando. Se riuscissero in qualche modo a sconfiggere quest'armata di invasori, potrebbero andare a dare manforte a Tor Lossar, spezzando la supremazia nemica sul Wald e mettendo in crisi l'avanzata delle truppe nemiche.</text:p>
      <text:p text:style-name="P5">Il problema è che Lord Shura è un potente stregone e sta usando le sue arti necromantiche per risvegliare i morti dell'antica necropoli nanica di Kelak-Varn, ingrossando sempre di più le fila del proprio esercito.</text:p>
      <text:p text:style-name="P5"/>
      <text:p text:style-name="P5">Telor: l'alto sacerdote, dopo aver consultato Durkaam tramite oracoli, propone una soluzione al problema: nella necropoli di Kelak-Varn è celata l'antica tomba di Hurin, re-guerriero fondatore di Tor Varn. Con lui è sepolto un mistico artefatto dei tempi antichi: il Corno di Hurin. Secondo le leggende chi suona il Corno richiamerà a sé gli antichi guerrieri nani morti per difendere la loro patria. </text:p>
      <text:p text:style-name="P5">Telor dice che il potere del Corno sarebbe in grado di rovesciare i poteri di Lord Shura e rivoltare contro di lui le sue stesse armi.</text:p>
      <text:p text:style-name="P5">C'è solo qualche problema: </text:p>
      <text:list text:style-name="L1">
        <text:list-item>
          <text:p text:style-name="P6">La necropoli è ovviamente il centro dal quale fluiscono i guerrieri morti di Lord Shura, c'è da aspettarsi che sia un posto poco piacevole.</text:p>
        </text:list-item>
        <text:list-item>
          <text:p text:style-name="P6">La tomba di Hurin fu sigillata magicamente dai sui due figli, coloro che diventeranno i progenitori della Stirpe di Fundin e della Stirpe di Dwalor. Solo gli anelli regali di queste due stirpi sono in grado di aprire la tomba, nient'altro.</text:p>
        </text:list-item>
      </text:list>
      <text:p text:style-name="P5"/>
      <text:p text:style-name="P5"/>
      <text:p text:style-name="P5">KELAK-VARN</text:p>
      <text:p text:style-name="P5">Prima della missione Logarth consegna ai PG 10 frecce magiche +10.</text:p>
      <text:p text:style-name="P5"/>
      <text:p text:style-name="P5">Arrivare a Kelak-Varn non è facile, un tunnel sotterraneo porta dalla fortezza dei nani fino alle vicinanze della necropoli, ma una volta fuori i PG devono ricordarsi che sono in territorio nemico, se fanno troppo rumore attirano su di loro una pattuglia </text:p>
      <text:p text:style-name="P5">(Tira 1d100: 1-60=2-6 Urthak; 61-90=2-6 Urthak +1-2 Hothrog; 91-100= 2-6 Urthak +1-2 Troll). </text:p>
      <text:p text:style-name="P5"/>
      <text:p text:style-name="P5">L'entrata della necropoli è sorvegliata da 4 Urthak: non sono un nemico impossibile ma dovrebbe essere chiaro che un combattimento potrebbe attirare nella zona altri guerrieri, rovinando la missione dei PG.</text:p>
      <text:p text:style-name="P5"/>
      <text:p text:style-name="P5">ENTRATA: la sala d'accesso della necropoli, le antiche decorazioni naniche sono state sfregiate. Una statua di re Hurin è stata abbattuta e, al suo posto, c'è una blasfema statua di metalli brunito, raffigurante un drago (la statua è in realtà un allarme magico, ha avvisato Lord Shura dell'ingresso di estranei. Serve una manovra di percezione Assurda per accorgersi che c'è qualcosa che non va nella statua e una manovra di Attunement Folle per scoprirne i poteri). </text:p>
      <text:p text:style-name="P5"/>
      <text:p text:style-name="P5">TOMBE VARIE: oltre a seguire il path indicato, i PG possono esplorare le varie tombe (magari attirati dal luccicare dell'oro).</text:p>
      <text:p text:style-name="P5">Ogni tomba contiene una cosa come 3d10 di mo e qualche arma/armatura, per lo più cose magiche +15/+20 per lo più martelli, asce e mazze. </text:p>
      <text:p text:style-name="P5">Le tombe sono però solitamente protette da trappole e/o Dreugh.</text:p>
      <text:p text:style-name="P5"/>
      <text:p text:style-name="P5">TOMBA DI LORIN: Teca di materiale simile al cristallo (Laen), contiene o scheletro di un nano con un arco corto di legno dorato. Sulla tomba una targa con inciso: <text:span text:style-name="T1">“Qui giace Lorin, figlio di Eldin. Innumerevoli nemici caddero sotto i suoi strali. Cadde difendendo la sua gente nella battaglia di Ellar.”</text:span></text:p>
      <text:p text:style-name="P7">La teca non è chiusa, ma è protetta da una trappola (“Molto Difficile” da individuare e da disinnescare) che spara un piccolo nugolo di dardi al profanatore: 3 attacchi +50 sulla balestra leggera.</text:p>
      <text:p text:style-name="P1">Arco di Lorin:<text:span text:style-name="T2"> Arco magico +10, tutte le frecce lanciate sono considerate magiche. Una volta al giorno fa danni x3 con un attacco.</text:span></text:p>
      <text:p text:style-name="P2"/>
      <text:p text:style-name="P2">SCALE: portano al piano inferiore della necropoli, alcuni gradini sono protetti da trappole. Ogni personaggio ha il 50% di attivare una trappola: una piccola botola che intrappola il piede. La botola contiene uno spuntone così, se ci si affretta troppo a ritirare il piede si riceve un “A” da punta.</text:p>
      <text:p text:style-name="P2"/>
      <text:p text:style-name="P2">SALA DI HURIN</text:p>
      <text:p text:style-name="P2">Oltre al corno, ci sono molte altre cose: circa 5000mo in denaro e gioielli, un'armatura nanica completa (TA20, +15, ingombra come TA 17); il Martello del Mondo Sotterraneo, <text:s/>e lo Scudo di Hurin (Scudo a Torre +25, +20 ai TR). Ovviamente sottrarre qualcosa al tesoro di Hurin non è una cosa molto bella e non sarà apprezzata dai nani.</text:p>
      <text:p text:style-name="P2"/>
      <text:p text:style-name="P2">LORD SHURA</text:p>
      <text:p text:style-name="P2">Ha seguito i PG attraverso i sotterranei x impossessarsi del corno.</text:p>
      <text:p text:style-name="P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3">Nome </text:p>
          </table:table-cell>
          <table:table-cell table:style-name="Tabella3.A1" office:value-type="string">
            <text:p text:style-name="P3">Lvl</text:p>
          </table:table-cell>
          <table:table-cell table:style-name="Tabella3.A1" office:value-type="string">
            <text:p text:style-name="P3">Tag </text:p>
          </table:table-cell>
          <table:table-cell table:style-name="Tabella3.A1" office:value-type="string">
            <text:p text:style-name="P4">PF</text:p>
          </table:table-cell>
          <table:table-cell table:style-name="Tabella3.A1" office:value-type="string">
            <text:p text:style-name="P4">TA (BD)</text:p>
          </table:table-cell>
          <table:table-cell table:style-name="Tabella3.A1" office:value-type="string">
            <text:p text:style-name="P3">BO</text:p>
          </table:table-cell>
          <table:table-cell table:style-name="Tabella3.G1" office:value-type="string">
            <text:p text:style-name="P3">Iniz </text:p>
          </table:table-cell>
        </table:table-row>
        <table:table-row>
          <table:table-cell table:style-name="Tabella3.A2" office:value-type="string">
            <text:p text:style-name="P3">Lord Shura</text:p>
          </table:table-cell>
          <table:table-cell table:style-name="Tabella3.A2" office:value-type="string">
            <text:p text:style-name="P3">20°</text:p>
          </table:table-cell>
          <table:table-cell table:style-name="Tabella3.A2" office:value-type="string">
            <text:p text:style-name="P3">La#</text:p>
          </table:table-cell>
          <table:table-cell table:style-name="Tabella3.A2" office:value-type="string">
            <text:p text:style-name="P4">150</text:p>
          </table:table-cell>
          <table:table-cell table:style-name="Tabella3.A2" office:value-type="string">
            <text:p text:style-name="P4">18(75)</text:p>
          </table:table-cell>
          <table:table-cell table:style-name="Tabella3.A2" office:value-type="string">
            <text:p text:style-name="P3">90Staff/Spells/120FBolt</text:p>
          </table:table-cell>
          <table:table-cell table:style-name="Tabella3.G2" office:value-type="string">
            <text:p text:style-name="P3">+16</text:p>
          </table:table-cell>
        </table:table-row>
        <table:table-row>
          <table:table-cell table:style-name="Tabella3.A2" office:value-type="string">
            <text:p text:style-name="P3">Guardia Scheletrica</text:p>
          </table:table-cell>
          <table:table-cell table:style-name="Tabella3.A2" office:value-type="string">
            <text:p text:style-name="P3">10°</text:p>
          </table:table-cell>
          <table:table-cell table:style-name="Tabella3.A2" office:value-type="string">
            <text:p text:style-name="P3">La#</text:p>
          </table:table-cell>
          <table:table-cell table:style-name="Tabella3.A2" office:value-type="string">
            <text:p text:style-name="P4">150</text:p>
          </table:table-cell>
          <table:table-cell table:style-name="Tabella3.A2" office:value-type="string">
            <text:p text:style-name="P4">17(50)</text:p>
          </table:table-cell>
          <table:table-cell table:style-name="Tabella3.A2" office:value-type="string">
            <text:p text:style-name="P3">100Thsw[Heat]/Drain (3/rnd)</text:p>
          </table:table-cell>
          <table:table-cell table:style-name="Tabella3.G2" office:value-type="string">
            <text:p text:style-name="P3">+10</text:p>
          </table:table-cell>
        </table:table-row>
      </table:table>
      <text:p text:style-name="P2"/>
      <text:p text:style-name="P2"><text:span text:style-name="T3">“Inferno”, la Staffa delle Fiamme: </text:span>100 cariche, con una carica lancia Fire Bolt, con 2 cariche lancia Fire Ball e con 3 Fire Storm, colpo critico addizionale da Calore.</text:p>
      <text:p text:style-name="P1">Medaglione del Potere: <text:span text:style-name="T2">moltiplicatore x3 di PM (solo Essenza e Flusso), Extension II una volta al giorno.</text:span></text:p>
      <text:p text:style-name="P1">Anello della Difesa Arcana: <text:span text:style-name="T2">Bladeturn 2 volte al giorno, +10 ai TR contro la magia.</text:span></text:p>
      <text:p text:style-name="P2"/>
      <text:p text:style-name="P8">Liste:</text:p>
      <text:p text:style-name="P8">Necromancy (rnk:20/bns:45)</text:p>
      <text:p text:style-name="P8">Shield Mastery (rnk:15/bns:40)</text:p>
      <text:p text:style-name="P8">Liste Illusionista (rnk 20/bns:45)</text:p>
      <text:p text:style-name="P8">Erosione Fisica (rnk 20/bns:45)</text:p>
      <text:p text:style-name="P8">Evocazione di Entità (rnk20/bns45)</text:p>
      <text:p text:style-name="P8">Contatti Oscuri (rnk20/bns45)</text:p>
      <text:p text:style-name="P8">Oscurità (rnk20/bns45)</text:p>
      <text:p text:style-name="P8">Distruzione Materia (rnk20/bns45)</text:p>
      <text:p text:style-name="P8">Studi di Invisibilità (rnk15/bns45)</text:p>
      <text:p text:style-name="P8">Lofty Bridges (rnk:9/bns34)</text:p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Nome </text:p>
          </table:table-cell>
          <table:table-cell table:style-name="Tabella2.A1" office:value-type="string">
            <text:p text:style-name="P3">Lvl</text:p>
          </table:table-cell>
          <table:table-cell table:style-name="Tabella2.A1" office:value-type="string">
            <text:p text:style-name="P3">Tag </text:p>
          </table:table-cell>
          <table:table-cell table:style-name="Tabella2.A1" office:value-type="string">
            <text:p text:style-name="P4">PF</text:p>
          </table:table-cell>
          <table:table-cell table:style-name="Tabella2.A1" office:value-type="string">
            <text:p text:style-name="P4">TA (BD)</text:p>
          </table:table-cell>
          <table:table-cell table:style-name="Tabella2.A1" office:value-type="string">
            <text:p text:style-name="P3">BO</text:p>
          </table:table-cell>
          <table:table-cell table:style-name="Tabella2.G1" office:value-type="string">
            <text:p text:style-name="P3">Iniz </text:p>
          </table:table-cell>
        </table:table-row>
        <table:table-row>
          <table:table-cell table:style-name="Tabella2.A2" office:value-type="string">
            <text:p text:style-name="P3">Dreugh</text:p>
          </table:table-cell>
          <table:table-cell table:style-name="Tabella2.A2" office:value-type="string">
            <text:p text:style-name="P3">8°</text:p>
          </table:table-cell>
          <table:table-cell table:style-name="Tabella2.A2" office:value-type="string">
            <text:p text:style-name="P3">I#</text:p>
          </table:table-cell>
          <table:table-cell table:style-name="Tabella2.A2" office:value-type="string">
            <text:p text:style-name="P4">140</text:p>
          </table:table-cell>
          <table:table-cell table:style-name="Tabella2.A2" office:value-type="string">
            <text:p text:style-name="P4">15(30s)</text:p>
          </table:table-cell>
          <table:table-cell table:style-name="Tabella2.A2" office:value-type="string">
            <text:p text:style-name="P3">110WH/Special</text:p>
          </table:table-cell>
          <table:table-cell table:style-name="Tabella2.G2" office:value-type="string">
            <text:p text:style-name="P3">+0</text:p>
          </table:table-cell>
        </table:table-row>
        <table:table-row>
          <table:table-cell table:style-name="Tabella2.A2" office:value-type="string">
            <text:p text:style-name="P3">Urtak</text:p>
          </table:table-cell>
          <table:table-cell table:style-name="Tabella2.A2" office:value-type="string">
            <text:p text:style-name="P3">7°</text:p>
          </table:table-cell>
          <table:table-cell table:style-name="Tabella2.A2" office:value-type="string">
            <text:p text:style-name="P3">I#</text:p>
          </table:table-cell>
          <table:table-cell table:style-name="Tabella2.A2" office:value-type="string">
            <text:p text:style-name="P4">135</text:p>
          </table:table-cell>
          <table:table-cell table:style-name="Tabella2.A2" office:value-type="string">
            <text:p text:style-name="P4">18(50)</text:p>
          </table:table-cell>
          <table:table-cell table:style-name="Tabella2.A2" office:value-type="string">
            <text:p text:style-name="P3">130We</text:p>
          </table:table-cell>
          <table:table-cell table:style-name="Tabella2.G2" office:value-type="string">
            <text:p text:style-name="P3">+8</text:p>
          </table:table-cell>
        </table:table-row>
        <table:table-row>
          <table:table-cell table:style-name="Tabella2.A2" office:value-type="string">
            <text:p text:style-name="P3">Hothrog (I)</text:p>
          </table:table-cell>
          <table:table-cell table:style-name="Tabella2.A2" office:value-type="string">
            <text:p text:style-name="P3">2°</text:p>
          </table:table-cell>
          <table:table-cell table:style-name="Tabella2.A2" office:value-type="string">
            <text:p text:style-name="P3">I</text:p>
          </table:table-cell>
          <table:table-cell table:style-name="Tabella2.A2" office:value-type="string">
            <text:p text:style-name="P4">60</text:p>
          </table:table-cell>
          <table:table-cell table:style-name="Tabella2.A2" office:value-type="string">
            <text:p text:style-name="P4">11(15)</text:p>
          </table:table-cell>
          <table:table-cell table:style-name="Tabella2.A2" office:value-type="string">
            <text:p text:style-name="P3">50MCl(x2)+100MBi</text:p>
          </table:table-cell>
          <table:table-cell table:style-name="Tabella2.G2" office:value-type="string">
            <text:p text:style-name="P3">+0</text:p>
          </table:table-cell>
        </table:table-row>
        <table:table-row>
          <table:table-cell table:style-name="Tabella2.A2" office:value-type="string">
            <text:p text:style-name="P3">Stregoni</text:p>
          </table:table-cell>
          <table:table-cell table:style-name="Tabella2.A2" office:value-type="string">
            <text:p text:style-name="P3">8°</text:p>
          </table:table-cell>
          <table:table-cell table:style-name="Tabella2.A2" office:value-type="string">
            <text:p text:style-name="P3">M</text:p>
          </table:table-cell>
          <table:table-cell table:style-name="Tabella2.A2" office:value-type="string">
            <text:p text:style-name="P4">90</text:p>
          </table:table-cell>
          <table:table-cell table:style-name="Tabella2.A2" office:value-type="string">
            <text:p text:style-name="P4">8(20s)</text:p>
          </table:table-cell>
          <table:table-cell table:style-name="Tabella2.A2" office:value-type="string">
            <text:p text:style-name="P3">80We/70FBolt/spells</text:p>
          </table:table-cell>
          <table:table-cell table:style-name="Tabella2.G2" office:value-type="string">
            <text:p text:style-name="P3">+8</text:p>
          </table:table-cell>
        </table:table-row>
        <table:table-row>
          <table:table-cell table:style-name="Tabella2.A2" office:value-type="string">
            <text:p text:style-name="P3">Troll dei Ghiacci</text:p>
          </table:table-cell>
          <table:table-cell table:style-name="Tabella2.A2" office:value-type="string">
            <text:p text:style-name="P3">13°</text:p>
          </table:table-cell>
          <table:table-cell table:style-name="Tabella2.A2" office:value-type="string">
            <text:p text:style-name="P3">La@</text:p>
          </table:table-cell>
          <table:table-cell table:style-name="Tabella2.A2" office:value-type="string">
            <text:p text:style-name="P4">200</text:p>
          </table:table-cell>
          <table:table-cell table:style-name="Tabella2.A2" office:value-type="string">
            <text:p text:style-name="P4">11(30)</text:p>
          </table:table-cell>
          <table:table-cell table:style-name="Tabella2.A2" office:value-type="string">
            <text:p text:style-name="P3">105HCl/80HBa/80ro</text:p>
          </table:table-cell>
          <table:table-cell table:style-name="Tabella2.G2" office:value-type="string">
            <text:p text:style-name="P3">+6</text:p>
          </table:table-cell>
        </table:table-row>
      </table:table>
      <text:p text:style-name="Standard"/>
      <text:p text:style-name="P5"><text:span text:style-name="T3">Dreugh: </text:span>nani non morti, risucchiano 3 punti Co/rnd a chi fallisce un TR Vigore, i loro occhi fiammeggianti sono lievemente ipnotici: TR Mentalismo 4° livello (8° per un nano) per non venir paralizzati (ci si sveglia se si è colpiti, una volta risvegliati o colpiti non funziona più), i nani uccisi risorgono come Dreugh.</text:p>
      <text:p text:style-name="P1">Urtak:<text:span text:style-name="T2"> una delle principali forze d'assalto dell'esercito di Lord Shura: un tempo comuni guerrieri orchi, sono stati sottoposti ad un rituale di massa che li ha trasformati in temibili guerrieri quasi-non morti.</text:span></text:p>
      <text:p text:style-name="P1">Hothrog:<text:span text:style-name="T2"> demoni umanoidi dalla testa di sciacallo convocati da Lord Shura e dai suoi sottoposti, perlustrano il territorio in branchi di 20-30 individui. Non usano armi ma, se da soli, possono andare in berserk: +30BO, -20BD.</text:span></text:p>
      <text:p text:style-name="P1">Stregoni:<text:span text:style-name="T2"> stregoni orcheschi sottoposti di Lord Shura. Conoscono le liste Lesser Illusions, Entity Summons, Darkness e Fire Law fino al loro livello(con un bonus al lancio di +18 e 48PM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4-25T12:00:58</meta:creation-date>
    <dc:creator>x</dc:creator>
    <dc:date>2007-11-11T16:21:36</dc:date>
    <dc:language>it-IT</dc:language>
    <meta:editing-cycles>32</meta:editing-cycles>
    <meta:editing-duration>PT2H44M3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141" meta:word-count="1203" meta:character-count="6887"/>
  </office:meta>
</office:document-meta>
</file>