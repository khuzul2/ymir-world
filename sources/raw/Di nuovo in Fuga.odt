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34cm" table:align="left" style:writing-mode="lr-tb"/>
    </style:style>
    <style:style style:name="Tabella1.A" style:family="table-column">
      <style:table-column-properties style:column-width="3.817cm"/>
    </style:style>
    <style:style style:name="Tabella1.B" style:family="table-column">
      <style:table-column-properties style:column-width="1.034cm"/>
    </style:style>
    <style:style style:name="Tabella1.C" style:family="table-column">
      <style:table-column-properties style:column-width="1.182cm"/>
    </style:style>
    <style:style style:name="Tabella1.D" style:family="table-column">
      <style:table-column-properties style:column-width="0.984cm"/>
    </style:style>
    <style:style style:name="Tabella1.E" style:family="table-column">
      <style:table-column-properties style:column-width="2.464cm"/>
    </style:style>
    <style:style style:name="Tabella1.F" style:family="table-column">
      <style:table-column-properties style:column-width="6.403cm"/>
    </style:style>
    <style:style style:name="Tabella1.G" style:family="table-column">
      <style:table-column-properties style:column-width="1.15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7.034cm" table:align="left" style:writing-mode="lr-tb"/>
    </style:style>
    <style:style style:name="Tabella2.A" style:family="table-column">
      <style:table-column-properties style:column-width="3.817cm"/>
    </style:style>
    <style:style style:name="Tabella2.B" style:family="table-column">
      <style:table-column-properties style:column-width="1.034cm"/>
    </style:style>
    <style:style style:name="Tabella2.C" style:family="table-column">
      <style:table-column-properties style:column-width="1.182cm"/>
    </style:style>
    <style:style style:name="Tabella2.D" style:family="table-column">
      <style:table-column-properties style:column-width="0.984cm"/>
    </style:style>
    <style:style style:name="Tabella2.E" style:family="table-column">
      <style:table-column-properties style:column-width="2.464cm"/>
    </style:style>
    <style:style style:name="Tabella2.F" style:family="table-column">
      <style:table-column-properties style:column-width="6.403cm"/>
    </style:style>
    <style:style style:name="Tabella2.G" style:family="table-column">
      <style:table-column-properties style:column-width="1.15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Garamond" fo:font-size="10pt" fo:language="fr" fo:country="FR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 NUOVO IN FUGA</text:p>
      <text:p text:style-name="P1"/>
      <text:p text:style-name="P2">Dopo essere sfuggiti dalla tana di Gwalgamaur i PG sono comunque in una situazione poco piacevole: il drago è infuriato e ha sguinzagliato i suoi scagnozzi per trovarli, devono fuggire alla svelta in un luogo sicuro o sarà la fine! Sì, ma dove andare?</text:p>
      <text:p text:style-name="P2">Ecco alcune opzioni:</text:p>
      <text:list text:style-name="L1">
        <text:list-item>
          <text:p text:style-name="P3"><text:span text:style-name="T1">Tornare a Tor-Varn:</text:span> in generale una cattiva idea: fra loro e il forte ci sono 200km di montagne che pullulano di nemici. Teletrasportarsi indietro potrebbe sembrare una buona idea ma Logarth <text:s/>la osteggerà: Gwal sta controllando la zona e di certo non gli sfuggirebbe un simile incantesimo, userebbe i suoi poteri per dirottarlo e catturare i fuggiaschi.</text:p>
        </text:list-item>
        <text:list-item>
          <text:p text:style-name="P3"><text:span text:style-name="T1">Andare a Waldenheim:</text:span> a qualche pg potrebbe venire in mente che forse la capitale nanica non è molto distante (un tiro su Conoscenza Wald rivela che è vero). Tuttavia recarsi lì non pare una buona idea: significherebbe andarsi a chiudere in un assedio, ammesso che i nani facciano entrare i PG. Logarth lo sconsiglierà.</text:p>
        </text:list-item>
        <text:list-item>
          <text:p text:style-name="P3"><text:span text:style-name="T1">Lasciare il Wald:</text:span> questo è ciò che suggerirà Logarth. Per la precisione il suo piano sarebbe quello di allontanarsi scendendo lungo i canaloni verso sud-ovest, raggiungere il fiume Kmer, che scorre di là ed è abbastanza grande da essere navigabile con una piccola imbarcazione. Poi seguire il fiume fino a Ennin-Lar (il Cancello Occidentale), l'ultimo grande centro nanico in quella regione. Là decidere il da farsi ma principalmente optare per lasciare il Wald in direzione sud-ovest.</text:p>
        </text:list-item>
      </text:list>
      <text:p text:style-name="P2"/>
      <text:p text:style-name="P2"/>
      <text:p text:style-name="P2">I primi giorni di viaggio sono i più duri: i pg devono togliersi di dosso gli inseguitori. Per fortuna con loro c'è Logarth che li guida attraverso i canaloni. In ogni caso, almeno per i primi due giorni Logarth vieta loro di castare qualsiasi cosa: il drago sta cercando la loro presenza e qualsiasi incantesimo potrebbe svelarla.</text:p>
      <text:p text:style-name="P2">A rallentarli, fra l'altro, c'è Surya che è praticamente in coma.</text:p>
      <text:p text:style-name="P2"/>
      <text:p text:style-name="P2"/>
      <text:p text:style-name="P2">Alcuni inseguitori (il pericolo maggiore, ovviamente, è che facciano rapporto sulla loro posizione!)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4">Nome </text:p>
          </table:table-cell>
          <table:table-cell table:style-name="Tabella1.A1" office:value-type="string">
            <text:p text:style-name="P4">Lvl</text:p>
          </table:table-cell>
          <table:table-cell table:style-name="Tabella1.A1" office:value-type="string">
            <text:p text:style-name="P4">Tag </text:p>
          </table:table-cell>
          <table:table-cell table:style-name="Tabella1.A1" office:value-type="string">
            <text:p text:style-name="P5">PF</text:p>
          </table:table-cell>
          <table:table-cell table:style-name="Tabella1.A1" office:value-type="string">
            <text:p text:style-name="P5">TA (BD)</text:p>
          </table:table-cell>
          <table:table-cell table:style-name="Tabella1.A1" office:value-type="string">
            <text:p text:style-name="P4">BO</text:p>
          </table:table-cell>
          <table:table-cell table:style-name="Tabella1.G1" office:value-type="string">
            <text:p text:style-name="P4">Iniz </text:p>
          </table:table-cell>
        </table:table-row>
        <table:table-row table:style-name="Tabella1.1">
          <table:table-cell table:style-name="Tabella1.A2" office:value-type="string">
            <text:p text:style-name="P6">Bestia Alata</text:p>
          </table:table-cell>
          <table:table-cell table:style-name="Tabella1.A2" office:value-type="string">
            <text:p text:style-name="P6">12°</text:p>
          </table:table-cell>
          <table:table-cell table:style-name="Tabella1.A2" office:value-type="string">
            <text:p text:style-name="P6">La</text:p>
          </table:table-cell>
          <table:table-cell table:style-name="Tabella1.A2" office:value-type="string">
            <text:p text:style-name="P6">240</text:p>
          </table:table-cell>
          <table:table-cell table:style-name="Tabella1.A2" office:value-type="string">
            <text:p text:style-name="P6">11(40)</text:p>
          </table:table-cell>
          <table:table-cell table:style-name="Tabella1.A2" office:value-type="string">
            <text:p text:style-name="P6">80HCl/60LBa/90LBi</text:p>
          </table:table-cell>
          <table:table-cell table:style-name="Tabella1.G2" office:value-type="string">
            <text:p text:style-name="P6">+12</text:p>
          </table:table-cell>
        </table:table-row>
        <table:table-row table:style-name="Tabella1.1">
          <table:table-cell table:style-name="Tabella1.A2" office:value-type="string">
            <text:p text:style-name="P6">Mastino del Fuoco</text:p>
          </table:table-cell>
          <table:table-cell table:style-name="Tabella1.A2" office:value-type="string">
            <text:p text:style-name="P6">6°</text:p>
          </table:table-cell>
          <table:table-cell table:style-name="Tabella1.A2" office:value-type="string">
            <text:p text:style-name="P6">M</text:p>
          </table:table-cell>
          <table:table-cell table:style-name="Tabella1.A2" office:value-type="string">
            <text:p text:style-name="P6">90</text:p>
          </table:table-cell>
          <table:table-cell table:style-name="Tabella1.A2" office:value-type="string">
            <text:p text:style-name="P6">4(30)</text:p>
          </table:table-cell>
          <table:table-cell table:style-name="Tabella1.A2" office:value-type="string">
            <text:p text:style-name="P6">70MBi/50FBr</text:p>
          </table:table-cell>
          <table:table-cell table:style-name="Tabella1.G2" office:value-type="string">
            <text:p text:style-name="P6">+10</text:p>
          </table:table-cell>
        </table:table-row>
        <table:table-row table:style-name="Tabella1.1">
          <table:table-cell table:style-name="Tabella1.A2" office:value-type="string">
            <text:p text:style-name="P6">Orchetto</text:p>
          </table:table-cell>
          <table:table-cell table:style-name="Tabella1.A2" office:value-type="string">
            <text:p text:style-name="P6">4°</text:p>
          </table:table-cell>
          <table:table-cell table:style-name="Tabella1.A2" office:value-type="string">
            <text:p text:style-name="P6">M</text:p>
          </table:table-cell>
          <table:table-cell table:style-name="Tabella1.A2" office:value-type="string">
            <text:p text:style-name="P6">75</text:p>
          </table:table-cell>
          <table:table-cell table:style-name="Tabella1.A2" office:value-type="string">
            <text:p text:style-name="P6">15(25s)</text:p>
          </table:table-cell>
          <table:table-cell table:style-name="Tabella1.A2" office:value-type="string">
            <text:p text:style-name="P6">90Sw/90LBw</text:p>
          </table:table-cell>
          <table:table-cell table:style-name="Tabella1.G2" office:value-type="string">
            <text:p text:style-name="P6">+4</text:p>
          </table:table-cell>
        </table:table-row>
      </table:table>
      <text:p text:style-name="P2"/>
      <text:p text:style-name="P2"/>
      <text:p text:style-name="P2">TEMPESTA DI NEVE</text:p>
      <text:p text:style-name="P2"/>
      <text:p text:style-name="P2">Si scatena una terribile tempesta, e i PG sono costretti a trovarsi un rifugio per non morire congelati.</text:p>
      <text:p text:style-name="P2"/>
      <text:p text:style-name="P2">L'ATTACCO DELLA BESTIA DI VORAK</text:p>
      <text:p text:style-name="P2"><text:s/></text:p>
      <text:p text:style-name="P2">Fortezanna, la cavalcatura di Vorak ha inseguito i PG seguendo l'odore della spada, con l'intenzione di vendicare il suo padrone. Assale i PG preferibilmente di notte. Preferirà tuttavia ritirarsi, piuttosto che combattere fino alla morte.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4">Nome </text:p>
          </table:table-cell>
          <table:table-cell table:style-name="Tabella2.A1" office:value-type="string">
            <text:p text:style-name="P4">Lvl</text:p>
          </table:table-cell>
          <table:table-cell table:style-name="Tabella2.A1" office:value-type="string">
            <text:p text:style-name="P4">Tag </text:p>
          </table:table-cell>
          <table:table-cell table:style-name="Tabella2.A1" office:value-type="string">
            <text:p text:style-name="P5">PF</text:p>
          </table:table-cell>
          <table:table-cell table:style-name="Tabella2.A1" office:value-type="string">
            <text:p text:style-name="P5">TA (BD)</text:p>
          </table:table-cell>
          <table:table-cell table:style-name="Tabella2.A1" office:value-type="string">
            <text:p text:style-name="P4">BO</text:p>
          </table:table-cell>
          <table:table-cell table:style-name="Tabella2.G1" office:value-type="string">
            <text:p text:style-name="P4">Iniz </text:p>
          </table:table-cell>
        </table:table-row>
        <table:table-row table:style-name="Tabella2.1">
          <table:table-cell table:style-name="Tabella2.A2" office:value-type="string">
            <text:p text:style-name="P4">Warcat</text:p>
          </table:table-cell>
          <table:table-cell table:style-name="Tabella2.A2" office:value-type="string">
            <text:p text:style-name="P4">15°</text:p>
          </table:table-cell>
          <table:table-cell table:style-name="Tabella2.A2" office:value-type="string">
            <text:p text:style-name="P4">La</text:p>
          </table:table-cell>
          <table:table-cell table:style-name="Tabella2.A2" office:value-type="string">
            <text:p text:style-name="P5">280</text:p>
          </table:table-cell>
          <table:table-cell table:style-name="Tabella2.A2" office:value-type="string">
            <text:p text:style-name="P5">4(50)</text:p>
          </table:table-cell>
          <table:table-cell table:style-name="Tabella2.A2" office:value-type="string">
            <text:p text:style-name="P4">95LBi/120HCl(2x)</text:p>
          </table:table-cell>
          <table:table-cell table:style-name="Tabella2.G2" office:value-type="string">
            <text:p text:style-name="P4">+12</text:p>
          </table:table-cell>
        </table:table-row>
      </table:table>
      <text:p text:style-name="Standard"/>
      <text:p text:style-name="P7">IL FIUME</text:p>
      <text:p text:style-name="P7">raggiunto il fiume Kmer, Logarth ha intenzione di costruire una zattera per navigarlo. I pg lo possono aiutare o approfittare della sosta (dura almeno una giornata) per fare altro.</text:p>
      <text:p text:style-name="P7">UN AVAMPOSTO INASPETTATO</text:p>
      <text:p text:style-name="P7">Sulle rive del fiume una torre nanica è stata catturata dagli orchetti, passandoci vicino i PG rischiano un'imboscata...</text:p>
      <text:p text:style-name="P7"/>
      <text:p text:style-name="P7">ENNIN LAR</text:p>
      <text:p text:style-name="P7">la città fortificata di Ennin-Lar è l'ultima all'interno del Wald prima del confine occidentale. Questo lato del Wald è ancora in mano ai nani e i PG potranno finalmente sentirsi di nuovo al sicuro.</text:p>
      <text:p text:style-name="P7">Molti nani troppo vecchi o troppo giovani per combattere si sono rifugiati qui, sulle rive del lago Elegorst, contribuendo a dare alla città un aspetto troppo affollato.</text:p>
      <text:p text:style-name="P7"/>
      <text:p text:style-name="P7">Prima ancora di giungere al lago i PG saranno sicuramente avvistati e avvicinati da una pattuglia di nani, capitanata da Gidor, uno dei 5 luogotenenti della città.</text:p>
      <text:p text:style-name="P7"/>
      <text:p text:style-name="P7"><text:span text:style-name="T2">Re della Città: </text:span>Re Barulf</text:p>
      <text:p text:style-name="P7"><text:span text:style-name="T2">Luogotenenti:</text:span> Gidor, Balki, Hasulf, Thorbrand e Thorir (sono tutti Guerrieri di 15°).</text:p>
      <text:p text:style-name="P7"><text:span text:style-name="T2">Altre personalità:</text:span> Grilda (sacerdotessa di Damkianna e capo-guaritrice della città); Halvaliss (regina); Raghnid (principessa di Ennin Lar, figlia di Barulf); Svennar (Mago di corte, elementalista Terra)</text:p>
      <text:p text:style-name="P7"/>
      <text:p text:style-name="P7">MISSIONE DIPLOMATICA</text:p>
      <text:p text:style-name="P7">Dopo alcuni giorni, quando i pg si sono ripresi, re Barulf li convoca in sua presenza. Nonostante le recenti piccole vittorie, il Wald è ancora in grave pericolo, soprattutto perché nessuno dei regni vicini pare essere intenzionato a venire in soccorso. Il re chiede ai PG se sono disposti a fare da scorta a sua figlia Raghnid, che intende mandare in missione diplomatica nel Regno di Nessa. Il re ha a disposizione pochi uomini d'arme, di cui non può disfarsi. Se i PG accettano fornirà loro cavalcature adeguate, attrezzatura, denaro e riconoscimenti. Tutto ciò che devono fare è scortare sua figlia prima alla cittadina di Torralta, per chiedere aiuto ai cavalieri della Fiamma Bianca, che lì hanno una grossa roccaforte (governata da Lord Damian), poi a Nessa dalla regina Estalia. </text:p>
      <text:p text:style-name="P7"/>
      <text:p text:style-name="P7">TORRALTA</text:p>
      <text:p text:style-name="P7">Al momento, Torralta sembra avere non pochi problemi...</text:p>
      <text:list text:style-name="L2">
        <text:list-item>
          <text:p text:style-name="P8">Lord Damian e i suoi sono impegnati a dare la caccia a un gruppo di banditi che sta mettendo a dura prova l'efficenza dei suoi cavalieri.</text:p>
        </text:list-item>
        <text:list-item>
          <text:p text:style-name="P8">Recentemente, strane bestie sono state avvistate e hanno causato danni a persone e oggetti (Toyman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S Mincho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25T17:24:09</meta:creation-date>
    <dc:creator>x</dc:creator>
    <dc:date>2007-05-27T01:12:12</dc:date>
    <dc:language>it-IT</dc:language>
    <meta:editing-cycles>14</meta:editing-cycles>
    <meta:editing-duration>PT5H49M5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3" meta:word-count="810" meta:character-count="4833"/>
  </office:meta>
</office:document-meta>
</file>