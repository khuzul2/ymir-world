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MS Mincho" svg:font-family="'MS Mincho', 'ＭＳ 明朝'" style:font-family-generic="moder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 style:writing-mode="lr-tb"/>
    </style:style>
    <style:style style:name="Tabella1.A" style:family="table-column">
      <style:table-column-properties style:column-width="3.778cm" style:rel-column-width="14569*"/>
    </style:style>
    <style:style style:name="Tabella1.B" style:family="table-column">
      <style:table-column-properties style:column-width="1.023cm" style:rel-column-width="3945*"/>
    </style:style>
    <style:style style:name="Tabella1.C" style:family="table-column">
      <style:table-column-properties style:column-width="1.169cm" style:rel-column-width="4509*"/>
    </style:style>
    <style:style style:name="Tabella1.D" style:family="table-column">
      <style:table-column-properties style:column-width="0.975cm" style:rel-column-width="3760*"/>
    </style:style>
    <style:style style:name="Tabella1.E" style:family="table-column">
      <style:table-column-properties style:column-width="2.439cm" style:rel-column-width="9403*"/>
    </style:style>
    <style:style style:name="Tabella1.F" style:family="table-column">
      <style:table-column-properties style:column-width="6.339cm" style:rel-column-width="24438*"/>
    </style:style>
    <style:style style:name="Tabella1.G" style:family="table-column">
      <style:table-column-properties style:column-width="1.274cm" style:rel-column-width="4911*"/>
    </style:style>
    <style:style style:name="Tabella1.1" style:family="table-row">
      <style:table-row-properties style:keep-together="true"/>
    </style:style>
    <style:style style:name="Tabel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1.G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1.G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a2" style:family="table">
      <style:table-properties style:width="16.962cm" table:align="left" style:writing-mode="lr-tb"/>
    </style:style>
    <style:style style:name="Tabella2.A" style:family="table-column">
      <style:table-column-properties style:column-width="3.778cm"/>
    </style:style>
    <style:style style:name="Tabella2.B" style:family="table-column">
      <style:table-column-properties style:column-width="1.023cm"/>
    </style:style>
    <style:style style:name="Tabella2.C" style:family="table-column">
      <style:table-column-properties style:column-width="1.169cm"/>
    </style:style>
    <style:style style:name="Tabella2.D" style:family="table-column">
      <style:table-column-properties style:column-width="0.974cm"/>
    </style:style>
    <style:style style:name="Tabella2.E" style:family="table-column">
      <style:table-column-properties style:column-width="2.438cm"/>
    </style:style>
    <style:style style:name="Tabella2.F" style:family="table-column">
      <style:table-column-properties style:column-width="6.341cm"/>
    </style:style>
    <style:style style:name="Tabella2.G" style:family="table-column">
      <style:table-column-properties style:column-width="1.238cm"/>
    </style:style>
    <style:style style:name="Tabella2.1" style:family="table-row">
      <style:table-row-properties style:keep-together="true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2.G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G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use-window-font-color="true" style:font-name="Garamond" fo:font-size="10pt" fo:language="it" fo:country="IT" style:font-name-asian="MS Mincho" style:font-size-asian="10pt" style:language-asian="ja" style:country-asian="JP" style:font-name-complex="Times New Roman" style:font-size-complex="10pt" style:language-complex="ar" style:country-complex="SA"/>
    </style:style>
    <style:style style:name="P4" style:family="paragraph" style:parent-style-name="Standard">
      <style:text-properties fo:language="it" fo:country="I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2"/>
    <style:style style:name="P9" style:family="paragraph" style:parent-style-name="Standard" style:list-style-name="L3">
      <style:paragraph-properties fo:text-align="justify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6666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EBECH</text:p>
      <text:p text:style-name="P2"/>
      <text:p text:style-name="P2">Attivare la Vera Via (manovra “Estremamente Difficile” di Attunement) --&gt; Obiettivo Minore Very Hard.</text:p>
      <text:p text:style-name="P2"/>
      <text:p text:style-name="P2">L'ISOLA DELLA MORTE</text:p>
      <text:p text:style-name="P2"/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office:value-type="string">
            <text:p text:style-name="P3">Nome </text:p>
          </table:table-cell>
          <table:table-cell table:style-name="Tabella1.A1" office:value-type="string">
            <text:p text:style-name="P3">Lvl</text:p>
          </table:table-cell>
          <table:table-cell table:style-name="Tabella1.A1" office:value-type="string">
            <text:p text:style-name="P3">Tag </text:p>
          </table:table-cell>
          <table:table-cell table:style-name="Tabella1.A1" office:value-type="string">
            <text:p text:style-name="P3">PF</text:p>
          </table:table-cell>
          <table:table-cell table:style-name="Tabella1.A1" office:value-type="string">
            <text:p text:style-name="P3">TA (BD)</text:p>
          </table:table-cell>
          <table:table-cell table:style-name="Tabella1.A1" office:value-type="string">
            <text:p text:style-name="P3">BO</text:p>
          </table:table-cell>
          <table:table-cell table:style-name="Tabella1.G1" office:value-type="string">
            <text:p text:style-name="P3">Iniz </text:p>
          </table:table-cell>
        </table:table-row>
        <table:table-row table:style-name="Tabella1.1">
          <table:table-cell table:style-name="Tabella1.A2" office:value-type="string">
            <text:p text:style-name="P3">Cadavere Putrescente</text:p>
          </table:table-cell>
          <table:table-cell table:style-name="Tabella1.A2" office:value-type="string">
            <text:p text:style-name="P3">5°</text:p>
          </table:table-cell>
          <table:table-cell table:style-name="Tabella1.A2" office:value-type="string">
            <text:p text:style-name="P3">I#</text:p>
          </table:table-cell>
          <table:table-cell table:style-name="Tabella1.A2" office:value-type="string">
            <text:p text:style-name="P3">50</text:p>
          </table:table-cell>
          <table:table-cell table:style-name="Tabella1.A2" office:value-type="string">
            <text:p text:style-name="P3">1(10)</text:p>
          </table:table-cell>
          <table:table-cell table:style-name="Tabella1.A2" office:value-type="string">
            <text:p text:style-name="P3">70MCl/Disease</text:p>
          </table:table-cell>
          <table:table-cell table:style-name="Tabella1.G2" office:value-type="string">
            <text:p text:style-name="P3">+4</text:p>
          </table:table-cell>
        </table:table-row>
        <table:table-row table:style-name="Tabella1.1">
          <table:table-cell table:style-name="Tabella1.A2" office:value-type="string">
            <text:p text:style-name="P3">Magro Notturno</text:p>
          </table:table-cell>
          <table:table-cell table:style-name="Tabella1.A2" office:value-type="string">
            <text:p text:style-name="P3">9°</text:p>
          </table:table-cell>
          <table:table-cell table:style-name="Tabella1.A2" office:value-type="string">
            <text:p text:style-name="P3">I#</text:p>
          </table:table-cell>
          <table:table-cell table:style-name="Tabella1.A2" office:value-type="string">
            <text:p text:style-name="P3">120</text:p>
          </table:table-cell>
          <table:table-cell table:style-name="Tabella1.A2" office:value-type="string">
            <text:p text:style-name="P3">4(35)</text:p>
          </table:table-cell>
          <table:table-cell table:style-name="Tabella1.A2" office:value-type="string">
            <text:p text:style-name="P3">80Mba/70MCl+90MBi/Fear</text:p>
          </table:table-cell>
          <table:table-cell table:style-name="Tabella1.G2" office:value-type="string">
            <text:p text:style-name="P3">+12</text:p>
          </table:table-cell>
        </table:table-row>
        <table:table-row table:style-name="Tabella1.1">
          <table:table-cell table:style-name="Tabella1.A2" office:value-type="string">
            <text:p text:style-name="P3">Verme Putrido</text:p>
          </table:table-cell>
          <table:table-cell table:style-name="Tabella1.A2" office:value-type="string">
            <text:p text:style-name="P3">10°</text:p>
          </table:table-cell>
          <table:table-cell table:style-name="Tabella1.A2" office:value-type="string">
            <text:p text:style-name="P3">La</text:p>
          </table:table-cell>
          <table:table-cell table:style-name="Tabella1.A2" office:value-type="string">
            <text:p text:style-name="P3">160</text:p>
          </table:table-cell>
          <table:table-cell table:style-name="Tabella1.A2" office:value-type="string">
            <text:p text:style-name="P3">12(20)</text:p>
          </table:table-cell>
          <table:table-cell table:style-name="Tabella1.A2" office:value-type="string">
            <text:p text:style-name="P3">100HBi (Disease)</text:p>
          </table:table-cell>
          <table:table-cell table:style-name="Tabella1.G2" office:value-type="string">
            <text:p text:style-name="P3">+4</text:p>
          </table:table-cell>
        </table:table-row>
        <table:table-row table:style-name="Tabella1.1">
          <table:table-cell table:style-name="Tabella1.A2" office:value-type="string">
            <text:p text:style-name="P3">Vile</text:p>
          </table:table-cell>
          <table:table-cell table:style-name="Tabella1.A2" office:value-type="string">
            <text:p text:style-name="P3">10°</text:p>
          </table:table-cell>
          <table:table-cell table:style-name="Tabella1.A2" office:value-type="string">
            <text:p text:style-name="P3">La@</text:p>
          </table:table-cell>
          <table:table-cell table:style-name="Tabella1.A2" office:value-type="string">
            <text:p text:style-name="P3">200</text:p>
          </table:table-cell>
          <table:table-cell table:style-name="Tabella1.A2" office:value-type="string">
            <text:p text:style-name="P3">4(60)</text:p>
          </table:table-cell>
          <table:table-cell table:style-name="Tabella1.A2" office:value-type="string">
            <text:p text:style-name="P3">200HCl/180LBi</text:p>
          </table:table-cell>
          <table:table-cell table:style-name="Tabella1.G2" office:value-type="string">
            <text:p text:style-name="P3">+16</text:p>
          </table:table-cell>
        </table:table-row>
      </table:table>
      <text:p text:style-name="Standard"/>
      <text:p text:style-name="P4">Cadavere Putrescente: rigenera 8 pf/rnd. Ignora i colpi critici non da fuoco/slaying.</text:p>
      <text:p text:style-name="Standard"/>
      <text:p text:style-name="Standard">XUTHAL</text:p>
      <text:p text:style-name="Standard"/>
      <text:p text:style-name="P5">Capolavoro dell'Ingegneria Xebechana, un'enorme città volante, retta da un'enorme deposito di Ixliss, una pietra che ha facoltà antigravitazionali se caricata appropriatamente.</text:p>
      <text:p text:style-name="P5"/>
      <text:p text:style-name="P5">L'enorme capitale Xebechana è splendida ma non priva di rischi: molti quartieri sotterranei sono stati abbandonati per il calo demografico e ora strane ombre vi si aggirano...</text:p>
      <text:p text:style-name="Standard"/>
      <text:p text:style-name="P6">Primo incontro</text:p>
      <text:p text:style-name="P5">Omoteuchtli: Xidhe che da il “benvenuto” ai PG, Mentalista di 15° livello, diplomatico della città.</text:p>
      <text:p text:style-name="P5"/>
      <text:p text:style-name="P1">Gli Alti Illuminati</text:p>
      <text:p text:style-name="P2">Nominalmente Xuthal è retta da un gran concilio di Xattva, detto degli <text:s/>“Alti Illuminati”, che si occupa delle questioni più gravi e importanti (in pratica, lo stato delle Pozze e la minaccia dell'Isola, ma ultimamente anche le condizioni della città).</text:p>
      <text:p text:style-name="P2">Il concilio si può dividere in tre fazioni, con orientamenti contrapposti, i cui maggiori esponenti sono:</text:p>
      <text:p text:style-name="P2"/>
      <text:list text:style-name="L1">
        <text:list-item>
          <text:p text:style-name="P7">Xochiyaoyotl (Arcanista 40°): fazione non-interventista e pacifista per eccellenza, rispecchia le posizioni quasi fataliste di molti <text:s/>Xattva.</text:p>
        </text:list-item>
        <text:list-item>
          <text:p text:style-name="P7">Cuauhxicalli <text:s/>(Wizard 40°): fazione moderata. Non estrema come il primo partito, propone dei piccoli interventi di arginamento nell'Isola e, di tanto in tanto, approva dei piccoli esperimenti alle Pozze (fazione più forte).</text:p>
        </text:list-item>
        <text:list-item>
          <text:p text:style-name="P7">Tlazocamati (Elementalista Arcano 40°): fazione interventista, vorrebbe un pesante attacco contro l'Isola e grandi cambiamenti alle Fosse. È il più debole dei partiti.</text:p>
        </text:list-item>
      </text:list>
      <text:p text:style-name="P2"/>
      <text:p text:style-name="P5">In realtà il potere è in mano del potente Culto delle Stelle, la chiesa gestita dagli Xion (i cui 6 capi sono qui sotto), dato che gli Xattva poco si preoccupano delle problematiche “mondane”.</text:p>
      <text:p text:style-name="P5"/>
      <text:p text:style-name="P1">Cerchia del Culto delle Stelle</text:p>
      <text:p text:style-name="Standard">Alti Teofani (tutti Xion Priest di 20°):</text:p>
      <text:list text:style-name="L2">
        <text:list-item>
          <text:p text:style-name="P8">Tezcatlipoca</text:p>
        </text:list-item>
        <text:list-item>
          <text:p text:style-name="P8">Mictlantechuli</text:p>
        </text:list-item>
        <text:list-item>
          <text:p text:style-name="P8">Tamoanchan</text:p>
        </text:list-item>
        <text:list-item>
          <text:p text:style-name="P8">Tlaxcala</text:p>
        </text:list-item>
        <text:list-item>
          <text:p text:style-name="P8">Xinihuini</text:p>
        </text:list-item>
        <text:list-item>
          <text:p text:style-name="P8">Naxmatoatl</text:p>
        </text:list-item>
      </text:list>
      <text:p text:style-name="P5"/>
      <text:p text:style-name="P1">Nomi Xudra: <text:span text:style-name="T1">Xotl, Yuthl, Octlas, Tuchl, Seketh...</text:span></text:p>
      <text:p text:style-name="P2"/>
      <text:p text:style-name="P1">Biblioteca: <text:span text:style-name="T1">gestita dagli Xion (capo bibliotecario: Xlutalla) e da alcuni scribi Xidhe</text:span></text:p>
      <text:p text:style-name="P2"/>
      <text:p text:style-name="P1">Altri Stranieri:</text:p>
      <text:p text:style-name="P2"/>
      <text:list text:style-name="L3">
        <text:list-item>
          <text:p text:style-name="P9">Elor Lethyliss (Elfo Mentalista), elfo illuminato in cerca di conoscenza, frequenta soprattutto il quartiere dei templi degli antichi dei xebechani</text:p>
        </text:list-item>
        <text:list-item>
          <text:p text:style-name="P9">Vincenzo Alvarez (Cartosano Ladro), studioso di cartografia</text:p>
        </text:list-item>
        <text:list-item>
          <text:p text:style-name="P9">Barulf (Nano Priest) nano dei Monti Bianchi</text:p>
        </text:list-item>
      </text:list>
      <text:p text:style-name="P2"/>
      <text:p text:style-name="P2"/>
      <text:p text:style-name="P1">Le Sale Dimenticate</text:p>
      <text:p text:style-name="P2">Xuthal è piena di antiche camere e passaggi, alcuni abbandonati da lunghi secoli... intere sezioni della città sono state sigillate perché ritenute “pericolanti”.</text:p>
      <text:p text:style-name="P2">Ufficialmente le sezioni abbandonate sono sorvegliate, ma in realtà le zone da controllare sono troppe e le forze disponibili troppo poche. Gli Xudra, gli unici che hanno quotidianamente a che fare con esse, semplicemente le evitano.</text:p>
      <text:p text:style-name="Standard"/>
      <text:p text:style-name="Standard">La verità è che un male antico si annida nelle più profonde viscere della città, un male che gli Xebechani hanno dimenticato.</text:p>
      <text:p text:style-name="Standard">Si tratta di Mologorth, un possente demone, luogotenente dei Demoni Sovrani, che lentamente sta cercando di impossessarsi della città (anche se non è tanto folle da attaccare direttamente i potenti Xattva, almeno per ora...).</text:p>
      <text:p text:style-name="Standard"/>
      <text:p text:style-name="Standard">Mologorth è un Terrorite: appare come un uomo nero, con una lunga cosa di serpente e grandi ali da pipistrello. Il suo morso risucchia 1d0+20pf, emana un'aurea di Paura nel raggio di 30m, è immune al calore e al freddo e conosce svariate liste di incantesimi.</text:p>
      <text:p text:style-name="Standard">Ha numerosi servi a propria disposizione, oltre ad una serie di Xebechani rianimati.</text:p>
      <text:p text:style-name="Standard">Il suo scopo è quello di corrompere l'intera città, per espandere l'Isola della Morte</text:p>
      <text:p text:style-name="P5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3">Nome </text:p>
          </table:table-cell>
          <table:table-cell table:style-name="Tabella2.A1" office:value-type="string">
            <text:p text:style-name="P3">Lvl</text:p>
          </table:table-cell>
          <table:table-cell table:style-name="Tabella2.A1" office:value-type="string">
            <text:p text:style-name="P3">Tag </text:p>
          </table:table-cell>
          <table:table-cell table:style-name="Tabella2.A1" office:value-type="string">
            <text:p text:style-name="P3">PF</text:p>
          </table:table-cell>
          <table:table-cell table:style-name="Tabella2.A1" office:value-type="string">
            <text:p text:style-name="P3">TA (BD)</text:p>
          </table:table-cell>
          <table:table-cell table:style-name="Tabella2.A1" office:value-type="string">
            <text:p text:style-name="P3">BO</text:p>
          </table:table-cell>
          <table:table-cell table:style-name="Tabella2.G1" office:value-type="string">
            <text:p text:style-name="P3">Iniz </text:p>
          </table:table-cell>
        </table:table-row>
        <table:table-row table:style-name="Tabella2.1">
          <table:table-cell table:style-name="Tabella2.A2" office:value-type="string">
            <text:p text:style-name="P3">Mologorth (VI)</text:p>
          </table:table-cell>
          <table:table-cell table:style-name="Tabella2.A2" office:value-type="string">
            <text:p text:style-name="P3">32°</text:p>
          </table:table-cell>
          <table:table-cell table:style-name="Tabella2.A2" office:value-type="string">
            <text:p text:style-name="P3">SL#</text:p>
          </table:table-cell>
          <table:table-cell table:style-name="Tabella2.A2" office:value-type="string">
            <text:p text:style-name="P3">250</text:p>
          </table:table-cell>
          <table:table-cell table:style-name="Tabella2.A2" office:value-type="string">
            <text:p text:style-name="P3">12(60)</text:p>
          </table:table-cell>
          <table:table-cell table:style-name="Tabella2.A2" office:value-type="string">
            <text:p text:style-name="P3">200BAx(2D)+130GSc(2D)/100MBi/Spec</text:p>
          </table:table-cell>
          <table:table-cell table:style-name="Tabella2.G2" office:value-type="string">
            <text:p text:style-name="P3">+16</text:p>
          </table:table-cell>
        </table:table-row>
        <table:table-row table:style-name="Tabella2.1">
          <table:table-cell table:style-name="Tabella2.A2" office:value-type="string">
            <text:p text:style-name="P3">Shade Demon (IV)</text:p>
          </table:table-cell>
          <table:table-cell table:style-name="Tabella2.A2" office:value-type="string">
            <text:p text:style-name="P3">14°</text:p>
          </table:table-cell>
          <table:table-cell table:style-name="Tabella2.A2" office:value-type="string">
            <text:p text:style-name="P3">LA</text:p>
          </table:table-cell>
          <table:table-cell table:style-name="Tabella2.A2" office:value-type="string">
            <text:p text:style-name="P3">220</text:p>
          </table:table-cell>
          <table:table-cell table:style-name="Tabella2.A2" office:value-type="string">
            <text:p text:style-name="P3">1(80)</text:p>
          </table:table-cell>
          <table:table-cell table:style-name="Tabella2.A2" office:value-type="string">
            <text:p text:style-name="P3">110MCL(2x)/Spells</text:p>
          </table:table-cell>
          <table:table-cell table:style-name="Tabella2.G2" office:value-type="string">
            <text:p text:style-name="P3">+12</text:p>
          </table:table-cell>
        </table:table-row>
        <table:table-row table:style-name="Tabella2.1">
          <table:table-cell table:style-name="Tabella2.A2" office:value-type="string">
            <text:p text:style-name="P3">Demone III</text:p>
          </table:table-cell>
          <table:table-cell table:style-name="Tabella2.A2" office:value-type="string">
            <text:p text:style-name="P3">8°</text:p>
          </table:table-cell>
          <table:table-cell table:style-name="Tabella2.A2" office:value-type="string">
            <text:p text:style-name="P3">II</text:p>
          </table:table-cell>
          <table:table-cell table:style-name="Tabella2.A2" office:value-type="string">
            <text:p text:style-name="P3">120</text:p>
          </table:table-cell>
          <table:table-cell table:style-name="Tabella2.A2" office:value-type="string">
            <text:p text:style-name="P3">4(50)</text:p>
          </table:table-cell>
          <table:table-cell table:style-name="Tabella2.A2" office:value-type="string">
            <text:p text:style-name="P3">60MCl(2x)</text:p>
          </table:table-cell>
          <table:table-cell table:style-name="Tabella2.G2" office:value-type="string">
            <text:p text:style-name="P3">+8</text:p>
          </table:table-cell>
        </table:table-row>
        <table:table-row table:style-name="Tabella2.1">
          <table:table-cell table:style-name="Tabella2.A2" office:value-type="string">
            <text:p text:style-name="P3">Non Morto IV</text:p>
          </table:table-cell>
          <table:table-cell table:style-name="Tabella2.A2" office:value-type="string">
            <text:p text:style-name="P3">9°</text:p>
          </table:table-cell>
          <table:table-cell table:style-name="Tabella2.A2" office:value-type="string">
            <text:p text:style-name="P3">II#</text:p>
          </table:table-cell>
          <table:table-cell table:style-name="Tabella2.A2" office:value-type="string">
            <text:p text:style-name="P3">135</text:p>
          </table:table-cell>
          <table:table-cell table:style-name="Tabella2.A2" office:value-type="string">
            <text:p text:style-name="P3">1(40)</text:p>
          </table:table-cell>
          <table:table-cell table:style-name="Tabella2.A2" office:value-type="string">
            <text:p text:style-name="P3">95we</text:p>
          </table:table-cell>
          <table:table-cell table:style-name="Tabella2.G2" office:value-type="string">
            <text:p text:style-name="P3">+4</text:p>
          </table:table-cell>
        </table:table-row>
      </table:table>
      <text:p text:style-name="P10">DEI XEBE</text:p>
      <text:p text:style-name="Standard"/>
      <text:p text:style-name="Text_20_body"><text:span text:style-name="Strong_20_Emphasis">sguardo-sul-nulla</text:span> - Questo Dio-Concetto rappresenta il pensiero di coloro che guardano ma non comprendono. Che tale incomprensione sia data dalla stoltezza dell'osservatore o dall'inconcepibilità dell'oggetto scrutato, poco importa. Tutto ciò che vi è di oscuro, incompreso, alieno è rappresentato da sguardo-sul-nulla. Per gli adoratori che comprendono meno la natura degli Dèi Concettuali sguardo-sul-nulla è una divinità della Saggezza, dell'Occulto, della Follia.</text:p>
      <text:p text:style-name="Text_20_body"><text:span text:style-name="Strong_20_Emphasis"> </text:span></text:p>
      <text:p text:style-name="Text_20_body"><text:span text:style-name="Strong_20_Emphasis">tricotomia-di-atti-e-pensieri</text:span> - Questo Dio rappresenta la divisione delle azioni e di tutto ciò che è. Vi sono tre Vie, il Bene, il Male ed il Nulla, secondo le quali ogni Atto è compiuto in accordo con il concetto della Tricotomia dell'Agire. Questa divinità è adorata dai meno comprensivi della religione degli Esterni sia come Dio del Bene, che del Male, che dell'Equilibrio, della Quiete o dell'Azione. Tra gli Dèi Esterni è il meno compreso ed il più adorato.</text:p>
      <text:p text:style-name="Text_20_body"> </text:p>
      <text:p text:style-name="Text_20_body"><text:span text:style-name="Strong_20_Emphasis">parola-che-tace</text:span> - Rappresenta il Silenzio Cosmico che crea la Musica e la Parola. Adorato come divinità delle Arti, della Magia, dell'Oblio, della Distruzione.</text:p>
      <text:p text:style-name="Text_20_body"> </text:p>
      <text:p text:style-name="Text_20_body"><text:span text:style-name="Strong_20_Emphasis">essenza-di-tutto-ciò-che-era-è-e-fu</text:span> - Il concetto di Essenza Essenziale è rappresentato da questo essere cosmico secondo il principio di un'Essenza dell'Essenza, ovvero di un'Essenza Primordiale. Adorato dagli Arcanisti.<text:span text:style-name="T2"> </text:span></text:p>
      <text:p text:style-name="Text_20_body"><text:span text:style-name="Strong_20_Emphasis"> </text:span></text:p>
      <text:p text:style-name="Text_20_body"><text:span text:style-name="Strong_20_Emphasis">connubio-in-uno</text:span> - Il tutto che si fonde nell'uno che rappresenta il tutto. Adorato come dio della Creazione, della Vita, della Morte, dell'Unione, degli Spiriti, della Natura.</text:p>
      <text:p text:style-name="Text_20_body"> </text:p>
      <text:p text:style-name="P5"><text:span text:style-name="Strong_20_Emphasis">fiume-di-essere</text:span> - Il Tempo. Rappresenta il passato, il presente ed il futuro, lo scorrere del tempo e la trasformazione di tutto ciò che è in ciò che sarà, e di ciò che era in ciò che è. Adorato come dio del Tempo, della Morte, della Decadenza, della Nascita, della Distruzi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MS Mincho" svg:font-family="'MS Mincho', 'ＭＳ 明朝'" style:font-family-generic="moder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it" fo:country="IT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it" fo:country="IT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11-06T18:12:22</meta:creation-date>
    <dc:creator>x</dc:creator>
    <dc:date>2007-11-07T18:19:02</dc:date>
    <dc:language>it-IT</dc:language>
    <meta:editing-cycles>15</meta:editing-cycles>
    <meta:editing-duration>PT6H18M43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3" meta:paragraph-count="120" meta:word-count="916" meta:character-count="5692"/>
  </office:meta>
</office:document-meta>
</file>