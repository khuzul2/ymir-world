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MS Mincho1" svg:font-family="'MS Mincho', 'ＭＳ 明朝'" style:font-family-generic="modern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justify" style:justify-single-word="false"/>
      <style:text-properties style:use-window-font-color="true" fo:font-size="12pt" fo:language="it" fo:country="IT" fo:font-weight="bold" style:font-name-asian="MS Mincho1" style:font-size-asian="12pt" style:language-asian="ja" style:country-asian="JP" style:font-weight-asian="bold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text-align="justify" style:justify-single-word="false"/>
      <style:text-properties style:use-window-font-color="true" fo:font-size="12pt" fo:language="it" fo:country="IT" fo:font-weight="bold" style:font-name-asian="MS Mincho1" style:font-size-asian="12pt" style:language-asian="ja" style:country-asian="JP" style:font-weight-asian="bold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text-align="justify" style:justify-single-word="false"/>
      <style:text-properties style:use-window-font-color="true" fo:font-size="12pt" fo:language="it" fo:country="IT" fo:font-weight="normal" style:font-name-asian="MS Mincho1" style:font-size-asian="12pt" style:language-asian="ja" style:country-asian="JP" style:font-weight-asian="normal" style:font-name-complex="Times New Roman" style:font-size-complex="12pt" style:language-complex="ar" style:country-complex="SA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use-window-font-color="true" fo:font-size="12pt" fo:language="it" fo:country="IT" fo:font-weight="bold" style:font-name-asian="MS Mincho1" style:font-size-asian="12pt" style:language-asian="ja" style:country-asian="JP" style:font-weight-asian="bold" style:font-name-complex="Times New Roman" style:font-size-complex="12pt" style:language-complex="ar" style:country-complex="SA" style:font-weight-complex="bold"/>
    </style:style>
    <style:style style:name="P5" style:family="paragraph" style:parent-style-name="Standard">
      <style:paragraph-properties fo:text-align="justify" style:justify-single-word="false"/>
      <style:text-properties style:use-window-font-color="true" fo:font-size="12pt" fo:language="it" fo:country="IT" style:font-name-asian="MS Mincho1" style:font-size-asian="12pt" style:language-asian="ja" style:country-asian="JP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use-window-font-color="true" fo:font-size="12pt" fo:language="it" fo:country="IT" fo:font-weight="bold" style:font-name-asian="MS Mincho1" style:font-size-asian="12pt" style:language-asian="ja" style:country-asian="JP" style:font-weight-asian="bold" style:font-name-complex="Times New Roman" style:font-size-complex="12pt" style:language-complex="ar" style:country-complex="SA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fo:font-size="12pt" fo:language="it" fo:country="IT" fo:font-weight="bold" style:font-name-asian="MS Mincho1" style:font-size-asian="12pt" style:language-asian="ja" style:country-asian="JP" style:font-weight-asian="bold" style:font-name-complex="Times New Roman" style:font-size-complex="12pt" style:language-complex="ar" style:country-complex="SA"/>
    </style:style>
    <style:style style:name="T3" style:family="text">
      <style:text-properties style:use-window-font-color="true" fo:font-size="12pt" fo:language="it" fo:country="IT" style:font-name-asian="MS Mincho1" style:font-size-asian="12pt" style:language-asian="ja" style:country-asian="JP" style:font-name-complex="Times New Roman" style:font-size-complex="12pt" style:language-complex="ar" style:country-complex="SA"/>
    </style:style>
    <style:style style:name="T4" style:family="text">
      <style:text-properties style:font-weight-complex="bold"/>
    </style:style>
    <style:style style:name="T5" style:family="text">
      <style:text-properties fo:font-weight="normal" style:font-weight-asian="normal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GNUS, LO SCETTRO DELLE BRACI</text:p>
      <text:p text:style-name="P2">POTERI: <text:span text:style-name="T1">Moltiplicatore x4 per l'Essenza, il portatore può “immolarsi” a volontà (infliggendo un colpo critico “A” nel raggio di 3 metri e un “B” a chi lo tocca), è immune alle fiamme non magiche e guadagna un bonus di +50 al BD e ai TR contro quelle magiche, può usare i primi 30 livelli di “Fire Law” come se li conoscesse (coi propri PM), la staffa può lanciare una volta al giorno la Fiamma Purpurea (un Firebolt III a quadruplo danno), usando il suo BO (90) o quello del portatore. Estremamente intelligente, comunica attraverso Telepatia.</text:span></text:p>
      <text:p text:style-name="P3"/>
      <text:p text:style-name="P3">-&gt; Moltiplicatore x3 per l'Essenza; +10 TR/BD vs Caldo; Firebolt 2x al giorno.</text:p>
      <text:p text:style-name="P2"/>
      <text:p text:style-name="P2">SARALIS, L'ANELLO DELL'INVERNO</text:p>
      <text:p text:style-name="P4">POTERI: <text:span text:style-name="T1">Moltiplicatore x4 del Flusso, il portatore è immune agli effetti di “Absolution” (e incantesimi simili) e al risucchio di costituzione dei non-morti, è inoltre immune al Gelo non magico e guadagna un bonus di +50 al BD e ai TR contro quello magico, una volta al giorno Saralis può riflettere un incantesimo verso il lanciatore (la magia deve fare un TR contro il Flusso del 50° per non essere riflessa), il portatore può emettere a volontà un'aurea gelida con un raggio di 3m, che risucchia 5 punti di Co a tutti coloro che falliscono un TR di Vigore ogni round.</text:span></text:p>
      <text:p text:style-name="P3">Estremamente intelligente, comunica attraverso Telepatia.</text:p>
      <text:p text:style-name="P3"/>
      <text:p text:style-name="P3">--&gt; Moltiplicatore x2 Flusso; +10 TR vs Gelo; immune al risucchio Co; +30 TR vs Absolution.</text:p>
      <text:p text:style-name="P2"/>
      <text:p text:style-name="P2">MASAMUNE: <text:s/><text:span text:style-name="T1">Indistruttibile, colpisce come una lama Magica +10. </text:span></text:p>
      <text:p text:style-name="P5">Diventa:</text:p>
      <text:p text:style-name="P4">MELETSKAR, LA LAMA DI LUCE E OMBRA</text:p>
      <text:p text:style-name="P6"><text:span text:style-name="T2">POTERI: </text:span><text:span text:style-name="T3">No-Dachi +30 (colpisce come Mithril), Indistruttibile, Colpo Critico addizionale da Elettricità, Colpi Critici Sacri contro Non Morti e contro creature dell’Oscurità, +100% all’azione, distorce luce e ombre intorno al portatore, creando strani effetti ottici (+20 a Muoversi Silenz/Nascondersi; i suoi nemici riducono la parata di 20). Estremamente intelligente, comunica attraverso Telepatia.</text:span></text:p>
      <text:p text:style-name="P5"/>
      <text:p text:style-name="P5">--&gt; +30 (Mithril); Indistruttibile; +20% azione.</text:p>
      <text:p text:style-name="P5"/>
      <text:p text:style-name="P4">TASSALUNG, IL GIOIELLO DEGLI ABISSI</text:p>
      <text:p text:style-name="P2"><text:span text:style-name="T4">POTERI:</text:span><text:span text:style-name="T1"> Moltiplicatore x4 del Mentalismo, “Mirrormind” costante, il portatore può respirare sott'acqua e guadagna 10 ranghi di Nuotare, il portatore può usare i primi 30 livelli di “Liquid Manipulation” come se li conoscesse, una volta al giorno può lanciare un “Mind Shout True” (livello 50° per i TR). Estremamente intelligente, comunica attraverso Telepatia.</text:span></text:p>
      <text:p text:style-name="P3"/>
      <text:p text:style-name="P4">NATHARIEN, IL DIADEMA CELESTE</text:p>
      <text:p text:style-name="P7"><text:span text:style-name="T4">POTERI:</text:span><text:span text:style-name="T5"> Moltiplicatore x4 per l'Arcano, il portatore può Volare a volontà, il Diadema devia ogni colpo diretto verso il portatore creando istantanei scudi di forza (in pratica conferisce un bonus di +25 al BD costante, che diventa +50 contro gli attacchi da Aria), il portatore può usare i primi 30 livelli di “Shifting Law” come se li conoscesse, e può lanciare “Aether Bolt” fino a 3 volte al giorno, Natharien può invocare “L'Esplosione Celeste” (Aehter Ball II, doppi danni) una volta al giorno. Estremamente intelligente, comunica attraverso Telepatia.</text:span></text:p>
      <text:p text:style-name="P3"/>
      <text:p text:style-name="P3">--&gt; Moltiplicatore x2 Arcano; +10 BD; accesso alla lista Shifting Law; Aether Bolt 1x giorno</text:p>
      <text:p text:style-name="P5"/>
      <text:p text:style-name="P4">OEDRING, IL MARTELLO DEL MONDO SOTTERRANEO</text:p>
      <text:p text:style-name="P5"><text:span text:style-name="T6">POTERI: </text:span><text:span text:style-name="T1">Martello da Guerra +30 (colpisce come Mithril), Indistruttibile, Doppio Danno, colpo critico addizionale da Krush, crea una sfera di magnetismo intorno al portatore che gli conferisce un bonus di +20 al BD contro le armi di ferro, permette di creare oggetti in giorni invece che in settimane, ogni oggetto forgiato col suo ausilio guadagna 2d10 di PC (Terra). </text:span>Estremamente intelligente, comunica attraverso Telepatia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MS Mincho1" svg:font-family="'MS Mincho', 'ＭＳ 明朝'" style:font-family-generic="modern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it" fo:country="IT" style:font-name-asian="MS Mincho1" style:font-size-asian="12pt" style:language-asian="ja" style:country-asian="JP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bsatz-Standardschriftart" style:family="text"/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fo:background-color="#ffffff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Max</meta:initial-creator>
    <meta:creation-date>2006-11-08T22:26:00</meta:creation-date>
    <dc:creator>x</dc:creator>
    <dc:date>2008-05-05T17:55:59</dc:date>
    <meta:print-date>2113-01-01T00:00:00</meta:print-date>
    <dc:language>it-IT</dc:language>
    <meta:editing-cycles>27</meta:editing-cycles>
    <meta:editing-duration>PT2H9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9" meta:word-count="547" meta:character-count="3493"/>
  </office:meta>
</office:document-meta>
</file>