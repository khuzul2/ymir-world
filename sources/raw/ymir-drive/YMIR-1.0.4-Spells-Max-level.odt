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7.776cm" fo:margin-left="-0.191cm" table:align="left" style:writing-mode="lr-tb"/>
    </style:style>
    <style:style style:name="Table2.A" style:family="table-column">
      <style:table-column-properties style:column-width="1.148cm"/>
    </style:style>
    <style:style style:name="Table2.B" style:family="table-column">
      <style:table-column-properties style:column-width="16.628cm"/>
    </style:style>
    <style:style style:name="Table2.1" style:family="table-row">
      <style:table-row-properties style:keep-together="true" fo:keep-together="auto"/>
    </style:style>
    <style:style style:name="Table2.A1" style:family="table-cell">
      <style:table-cell-properties fo:padding="0cm" fo:border-left="none" fo:border-right="none" fo:border-top="none" fo:border-bottom="0.018cm solid #000001"/>
    </style:style>
    <style:style style:name="Table2.A2" style:family="table-cell">
      <style:table-cell-properties fo:padding="0cm" fo:border-left="none" fo:border-right="none" fo:border-top="0.018cm solid #000001" fo:border-bottom="0.018cm solid #000001"/>
    </style:style>
    <style:style style:name="Table2.A6" style:family="table-cell">
      <style:table-cell-properties fo:padding="0cm" fo:border-left="none" fo:border-right="none" fo:border-top="0.018cm solid #000001" fo:border-bottom="none"/>
    </style:style>
    <style:style style:name="Table9" style:family="table">
      <style:table-properties style:width="11.691cm" table:align="center" style:writing-mode="lr-tb"/>
    </style:style>
    <style:style style:name="Table9.A" style:family="table-column">
      <style:table-column-properties style:column-width="4.357cm"/>
    </style:style>
    <style:style style:name="Table9.B" style:family="table-column">
      <style:table-column-properties style:column-width="1.831cm"/>
    </style:style>
    <style:style style:name="Table9.C" style:family="table-column">
      <style:table-column-properties style:column-width="1.864cm"/>
    </style:style>
    <style:style style:name="Table9.D" style:family="table-column">
      <style:table-column-properties style:column-width="2.164cm"/>
    </style:style>
    <style:style style:name="Table9.E" style:family="table-column">
      <style:table-column-properties style:column-width="1.475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left="none" fo:border-right="none" fo:border-top="none" fo:border-bottom="0.018cm solid #00000a"/>
    </style:style>
    <style:style style:name="Table9.A2" style:family="table-cell">
      <style:table-cell-properties fo:padding-left="0.191cm" fo:padding-right="0.191cm" fo:padding-top="0cm" fo:padding-bottom="0cm" fo:border-left="none" fo:border-right="none" fo:border-top="0.018cm solid #00000a" fo:border-bottom="0.018cm solid #00000a"/>
    </style:style>
    <style:style style:name="Table9.A6" style:family="table-cell">
      <style:table-cell-properties fo:padding-left="0.191cm" fo:padding-right="0.191cm" fo:padding-top="0cm" fo:padding-bottom="0cm" fo:border-left="none" fo:border-right="none" fo:border-top="0.018cm solid #00000a" fo:border-bottom="none"/>
    </style:style>
    <style:style style:name="Table4" style:family="table">
      <style:table-properties style:width="5.502cm" fo:margin-left="5.001cm" table:align="left" style:writing-mode="lr-tb"/>
    </style:style>
    <style:style style:name="Table4.A" style:family="table-column">
      <style:table-column-properties style:column-width="3.821cm"/>
    </style:style>
    <style:style style:name="Table4.B" style:family="table-column">
      <style:table-column-properties style:column-width="1.681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none"/>
    </style:style>
    <style:style style:name="Table3" style:family="table">
      <style:table-properties style:width="11.753cm" fo:margin-left="3cm" table:align="left" style:writing-mode="lr-tb"/>
    </style:style>
    <style:style style:name="Table3.A" style:family="table-column">
      <style:table-column-properties style:column-width="6.999cm"/>
    </style:style>
    <style:style style:name="Table3.B" style:family="table-column">
      <style:table-column-properties style:column-width="4.75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5" style:family="table">
      <style:table-properties style:width="8.502cm" table:align="center" style:writing-mode="lr-tb"/>
    </style:style>
    <style:style style:name="Table5.A" style:family="table-column">
      <style:table-column-properties style:column-width="3.002cm"/>
    </style:style>
    <style:style style:name="Table5.B" style:family="table-column">
      <style:table-column-properties style:column-width="5.5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left="none" fo:border-right="none" fo:border-top="none" fo:border-bottom="0.018cm solid #00000a"/>
    </style:style>
    <style:style style:name="Table5.A2" style:family="table-cell">
      <style:table-cell-properties fo:padding-left="0.191cm" fo:padding-right="0.191cm" fo:padding-top="0cm" fo:padding-bottom="0cm" fo:border-left="none" fo:border-right="none" fo:border-top="0.018cm solid #00000a" fo:border-bottom="0.018cm solid #00000a"/>
    </style:style>
    <style:style style:name="Table5.A5" style:family="table-cell">
      <style:table-cell-properties fo:padding-left="0.191cm" fo:padding-right="0.191cm" fo:padding-top="0cm" fo:padding-bottom="0cm" fo:border-left="none" fo:border-right="none" fo:border-top="0.018cm solid #00000a" fo:border-bottom="none"/>
    </style:style>
    <style:style style:name="Table8" style:family="table">
      <style:table-properties style:width="6.422cm" table:align="center" style:writing-mode="lr-tb"/>
    </style:style>
    <style:style style:name="Table8.A" style:family="table-column">
      <style:table-column-properties style:column-width="3.572cm"/>
    </style:style>
    <style:style style:name="Table8.B" style:family="table-column">
      <style:table-column-properties style:column-width="2.85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left="none" fo:border-right="none" fo:border-top="none" fo:border-bottom="0.018cm solid #00000a"/>
    </style:style>
    <style:style style:name="Table8.A2" style:family="table-cell">
      <style:table-cell-properties fo:padding-left="0.191cm" fo:padding-right="0.191cm" fo:padding-top="0cm" fo:padding-bottom="0cm" fo:border-left="none" fo:border-right="none" fo:border-top="0.018cm solid #00000a" fo:border-bottom="0.018cm solid #00000a"/>
    </style:style>
    <style:style style:name="Table8.A4" style:family="table-cell">
      <style:table-cell-properties fo:padding-left="0.191cm" fo:padding-right="0.191cm" fo:padding-top="0cm" fo:padding-bottom="0cm" fo:border-left="none" fo:border-right="none" fo:border-top="0.018cm solid #00000a" fo:border-bottom="none"/>
    </style:style>
    <style:style style:name="P1" style:family="paragraph" style:parent-style-name="Standard">
      <style:text-properties fo:font-weight="bold" style:font-weight-asian="bold" style:font-name-complex="Calibri"/>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fo:language="en" fo:country="US" fo:font-weight="bold" style:language-asian="en" style:country-asian="US" style:font-weight-asian="bold" style:font-name-complex="Calibri"/>
    </style:style>
    <style:style style:name="P4" style:family="paragraph" style:parent-style-name="Standard">
      <style:text-properties fo:color="#000000" fo:language="en" fo:country="US" fo:font-weight="bold" style:font-weight-asian="bold" style:font-name-complex="Calibri"/>
    </style:style>
    <style:style style:name="P5" style:family="paragraph" style:parent-style-name="Standard">
      <style:text-properties fo:color="#000000" fo:language="en" fo:country="US" style:language-asian="en" style:country-asian="US" style:font-name-complex="Calibri"/>
    </style:style>
    <style:style style:name="P6" style:family="paragraph" style:parent-style-name="Standard">
      <style:text-properties fo:color="#000000" fo:language="en" fo:country="US" style:font-name-complex="Calibri"/>
    </style:style>
    <style:style style:name="P7" style:family="paragraph" style:parent-style-name="Standard">
      <style:text-properties fo:color="#000000" fo:language="en" fo:country="US" fo:font-style="normal" fo:font-weight="bold" style:language-asian="en" style:country-asian="US" style:font-style-asian="normal" style:font-weight-asian="bold" style:font-name-complex="Calibri" style:font-style-complex="normal" style:font-weight-complex="bold"/>
    </style:style>
    <style:style style:name="P8" style:family="paragraph" style:parent-style-name="Standard">
      <style:text-properties fo:color="#000000" fo:font-size="10pt" fo:language="en" fo:country="US" fo:font-weight="bold" style:font-size-asian="10pt" style:language-asian="en" style:country-asian="US" style:font-weight-asian="bold" style:font-name-complex="Calibri"/>
    </style:style>
    <style:style style:name="P9" style:family="paragraph" style:parent-style-name="Standard">
      <style:text-properties fo:color="#000000" fo:font-size="10pt" fo:language="en" fo:country="US" fo:font-weight="bold" style:font-size-asian="10pt" style:language-asian="en" style:country-asian="US" style:font-weight-asian="bold" style:font-name-complex="Calibri" style:font-weight-complex="normal"/>
    </style:style>
    <style:style style:name="P10" style:family="paragraph" style:parent-style-name="Standard">
      <style:text-properties fo:color="#000000" fo:font-size="10pt" fo:language="en" fo:country="US" fo:font-weight="bold" style:font-size-asian="10pt" style:language-asian="en" style:country-asian="US" style:font-weight-asian="bold" style:font-name-complex="Calibri" style:font-size-complex="12pt" style:font-weight-complex="bold"/>
    </style:style>
    <style:style style:name="P11" style:family="paragraph" style:parent-style-name="Standard">
      <style:text-properties fo:color="#000000" fo:font-size="10pt" fo:language="en" fo:country="US" fo:font-weight="bold" style:font-size-asian="10pt" style:language-asian="en" style:country-asian="US" style:font-weight-asian="bold" style:font-name-complex="Calibri" style:font-size-complex="12pt" style:font-weight-complex="normal"/>
    </style:style>
    <style:style style:name="P12" style:family="paragraph" style:parent-style-name="Standard">
      <style:text-properties fo:color="#000000" fo:font-size="10pt" fo:language="en" fo:country="US" fo:font-weight="bold" style:font-size-asian="10pt" style:font-weight-asian="bold" style:font-name-complex="Calibri"/>
    </style:style>
    <style:style style:name="P13" style:family="paragraph" style:parent-style-name="Standard">
      <style:text-properties fo:color="#000000" fo:font-size="10pt" fo:language="en" fo:country="US" style:font-size-asian="10pt" style:language-asian="en" style:country-asian="US" style:font-name-complex="Calibri"/>
    </style:style>
    <style:style style:name="P14" style:family="paragraph" style:parent-style-name="Standard">
      <style:text-properties fo:color="#000000" fo:font-size="10pt" fo:language="en" fo:country="US" style:font-size-asian="10pt" style:language-asian="en" style:country-asian="US" style:font-name-complex="Calibri" style:font-size-complex="10pt"/>
    </style:style>
    <style:style style:name="P15" style:family="paragraph" style:parent-style-name="Standard">
      <style:paragraph-properties>
        <style:tab-stops/>
      </style:paragraph-properties>
      <style:text-properties fo:color="#000000" fo:font-size="10pt" fo:language="en" fo:country="US" style:font-size-asian="10pt" style:language-asian="en" style:country-asian="US" style:font-name-complex="Calibri" style:font-size-complex="10pt"/>
    </style:style>
    <style:style style:name="P16" style:family="paragraph" style:parent-style-name="Standard">
      <style:text-properties fo:color="#000000" fo:font-size="10pt" fo:language="en" fo:country="US" style:font-size-asian="10pt" style:font-name-complex="Calibri"/>
    </style:style>
    <style:style style:name="P17" style:family="paragraph" style:parent-style-name="Standard">
      <style:text-properties fo:color="#000000" fo:font-size="10pt" fo:language="en" fo:country="US" style:font-size-asian="10pt" style:font-size-complex="10pt"/>
    </style:style>
    <style:style style:name="P18" style:family="paragraph" style:parent-style-name="Standard">
      <style:text-properties fo:color="#000000" fo:font-size="10pt" fo:language="en" fo:country="US" fo:font-weight="normal" style:font-size-asian="10pt" style:language-asian="en" style:country-asian="US" style:font-weight-asian="normal" style:font-name-complex="Calibri" style:font-weight-complex="normal"/>
    </style:style>
    <style:style style:name="P19" style:family="paragraph" style:parent-style-name="Standard">
      <style:text-properties fo:color="#000000" fo:font-size="10pt" fo:language="en" fo:country="US" fo:font-weight="normal" style:font-size-asian="10pt" style:language-asian="en" style:country-asian="US" style:font-weight-asian="normal" style:font-name-complex="Calibri" style:font-size-complex="12pt" style:font-weight-complex="normal"/>
    </style:style>
    <style:style style:name="P20" style:family="paragraph" style:parent-style-name="Standard">
      <style:text-properties fo:color="#000000" fo:font-size="10pt" fo:language="en" fo:country="US" fo:font-style="italic" style:font-size-asian="10pt" style:language-asian="en" style:country-asian="US" style:font-style-asian="italic" style:font-name-complex="Calibri"/>
    </style:style>
    <style:style style:name="P21" style:family="paragraph" style:parent-style-name="Standard">
      <style:text-properties fo:color="#000000" fo:font-size="10pt" fo:language="en" fo:country="US" fo:font-style="normal" fo:font-weight="normal" style:font-size-asian="10pt" style:language-asian="en" style:country-asian="US" style:font-style-asian="normal" style:font-weight-asian="normal" style:font-name-complex="Calibri" style:font-size-complex="10pt" style:font-style-complex="normal" style:font-weight-complex="normal"/>
    </style:style>
    <style:style style:name="P22" style:family="paragraph" style:parent-style-name="Standard">
      <style:text-properties fo:color="#000000" fo:font-size="10pt" fo:font-weight="bold" style:font-size-asian="10pt" style:language-asian="en" style:country-asian="US" style:font-weight-asian="bold" style:font-name-complex="Calibri"/>
    </style:style>
    <style:style style:name="P23" style:family="paragraph" style:parent-style-name="Standard">
      <style:text-properties fo:color="#000000" fo:font-size="10pt" style:font-size-asian="10pt" style:language-asian="en" style:country-asian="US" style:font-name-complex="Calibri"/>
    </style:style>
    <style:style style:name="P24" style:family="paragraph" style:parent-style-name="Standard">
      <style:text-properties fo:color="#000000" fo:font-weight="bold" style:language-asian="en" style:country-asian="US" style:font-weight-asian="bold" style:font-name-complex="Calibri"/>
    </style:style>
    <style:style style:name="P25" style:family="paragraph" style:parent-style-name="Standard">
      <style:paragraph-properties fo:text-align="center" style:justify-single-word="false"/>
      <style:text-properties fo:color="#000000" fo:font-weight="bold" style:language-asian="en" style:country-asian="US" style:font-weight-asian="bold" style:font-name-complex="Calibri"/>
    </style:style>
    <style:style style:name="P26" style:family="paragraph" style:parent-style-name="Standard">
      <style:text-properties fo:color="#000000" style:language-asian="en" style:country-asian="US" style:font-name-complex="Calibri"/>
    </style:style>
    <style:style style:name="P27" style:family="paragraph" style:parent-style-name="Standard">
      <style:paragraph-properties fo:text-align="center" style:justify-single-word="false"/>
      <style:text-properties fo:color="#000000" style:language-asian="en" style:country-asian="US" style:font-name-complex="Calibri"/>
    </style:style>
    <style:style style:name="P28" style:family="paragraph" style:parent-style-name="Standard">
      <style:text-properties fo:color="#000000" fo:font-size="18pt" fo:language="en" fo:country="US" fo:font-weight="bold" style:font-size-asian="18pt" style:language-asian="en" style:country-asian="US" style:font-weight-asian="bold" style:font-name-complex="Calibri" style:font-size-complex="12pt" style:font-weight-complex="bold"/>
    </style:style>
    <style:style style:name="P29" style:family="paragraph" style:parent-style-name="Standard">
      <style:text-properties fo:language="en" fo:country="US" style:font-name-complex="Calibri"/>
    </style:style>
    <style:style style:name="P30" style:family="paragraph" style:parent-style-name="Standard">
      <style:text-properties fo:font-size="10pt" fo:font-weight="bold" style:font-size-asian="10pt" style:font-weight-asian="bold" style:font-name-complex="Calibri" style:font-size-complex="10pt" style:font-weight-complex="bold"/>
    </style:style>
    <style:style style:name="P31" style:family="paragraph" style:parent-style-name="Standard">
      <style:paragraph-properties fo:text-align="center" style:justify-single-word="false"/>
      <style:text-properties fo:font-size="10pt" fo:font-weight="bold" style:font-size-asian="10pt" style:font-weight-asian="bold" style:font-name-complex="Calibri" style:font-size-complex="10pt" style:font-weight-complex="bold"/>
    </style:style>
    <style:style style:name="P3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3" style:family="paragraph" style:parent-style-name="Standard">
      <style:text-properties fo:font-size="10pt" style:font-size-asian="10pt" style:font-name-complex="Calibri" style:font-size-complex="10pt"/>
    </style:style>
    <style:style style:name="P34" style:family="paragraph" style:parent-style-name="Standard">
      <style:paragraph-properties fo:text-align="center" style:justify-single-word="false"/>
      <style:text-properties fo:font-size="10pt" style:font-size-asian="10pt" style:font-name-complex="Calibri" style:font-size-complex="10pt"/>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fo:font-weight="normal" style:font-size-asian="10pt" style:font-weight-asian="normal" style:font-size-complex="10pt" style:font-weight-complex="normal"/>
    </style:style>
    <style:style style:name="P37" style:family="paragraph" style:parent-style-name="Standard">
      <style:paragraph-properties fo:text-align="center" style:justify-single-word="false"/>
      <style:text-properties fo:font-size="9pt" style:font-size-asian="9pt" style:font-name-complex="Calibri" style:font-size-complex="9pt"/>
    </style:style>
    <style:style style:name="P38" style:family="paragraph" style:parent-style-name="Standard">
      <style:text-properties style:use-window-font-color="true"/>
    </style:style>
    <style:style style:name="P39" style:family="paragraph" style:parent-style-name="Standard">
      <style:text-properties style:use-window-font-color="true" fo:font-weight="bold" style:font-weight-asian="bold" style:font-weight-complex="bold"/>
    </style:style>
    <style:style style:name="P40" style:family="paragraph" style:parent-style-name="Standard">
      <style:paragraph-properties>
        <style:tab-stops/>
      </style:paragraph-properties>
      <style:text-properties style:use-window-font-color="true" fo:font-weight="bold" style:font-weight-asian="bold" style:font-weight-complex="bold"/>
    </style:style>
    <style:style style:name="P41" style:family="paragraph" style:parent-style-name="Standard">
      <style:text-properties style:use-window-font-color="true" fo:font-size="10pt" style:font-size-asian="10pt" style:font-size-complex="10pt"/>
    </style:style>
    <style:style style:name="P42" style:family="paragraph" style:parent-style-name="Standard">
      <style:paragraph-properties>
        <style:tab-stops/>
      </style:paragraph-properties>
      <style:text-properties style:use-window-font-color="true"/>
    </style:style>
    <style:style style:name="P4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4"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45" style:family="paragraph" style:parent-style-name="Standard">
      <style:text-properties fo:font-size="12pt" fo:font-weight="bold" style:font-size-asian="12pt" style:font-weight-asian="bold" style:font-size-complex="12pt" style:font-weight-complex="bold"/>
    </style:style>
    <style:style style:name="P46" style:family="paragraph" style:parent-style-name="Standard">
      <style:paragraph-properties fo:break-before="page"/>
      <style:text-properties fo:color="#000000" fo:font-size="24pt" fo:language="en" fo:country="US" fo:font-weight="bold" style:font-size-asian="24pt" style:language-asian="en" style:country-asian="US" style:font-weight-asian="bold" style:font-name-complex="Calibri" style:font-size-complex="24pt" style:font-weight-complex="bold"/>
    </style:style>
    <style:style style:name="P47" style:family="paragraph" style:parent-style-name="Standard">
      <style:paragraph-properties fo:break-before="page"/>
      <style:text-properties fo:font-size="24pt" fo:font-weight="bold" style:font-size-asian="24pt" style:font-weight-asian="bold" style:font-size-complex="24pt" style:font-weight-complex="bold"/>
    </style:style>
    <style:style style:name="P48"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9" style:family="paragraph" style:parent-style-name="Standard">
      <style:paragraph-properties fo:margin-left="0cm" fo:margin-right="0cm" fo:text-align="start" style:justify-single-word="false" fo:orphans="0" fo:widows="0" fo:text-indent="0cm" style:auto-text-indent="false" style:vertical-align="auto"/>
      <style:text-properties fo:color="#000000" style:font-name="Times New Roman1" fo:font-size="10pt" fo:language="en" fo:country="US" fo:font-weight="normal" style:font-size-asian="10pt" style:language-asian="en" style:country-asian="US" style:font-weight-asian="normal" style:font-name-complex="Calibri" style:font-weight-complex="normal"/>
    </style:style>
    <style:style style:name="P50" style:family="paragraph" style:parent-style-name="Standard">
      <style:paragraph-properties fo:margin-left="0cm" fo:margin-right="0cm" fo:text-align="start" style:justify-single-word="false" fo:orphans="0" fo:widows="0" fo:text-indent="0cm" style:auto-text-indent="false" style:vertical-align="auto"/>
      <style:text-properties fo:color="#000000" style:font-name="Times New Roman1" fo:font-size="10pt" fo:language="en" fo:country="US" style:font-size-asian="10pt" style:language-asian="en" style:country-asian="US"/>
    </style:style>
    <style:style style:name="P51" style:family="paragraph" style:parent-style-name="Standard">
      <style:paragraph-properties fo:margin-left="0cm" fo:margin-right="0cm" fo:text-align="start" style:justify-single-word="false" fo:orphans="0" fo:widows="0" fo:text-indent="0cm" style:auto-text-indent="false" style:vertical-align="auto"/>
      <style:text-properties fo:color="#000000" style:font-name="Times New Roman1" fo:font-size="12pt" fo:language="en" fo:country="US" fo:font-weight="bold" style:font-size-asian="12pt" style:language-asian="en" style:country-asian="US" style:font-weight-asian="bold" style:font-weight-complex="bold"/>
    </style:style>
    <style:style style:name="P52" style:family="paragraph" style:parent-style-name="Standard">
      <style:paragraph-properties fo:margin-left="0cm" fo:margin-right="0cm" fo:text-align="start" style:justify-single-word="false" fo:orphans="0" fo:widows="0" fo:text-indent="0cm" style:auto-text-indent="false" style:vertical-align="auto"/>
      <style:text-properties fo:color="#000000" fo:font-size="10pt" fo:language="en" fo:country="US" fo:font-weight="bold" style:font-size-asian="10pt" style:language-asian="en" style:country-asian="US" style:font-weight-asian="bold" style:font-name-complex="Calibri" style:font-weight-complex="normal"/>
    </style:style>
    <style:style style:name="P53" style:family="paragraph" style:parent-style-name="Standard">
      <style:paragraph-properties fo:margin-left="0cm" fo:margin-right="0cm" fo:text-align="start" style:justify-single-word="false" fo:orphans="0" fo:widows="0" fo:text-indent="0cm" style:auto-text-indent="false" style:vertical-align="auto"/>
    </style:style>
    <style:style style:name="P54" style:family="paragraph" style:parent-style-name="Standard">
      <style:paragraph-properties fo:margin-left="0cm" fo:margin-right="0cm" fo:text-align="start" style:justify-single-word="false" fo:orphans="0" fo:widows="0" fo:text-indent="0cm" style:auto-text-indent="false" style:vertical-align="auto"/>
      <style:text-properties fo:font-weight="bold" style:font-weight-asian="bold" style:font-weight-complex="bold"/>
    </style:style>
    <style:style style:name="P55" style:family="paragraph" style:parent-style-name="Standard">
      <style:text-properties fo:color="#000000" fo:font-size="10pt" fo:language="en" fo:country="US" style:font-size-asian="10pt" style:language-asian="en" style:country-asian="US" style:font-name-complex="Calibri"/>
    </style:style>
    <style:style style:name="T1" style:family="text">
      <style:text-properties fo:color="#000000"/>
    </style:style>
    <style:style style:name="T2" style:family="text">
      <style:text-properties fo:color="#000000" fo:font-size="10pt" fo:language="en" fo:country="US" fo:font-style="italic" style:font-size-asian="10pt" style:language-asian="en" style:country-asian="US" style:font-style-asian="italic" style:font-name-complex="Calibri"/>
    </style:style>
    <style:style style:name="T3" style:family="text">
      <style:text-properties fo:color="#000000" fo:font-size="10pt" fo:language="en" fo:country="US" fo:font-style="italic" style:font-size-asian="10pt" style:font-style-asian="italic" style:font-name-complex="Calibri"/>
    </style:style>
    <style:style style:name="T4" style:family="text">
      <style:text-properties fo:color="#000000" fo:font-size="10pt" fo:language="en" fo:country="US" style:font-size-asian="10pt" style:language-asian="en" style:country-asian="US" style:font-name-complex="Calibri"/>
    </style:style>
    <style:style style:name="T5" style:family="text">
      <style:text-properties fo:color="#000000" fo:font-size="10pt" fo:language="en" fo:country="US" style:font-size-asian="10pt" style:font-name-complex="Calibri"/>
    </style:style>
    <style:style style:name="T6" style:family="text">
      <style:text-properties fo:color="#000000" fo:font-size="10pt" fo:language="en" fo:country="US" fo:font-weight="bold" style:font-size-asian="10pt" style:language-asian="en" style:country-asian="US" style:font-weight-asian="bold" style:font-name-complex="Calibri"/>
    </style:style>
    <style:style style:name="T7" style:family="text">
      <style:text-properties fo:color="#000000" fo:font-size="10pt" fo:language="en" fo:country="US" fo:font-weight="bold" style:font-size-asian="10pt" style:font-weight-asian="bold" style:font-name-complex="Calibri"/>
    </style:style>
    <style:style style:name="T8" style:family="text">
      <style:text-properties fo:color="#000000" fo:font-size="10pt" fo:font-weight="bold" style:font-size-asian="10pt" style:language-asian="en" style:country-asian="US" style:font-weight-asian="bold" style:font-name-complex="Calibri"/>
    </style:style>
    <style:style style:name="T9" style:family="text">
      <style:text-properties fo:color="#000000" fo:font-size="10pt" style:font-size-asian="10pt" style:language-asian="en" style:country-asian="US" style:font-name-complex="Calibri"/>
    </style:style>
    <style:style style:name="T10" style:family="text">
      <style:text-properties fo:color="#000000" fo:language="en" fo:country="US"/>
    </style:style>
    <style:style style:name="T11" style:family="text">
      <style:text-properties fo:color="#000000" fo:language="en" fo:country="US" style:font-name-complex="Calibri"/>
    </style:style>
    <style:style style:name="T12" style:family="text">
      <style:text-properties fo:color="#000000" fo:language="en" fo:country="US" style:language-asian="en" style:country-asian="US" style:font-name-complex="Calibri"/>
    </style:style>
    <style:style style:name="T13" style:family="text">
      <style:text-properties fo:color="#000000" fo:language="en" fo:country="US" fo:font-weight="bold"/>
    </style:style>
    <style:style style:name="T14" style:family="text">
      <style:text-properties fo:color="#000000" fo:font-weight="bold" style:language-asian="en" style:country-asian="US" style:font-weight-asian="bold"/>
    </style:style>
    <style:style style:name="T15" style:family="text">
      <style:text-properties fo:color="#000000" style:font-name="Times New Roman1" fo:font-size="12pt" fo:language="en" fo:country="US" style:font-size-asian="12pt" style:language-asian="en" style:country-asian="US"/>
    </style:style>
    <style:style style:name="T16" style:family="text">
      <style:text-properties fo:color="#000000" style:font-name="Times New Roman1" fo:font-size="12pt" fo:language="en" fo:country="US" fo:font-weight="bold" style:font-size-asian="12pt" style:language-asian="en" style:country-asian="US" style:font-weight-asian="bold" style:font-weight-complex="bold"/>
    </style:style>
    <style:style style:name="T17" style:family="text">
      <style:text-properties fo:color="#000000" style:font-name="Times New Roman1" fo:font-size="10pt" fo:language="en" fo:country="US" style:font-size-asian="10pt" style:language-asian="en" style:country-asian="US"/>
    </style:style>
    <style:style style:name="T18" style:family="text">
      <style:text-properties fo:color="#000000" style:font-name="Times New Roman1" fo:font-size="10pt" fo:language="en" fo:country="US" fo:font-weight="bold" style:font-size-asian="10pt" style:language-asian="en" style:country-asian="US" style:font-weight-asian="bold"/>
    </style:style>
    <style:style style:name="T19" style:family="text">
      <style:text-properties fo:color="#000000" style:font-name="Times New Roman1" fo:font-size="10pt" fo:language="en" fo:country="US" fo:font-style="italic" style:font-size-asian="10pt" style:language-asian="en" style:country-asian="US" style:font-style-asian="italic"/>
    </style:style>
    <style:style style:name="T20" style:family="text">
      <style:text-properties fo:color="#000000" style:font-name="Times New Roman1" fo:font-size="10pt" fo:language="en" fo:country="US" fo:font-style="normal" style:font-size-asian="10pt" style:language-asian="en" style:country-asian="US" style:font-style-asian="normal" style:font-style-complex="normal"/>
    </style:style>
    <style:style style:name="T21" style:family="text">
      <style:text-properties fo:font-style="italic" style:font-style-asian="italic"/>
    </style:style>
    <style:style style:name="T22" style:family="text">
      <style:text-properties fo:font-style="italic" style:font-style-asian="italic" style:font-size-complex="12pt"/>
    </style:style>
    <style:style style:name="T23" style:family="text">
      <style:text-properties fo:language="en" fo:country="US"/>
    </style:style>
    <style:style style:name="T24" style:family="text">
      <style:text-properties fo:language="en" fo:country="US" style:font-name-complex="Calibri"/>
    </style:style>
    <style:style style:name="T25" style:family="text">
      <style:text-properties fo:font-weight="bold" style:font-weight-asian="bold"/>
    </style:style>
    <style:style style:name="T26" style:family="text">
      <style:text-properties fo:font-size="10pt" fo:language="en" fo:country="US" style:font-size-asian="10pt" style:font-name-complex="Calibri" style:font-size-complex="12pt"/>
    </style:style>
    <style:style style:name="T27" style:family="text">
      <style:text-properties fo:font-size="10pt" fo:language="en" fo:country="US" style:font-size-asian="10pt" style:font-name-complex="Calibri" style:font-size-complex="10pt"/>
    </style:style>
    <style:style style:name="T28" style:family="text">
      <style:text-properties fo:font-size="10pt" fo:language="en" fo:country="US" fo:font-style="italic" style:font-size-asian="10pt" style:font-style-asian="italic" style:font-name-complex="Calibri" style:font-size-complex="10pt" style:font-style-complex="italic"/>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size-complex="12pt"/>
    </style:style>
    <style:style style:name="T33" style:family="text">
      <style:text-properties fo:font-weight="normal" style:font-weight-asian="normal" style:font-weight-complex="normal"/>
    </style:style>
    <style:style style:name="T34" style:family="text">
      <style:text-properties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3"/>
      <text:p text:style-name="P43"/>
      <text:p text:style-name="P43"/>
      <text:p text:style-name="P43"/>
      <text:p text:style-name="P43"/>
      <text:p text:style-name="P43"/>
      <text:p text:style-name="P43"/>
      <text:p text:style-name="P44">Ymir</text:p>
      <text:p text:style-name="P44">Spell Compendium</text:p>
      <text:p text:style-name="P48">Spells Notations and Special Rules</text:p>
      <text:p text:style-name="P45"/>
      <text:p text:style-name="P45">Resistance Rolls</text:p>
      <text:p text:style-name="P36">Unless otherwise specified, indirect offensive spells allow the target to make a Magical Resistance Roll to avoid their effects. </text:p>
      <text:p text:style-name="P36"/>
      <text:p text:style-name="P45">Directed Spells</text:p>
      <text:p text:style-name="P36">Some spells require an attack roll to hit the intended target, made using the Directed Spells skill. Directed Spells are treated like normal ranged attacks: they cannot be Parried, but may be Avoided or Blocked.</text:p>
      <text:p text:style-name="P36"/>
      <text:p text:style-name="P45">Area Damage</text:p>
      <text:p text:style-name="P36">Attacks dealing Area Damage inflict their full damage to the target's Body, and half that to the target's Arms, Legs and Head.</text:p>
      <text:p text:style-name="P36"/>
      <text:p text:style-name="P47">First Order</text:p>
      <text:p text:style-name="Standard"/>
      <text:p text:style-name="P3">Bless (Divine)</text:p>
      <text:p text:style-name="Standard"><text:span text:style-name="T6">Power:</text:span><text:span text:style-name="T4"> 10</text:span></text:p>
      <text:p text:style-name="Standard"><text:span text:style-name="T6">Range:</text:span><text:span text:style-name="T4"> 50 ft.</text:span></text:p>
      <text:p text:style-name="Standard"><text:span text:style-name="T6">Area:</text:span><text:span text:style-name="T4"> The caster and all allies within a 50-ft. burst, centered on the caster</text:span></text:p>
      <text:p text:style-name="Standard"><text:span text:style-name="T6">Duration:</text:span><text:span text:style-name="T4"> 1 min +1min/10 points of margin of success</text:span></text:p>
      <text:p text:style-name="P8"/>
      <text:p text:style-name="Standard"><text:span text:style-name="T2">Bless </text:span><text:span text:style-name="T4">fills your allies with courage. Each ally gains a +5 bonus on attack and resistance rolls.</text:span></text:p>
      <text:p text:style-name="P13"/>
      <text:p text:style-name="P3">Burning Hands (Arcane)</text:p>
      <text:p text:style-name="Standard"><text:span text:style-name="T6">Power:</text:span><text:span text:style-name="T4"> 10</text:span></text:p>
      <text:p text:style-name="Standard"><text:span text:style-name="T6">Range:</text:span><text:span text:style-name="T4"> 15 ft.</text:span></text:p>
      <text:p text:style-name="Standard"><text:span text:style-name="T6">Area:</text:span><text:span text:style-name="T4"> Cone-shaped burst</text:span></text:p>
      <text:p text:style-name="Standard"><text:span text:style-name="T6">Duration:</text:span><text:span text:style-name="T4"> Instantaneous</text:span></text:p>
      <text:p text:style-name="P8"/>
      <text:p text:style-name="P13">A cone of searing flame shoots from your fingertips. Make a Directed Spells attack: any creature in the area hit by the flames takes 1d4+1 points of area fire damage. For each 30 points of margin of success, damage is increased by 1d4+1 (maximum 3d4+3). Missed targets takes half damage. </text:p>
      <text:p text:style-name="P13"/>
      <text:p text:style-name="P3">Cause Fear (Divine/Arcane)</text:p>
      <text:p text:style-name="Standard"><text:span text:style-name="T6">Power:</text:span><text:span text:style-name="T4"> 10</text:span></text:p>
      <text:p text:style-name="Standard"><text:span text:style-name="T6">Range:</text:span><text:span text:style-name="T4"> Close (25 ft. + 5 ft./20 points of margin of success)</text:span></text:p>
      <text:p text:style-name="Standard"><text:span text:style-name="T6">Target:</text:span><text:span text:style-name="T4"> One living creature (lvl 5 or less)</text:span></text:p>
      <text:p text:style-name="Standard"><text:span text:style-name="T6">Duration:</text:span><text:span text:style-name="T4"> 1d4 rounds or 1 round; see text</text:span></text:p>
      <text:p text:style-name="P8"/>
      <text:p text:style-name="P13">If the affected creature fails a Mental RR, <text:s/>becomes frightened and run away. If the subject pass its RR, it is stunned for 1 round. Level 6 or higher creatures are immune to this effect.</text:p>
      <text:p text:style-name="P13"/>
      <text:p text:style-name="P3">Charm Person (Arcane)</text:p>
      <text:p text:style-name="Standard"><text:span text:style-name="T6">Power:</text:span><text:span text:style-name="T4"> 10</text:span></text:p>
      <text:p text:style-name="Standard"><text:span text:style-name="T6">Range:</text:span><text:span text:style-name="T4"> Close (25 ft. + 5 ft./20 points of margin of success )</text:span></text:p>
      <text:p text:style-name="Standard"><text:span text:style-name="T6">Target:</text:span><text:span text:style-name="T4"> One humanoid creature</text:span></text:p>
      <text:p text:style-name="Standard"><text:span text:style-name="T6">Duration:</text:span><text:span text:style-name="T4"> 1 hour + 1hr/10 points of margin of success</text:span></text:p>
      <text:p text:style-name="P8"/>
      <text:p text:style-name="P13">This charm makes a humanoid creature regard you as its trusted friend and ally (treat the target’s attitude as friendly). If the creature is currently being threatened or attacked by you or your allies, however, it receives a +25 bonus on its RR.</text:p>
      <text:p text:style-name="P13">The spell does not enable you to control the <text:span text:style-name="T21">charmed </text:span>person as if it were an automaton, but it perceives your words and actions in the most favorable way. You can try to give the subject orders, but you must win an Influence roll to convince it to do anything it wouldn’t ordinarily do. (Retries are not allowed.) An affected creature never obeys suicidal or obviously harmful orders, but it might be convinced that something very dangerous is worth doing. <text:s/>Any act by you or your apparent allies that threatens the <text:span text:style-name="T21">charmed </text:span>person breaks the spell. You must speak the person’s language to communicate your commands, or else be good at pantomiming.</text:p>
      <text:p text:style-name="P13"/>
      <text:p text:style-name="P3">Command (Divine/Arcane)</text:p>
      <text:p text:style-name="Standard"><text:span text:style-name="T6">Power:</text:span><text:span text:style-name="T4"> 10</text:span></text:p>
      <text:p text:style-name="Standard"><text:span text:style-name="T6">Range:</text:span><text:span text:style-name="T4"> Close (25 ft. + 5 ft./20 points of margin of success )</text:span></text:p>
      <text:p text:style-name="Standard"><text:span text:style-name="T6">Target:</text:span><text:span text:style-name="T4"> One living creature</text:span></text:p>
      <text:p text:style-name="Standard"><text:span text:style-name="T6">Duration:</text:span><text:span text:style-name="T4"> 1 round</text:span></text:p>
      <text:p text:style-name="P8"/>
      <text:p text:style-name="P13">You give the subject a single command, which it obeys to the best of its ability at its earliest opportunity. You may select from the following options.</text:p>
      <text:p text:style-name="Standard"><text:span text:style-name="T2">Approach: </text:span><text:span text:style-name="T4">On its turn, the subject moves toward you as quickly and directly as possible for 1 round. The creature may do nothing but move during its turn, and it provokes attacks of opportunity for this movement as normal.</text:span></text:p>
      <text:p text:style-name="Standard"><text:span text:style-name="T2">Drop: </text:span><text:span text:style-name="T4">On its turn, the subject drops whatever it is holding. It can’t pick up any dropped item until its next turn.</text:span></text:p>
      <text:p text:style-name="Standard"><text:span text:style-name="T2">Fall: </text:span><text:span text:style-name="T4">On its turn, the subject falls to the ground and remains prone for 1 round. It may act normally while prone but takes </text:span><text:soft-page-break/><text:span text:style-name="T4">any appropriate penalties.</text:span></text:p>
      <text:p text:style-name="Standard"><text:span text:style-name="T2">Flee: </text:span><text:span text:style-name="T4">On its turn, the subject moves away from you as quickly as possible for 1 round. It may do nothing but move during its turn, and it provokes attacks of opportunity for this movement as normal.</text:span></text:p>
      <text:p text:style-name="Standard"><text:span text:style-name="T2">Halt: </text:span><text:span text:style-name="T4">The subject stands in place for 1 round. It may not take any actions but is not considered helpless.</text:span></text:p>
      <text:p text:style-name="P13">If the subject can’t carry out your command on its next turn, the spell automatically fails.</text:p>
      <text:p text:style-name="P13"/>
      <text:p text:style-name="P3">Comprehend Languages (Divine/Arcane)</text:p>
      <text:p text:style-name="Standard"><text:span text:style-name="T6">Power</text:span><text:span text:style-name="T4"> 10</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0 min + 10min/10 points of margin of success</text:span></text:p>
      <text:p text:style-name="P13"/>
      <text:p text:style-name="P13">You can understand the spoken words of creatures or read otherwise incomprehensible written messages. In either case, you must touch the creature or the writing. The ability to read does not necessarily impart insight into the material, merely its literal meaning. The spell enables you to understand or read an unknown language, not speak or write it.</text:p>
      <text:p text:style-name="P13">Written material can be read at the rate of one page (250 words) per minute. Magical writing cannot be read, though the spell reveals that it is magical. This spell can be foiled by certain warding magic. It does not decipher codes or reveal messages concealed in otherwise normal text.</text:p>
      <text:p text:style-name="P13"/>
      <text:p text:style-name="P4">Cure Wounds <text:span text:style-name="T34">(Divine)</text:span></text:p>
      <text:p text:style-name="Standard"><text:span text:style-name="T7">Power:</text:span><text:span text:style-name="T5"> 10</text:span></text:p>
      <text:p text:style-name="Standard"><text:span text:style-name="T7">Range:</text:span><text:span text:style-name="T5"> Touch</text:span></text:p>
      <text:p text:style-name="Standard"><text:span text:style-name="T7">Target:</text:span><text:span text:style-name="T5"> Creature touched</text:span></text:p>
      <text:p text:style-name="Standard"><text:span text:style-name="T7">Duration:</text:span><text:span text:style-name="T5"> Instantaneous</text:span></text:p>
      <text:p text:style-name="P12"/>
      <text:p text:style-name="Standard"><text:span text:style-name="T5">When laying your hand upon a living creature, you channel positive energy that cures 1d8+1 points of damage to a single location, +1d8+1/30</text:span><text:span text:style-name="T4"> points of margin of success</text:span><text:span text:style-name="T5"> (up to a maximum of 4d8+4). This spell has no effect on destroyed locations.</text:span></text:p>
      <text:p text:style-name="P16">Since undead are powered by negative energy, this spell deals damage to them instead of curing their wounds. </text:p>
      <text:p text:style-name="P13"/>
      <text:p text:style-name="P3">Detect Evil (Divine/Arcane)</text:p>
      <text:p text:style-name="Standard"><text:span text:style-name="T6">Power:</text:span><text:span text:style-name="T4"> 10</text:span></text:p>
      <text:p text:style-name="Standard"><text:span text:style-name="T6">Range:</text:span><text:span text:style-name="T4"> 60 ft.</text:span></text:p>
      <text:p text:style-name="Standard"><text:span text:style-name="T6">Area:</text:span><text:span text:style-name="T4"> Cone-shaped emanation</text:span></text:p>
      <text:p text:style-name="Standard"><text:span text:style-name="T6">Duration:</text:span><text:span text:style-name="T4"> Concentration, up to 10 min + 10min/10 points of margin of success</text:span></text:p>
      <text:p text:style-name="P8"/>
      <text:p text:style-name="P13">You can sense the presence of Dark Mana and creatures corrupted by it (with 10 Corruption points or more). You also get a general idea of the concentration of Dark Mana in each creature you detect (i.e. their CP value). Each round, you can turn to detect evil in a new area. The spell can penetrate barriers, but 1 foot of stone, 1 inch of common metal, a thin sheet of lead, or 3 feet of wood or dirt blocks it.</text:p>
      <text:p text:style-name="P13"/>
      <text:p text:style-name="P3">Detect Magic (Divine/Arcane)</text:p>
      <text:p text:style-name="Standard"><text:span text:style-name="T6">Power:</text:span><text:span text:style-name="T4"> 10</text:span></text:p>
      <text:p text:style-name="Standard"><text:span text:style-name="T6">Range:</text:span><text:span text:style-name="T4"> 60 ft.</text:span></text:p>
      <text:p text:style-name="Standard"><text:span text:style-name="T6">Area:</text:span><text:span text:style-name="T4"> Cone-shaped emanation</text:span></text:p>
      <text:p text:style-name="Standard"><text:span text:style-name="T6">Duration:</text:span><text:span text:style-name="T4"> Concentration, up to 10 min + 10min/10 points of margin of success</text:span></text:p>
      <text:p text:style-name="P8"/>
      <text:p text:style-name="P16">You detect magical auras. The amount of information revealed depends on how long you study a particular area or subject.</text:p>
      <text:p text:style-name="Standard"><text:span text:style-name="T3">1st Round: </text:span><text:span text:style-name="T5">Presence or absence of magical auras.</text:span></text:p>
      <text:p text:style-name="Standard"><text:span text:style-name="T3">2nd Round: </text:span><text:span text:style-name="T5">Number of different magical auras and the power of the most potent aura.</text:span></text:p>
      <text:p text:style-name="Standard"><text:span text:style-name="T3">3rd Round: </text:span><text:span text:style-name="T5">The strength and location of each aura</text:span></text:p>
      <text:p text:style-name="P29"/>
      <text:p text:style-name="P3">Disguise Self (Arcane)</text:p>
      <text:p text:style-name="Standard"><text:span text:style-name="T6">Power:</text:span><text:span text:style-name="T4"> 10</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0 min + 10min/10 points of margin of success</text:span></text:p>
      <text:p text:style-name="P13"><text:soft-page-break/></text:p>
      <text:p text:style-name="P13">You make yourself—including clothing, armor, weapons, and equipment—look different. You can seem 1 foot shorter or taller, thin, fat, or in between. You cannot change your body type. Otherwise, the extent of the apparent change is up to you. You could add or obscure a minor feature or look like an entirely different person.</text:p>
      <text:p text:style-name="Standard"><text:span text:style-name="T4">The spell does not provide the abilities or mannerisms of the chosen form, nor does it alter the perceived tactile (touch) or audible (sound) properties of you or your equipment. </text:span><text:span text:style-name="T11"><text:s/></text:span><text:span text:style-name="T4">If you use this spell to create a disguise, you get a +50 bonus to any test involving it.</text:span></text:p>
      <text:p text:style-name="P13"/>
      <text:p text:style-name="P3">Endure Elements (Divine)</text:p>
      <text:p text:style-name="Standard"><text:span text:style-name="T6">Power:</text:span><text:span text:style-name="T4"> 10</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24 hours</text:span></text:p>
      <text:p text:style-name="P8"/>
      <text:p text:style-name="Standard"><text:span text:style-name="T4">A creature protected by </text:span><text:span text:style-name="T2">endure elements </text:span><text:span text:style-name="T4">suffers no harm from being in a hot or cold environment. It can exist comfortably in conditions between –50 and 140 degrees Fahrenheit without having to make Physical RRs). The creature’s equipment is likewise protected.</text:span></text:p>
      <text:p text:style-name="Standard"><text:span text:style-name="T2">Endure elements </text:span><text:span text:style-name="T4">doesn’t provide any protection from fire or cold damage, nor does it protect against other environmental hazards such as smoke, lack of air, and so forth.</text:span></text:p>
      <text:p text:style-name="P13"/>
      <text:p text:style-name="P3">Entangle (Divine)</text:p>
      <text:p text:style-name="Standard"><text:span text:style-name="T6">Power:</text:span><text:span text:style-name="T4"> 10</text:span></text:p>
      <text:p text:style-name="Standard"><text:span text:style-name="T6">Casting Time:</text:span><text:span text:style-name="T4"> 1 standard action</text:span></text:p>
      <text:p text:style-name="Standard"><text:span text:style-name="T6">Range:</text:span><text:span text:style-name="T4"> Long (400 ft. + 40 ft./10 points of margin of success)</text:span></text:p>
      <text:p text:style-name="Standard"><text:span text:style-name="T6">Area:</text:span><text:span text:style-name="T4"> Plants in a 40-ft.-radius spread</text:span></text:p>
      <text:p text:style-name="Standard"><text:span text:style-name="T6">Duration:</text:span><text:span text:style-name="T4"> 1 min. +1min/10 points of margin of success</text:span></text:p>
      <text:p text:style-name="P8"/>
      <text:p text:style-name="P13">Grasses, weeds, bushes, and even trees wrap, twist, and entwine about creatures in the area or those that enter the area, holding them fast and causing them to become entangled. The creature can break free and move half its normal speed by using a full-round action to make a DC 100 Acrobatic check. A creature that succeeds on a Magic RR is not entangled but can still move at only half speed through the area. Each round on your turn, the plants once again attempt to entangle all creatures that have avoided or escaped entanglement.</text:p>
      <text:p text:style-name="P13"/>
      <text:p text:style-name="P3">Feather Fall (Arcane)</text:p>
      <text:p text:style-name="Standard"><text:span text:style-name="T6">Power:</text:span><text:span text:style-name="T4"> 10</text:span></text:p>
      <text:p text:style-name="Standard"><text:span text:style-name="T6">Range:</text:span><text:span text:style-name="T4"> Close (25 ft. + 5 ft./20 points of margin of success)</text:span></text:p>
      <text:p text:style-name="Standard"><text:span text:style-name="T6">Targets:</text:span><text:span text:style-name="T4"> One Medium or smaller freefalling object or creature/ 10 points of margin of success, no two of which may be more than 20 ft. apart</text:span></text:p>
      <text:p text:style-name="Standard"><text:span text:style-name="T6">Duration:</text:span><text:span text:style-name="T4"> Until landing or 1 round +1rnd/10 points of margin of success</text:span></text:p>
      <text:p text:style-name="P8"/>
      <text:p text:style-name="Standard"><text:span text:style-name="T4">The affected creatures or objects fall slowly. </text:span><text:span text:style-name="T2">Feather fall </text:span><text:span text:style-name="T4">instantly changes the rate at which the targets fall to a mere 60 feet per round (equivalent to the end of a fall from a few feet), and the subjects take no damage upon landing while the spell is in effect. However, when the spell duration expires, a normal rate of falling resumes.</text:span></text:p>
      <text:p text:style-name="P13">The spell affects one or more Medium or smaller creatures (including gear and carried objects up to each creature’s maximum load) or objects, or the equivalent in larger creatures: A Large creature or object counts as two Medium creatures or objects, a Huge creature or object counts as two Large creatures or objects, and so forth.</text:p>
      <text:p text:style-name="P13">You can cast this spell with an instant utterance, quickly enough to save yourself if you unexpectedly fall. Casting the spell is a free action, like casting a quickened spell, and it counts toward the normal limit of one quickened spell per round. You may even cast this spell when it isn’t your turn.</text:p>
      <text:p text:style-name="P29"/>
      <text:p text:style-name="P3">Flare (Arcane)</text:p>
      <text:p text:style-name="Standard"><text:span text:style-name="T6">Power:</text:span><text:span text:style-name="T4"> 10</text:span></text:p>
      <text:p text:style-name="Standard"><text:span text:style-name="T6">Range:</text:span><text:span text:style-name="T4"> Close (25 ft. + 5 ft./20 points of margin of success )</text:span></text:p>
      <text:p text:style-name="Standard"><text:span text:style-name="T6">Effect:</text:span><text:span text:style-name="T4"> Burst of light</text:span></text:p>
      <text:p text:style-name="Standard"><text:span text:style-name="T6">Duration:</text:span><text:span text:style-name="T4"> Instantaneous</text:span></text:p>
      <text:p text:style-name="P8"/>
      <text:p text:style-name="Standard"><text:span text:style-name="T4">This spell creates a burst of light. If you cause the light to burst directly in front of a single creature, that creature is stunned </text:span><text:soft-page-break/><text:span text:style-name="T4">for 1 rnd/ 10 points of margin of success unless it makes a successful Physical RR. Sightless creatures are not affected by </text:span><text:span text:style-name="T2">flare</text:span><text:span text:style-name="T4">.</text:span></text:p>
      <text:p text:style-name="P13"/>
      <text:p text:style-name="P3">Ghost Sound (Arcane)</text:p>
      <text:p text:style-name="Standard"><text:span text:style-name="T6">Power:</text:span><text:span text:style-name="T4"> 10</text:span></text:p>
      <text:p text:style-name="Standard"><text:span text:style-name="T6">Range:</text:span><text:span text:style-name="T4"> Close (25 ft. + 5 ft./20 points of margin of success)</text:span></text:p>
      <text:p text:style-name="Standard"><text:span text:style-name="T6">Effect:</text:span><text:span text:style-name="T4"> Illusory sounds</text:span></text:p>
      <text:p text:style-name="Standard"><text:span text:style-name="T6">Duration:</text:span><text:span text:style-name="T4"> 1 round + 1rnd/10 points of margin of success</text:span></text:p>
      <text:p text:style-name="P8"/>
      <text:p text:style-name="Standard"><text:span text:style-name="T2">Ghost sound </text:span><text:span text:style-name="T4">allows you to create a volume of sound that rises, recedes, approaches, or remains at a fixed place. You choose what type of sound </text:span><text:span text:style-name="T2">ghost sound </text:span><text:span text:style-name="T4">creates when casting it and cannot thereafter change the sound’s basic character.</text:span></text:p>
      <text:p text:style-name="Standard"><text:span text:style-name="T4">The volume of sound created depends on your level. You can produce as much noise as four normal humans 10 points of margin of success</text:span><text:span text:style-name="T24"> </text:span><text:span text:style-name="T4">(maximum twenty humans). Thus, talking, singing, shouting, walking, marching, or running sounds can be created. The noise a </text:span><text:span text:style-name="T2">ghost sound </text:span><text:span text:style-name="T4">spell produces can be virtually any type of sound within the volume limit. A horde of rats running and squeaking is about the same volume as eight humans running and shouting. A roaring lion is equal to the noise from sixteen humans, while a roaring dire tiger is equal to the noise from twenty humans.</text:span></text:p>
      <text:p text:style-name="Standard"><text:span text:style-name="T2">Ghost sound </text:span><text:span text:style-name="T4">can enhance the effectiveness of a </text:span><text:span text:style-name="T2">silent image </text:span><text:span text:style-name="T4">spell.</text:span></text:p>
      <text:p text:style-name="P13"/>
      <text:p text:style-name="P3">Inflict Wounds (Divine)</text:p>
      <text:p text:style-name="Standard"><text:span text:style-name="T7">Power:</text:span><text:span text:style-name="T5"> 10</text:span></text:p>
      <text:p text:style-name="Standard"><text:span text:style-name="T7">Range:</text:span><text:span text:style-name="T5"> Touch</text:span></text:p>
      <text:p text:style-name="Standard"><text:span text:style-name="T7">Target:</text:span><text:span text:style-name="T5"> Creature touched</text:span></text:p>
      <text:p text:style-name="Standard"><text:span text:style-name="T7">Duration:</text:span><text:span text:style-name="T5"> Instantaneous</text:span></text:p>
      <text:p text:style-name="P12"/>
      <text:p text:style-name="Standard"><text:span text:style-name="T5">When laying your hand upon a living creature, you channel negative energy that deals 1d8+1 points of damage to a single location, +1d8+1/30</text:span><text:span text:style-name="T4"> points of margin of success</text:span><text:span text:style-name="T5"> (up to a maximum of 4d8+4).</text:span></text:p>
      <text:p text:style-name="P16">Since undead are powered by negative energy, this spell cure them (as a cure wounds spell) instead of dealing them damage.</text:p>
      <text:p text:style-name="P13"/>
      <text:p text:style-name="P3">Jump (Arcane)</text:p>
      <text:p text:style-name="Standard"><text:span text:style-name="T6">Power:</text:span><text:span text:style-name="T4"> 10</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min. +1min/10 points of margin of success</text:span></text:p>
      <text:p text:style-name="P8"/>
      <text:p text:style-name="P13">The subject gets a +50 enhancement bonus on Acrobatic checks that involve jumping.</text:p>
      <text:p text:style-name="P13"/>
      <text:p text:style-name="P3">Light (Arcane)</text:p>
      <text:p text:style-name="Standard"><text:span text:style-name="T6">Power:</text:span><text:span text:style-name="T4"> 10</text:span></text:p>
      <text:p text:style-name="Standard"><text:span text:style-name="T6">Range:</text:span><text:span text:style-name="T4"> Touch</text:span></text:p>
      <text:p text:style-name="Standard"><text:span text:style-name="T6">Target:</text:span><text:span text:style-name="T4"> Object touched</text:span></text:p>
      <text:p text:style-name="Standard"><text:span text:style-name="T6">Duration:</text:span><text:span text:style-name="T4"> 10 min. +10min/10 points of margin of success</text:span></text:p>
      <text:p text:style-name="P8"/>
      <text:p text:style-name="P13">This spell causes an object to glow like a torch, shedding bright light in a 20-foot radius (and dim light for an additional 20 feet) from the point you touch. The effect is immobile, but it can be cast on a movable object. </text:p>
      <text:p text:style-name="P5"/>
      <text:p text:style-name="P3">Mage Armor (Arcane)</text:p>
      <text:p text:style-name="Standard"><text:span text:style-name="T6">Power:</text:span><text:span text:style-name="T4"> 10</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hour +1hr/10 points of margin of success</text:span></text:p>
      <text:p text:style-name="P8"/>
      <text:p text:style-name="Standard"><text:span text:style-name="T4">An invisible but tangible field of force surrounds the subject of a </text:span><text:span text:style-name="T2">mage armor </text:span><text:span text:style-name="T4">spell, providing an armor DR of B6/M5/S4.</text:span></text:p>
      <text:p text:style-name="Standard"><text:span text:style-name="T4">Unlike mundane armor, </text:span><text:span text:style-name="T2">mage armor </text:span><text:span text:style-name="T4">entails no penalties. Since </text:span><text:span text:style-name="T2">mage armor </text:span><text:span text:style-name="T4">is made of force, incorporeal creatures can’t bypass it the way they do normal armor. </text:span><text:span text:style-name="T2">Mage armor</text:span><text:span text:style-name="T4"> cannot be combined with a mundane armor.</text:span></text:p>
      <text:p text:style-name="P13"/>
      <text:p text:style-name="P3">Mage Hand (Arcane)</text:p>
      <text:p text:style-name="Standard"><text:span text:style-name="T6">Power:</text:span><text:span text:style-name="T4"> 10</text:span></text:p>
      <text:p text:style-name="Standard"><text:soft-page-break/><text:span text:style-name="T6">Range:</text:span><text:span text:style-name="T4"> Close (25 ft. + 5 ft./10 points of margin of success)</text:span></text:p>
      <text:p text:style-name="Standard"><text:span text:style-name="T6">Target:</text:span><text:span text:style-name="T4"> One nonmagical, unattended object weighing up to 5 lb.</text:span></text:p>
      <text:p text:style-name="Standard"><text:span text:style-name="T6">Duration:</text:span><text:span text:style-name="T4"> Concentration</text:span></text:p>
      <text:p text:style-name="P8"/>
      <text:p text:style-name="P13">You point your finger at an object and can lift it and move it at will from a distance. As a move action, you can propel the object as far as 15 feet in any direction, though the spell ends if the distance between you and the object ever exceeds the spell’s range.</text:p>
      <text:p text:style-name="P13"/>
      <text:p text:style-name="P3">Magic Missile (Arcane)</text:p>
      <text:p text:style-name="Standard"><text:span text:style-name="T6">Power:</text:span><text:span text:style-name="T4"> 10</text:span></text:p>
      <text:p text:style-name="Standard"><text:span text:style-name="T6">Range: </text:span><text:span text:style-name="T4">Medium (100 ft. + 10 ft./10 points of margin of success)</text:span></text:p>
      <text:p text:style-name="Standard"><text:span text:style-name="T6">Targets:</text:span><text:span text:style-name="T4"> Up to five creatures, no two of which can be more than 15 ft. apart</text:span></text:p>
      <text:p text:style-name="Standard"><text:span text:style-name="T6">Duration:</text:span><text:span text:style-name="T4"> Instantaneous</text:span></text:p>
      <text:p text:style-name="P8"/>
      <text:p text:style-name="P13">A missile of magical energy darts forth from your fingertip and strikes its target, dealing 1d4+1 points of force damage to single Big or Medium location (no attack roll is needed, and the target doesn’t get any RR, but you still need to cast the spell successfully). The missile strikes unerringly, even if the target is in melee combat or has less than total cover or total concealment. Inanimate objects are not damaged by the spell. Armor applies normally.</text:p>
      <text:p text:style-name="P13">For every 30 points of margin of success, you gain an additional missile, up to a maximum of five missiles. If you shoot multiple missiles, you can have them strike a single creature or several creatures. A single missile can strike only one creature. </text:p>
      <text:p text:style-name="P13"/>
      <text:p text:style-name="P3">Magic Mouth (Arcane)</text:p>
      <text:p text:style-name="Standard"><text:span text:style-name="T6">Power:</text:span><text:span text:style-name="T4"> 10</text:span></text:p>
      <text:p text:style-name="Standard"><text:span text:style-name="T6">Range:</text:span><text:span text:style-name="T4"> Close (25 ft. + 5 ft./2 10 points of margin of success)</text:span></text:p>
      <text:p text:style-name="Standard"><text:span text:style-name="T6">Target:</text:span><text:span text:style-name="T4"> One creature or object</text:span></text:p>
      <text:p text:style-name="Standard"><text:span text:style-name="T6">Duration:</text:span><text:span text:style-name="T4"> Permanent until discharged</text:span></text:p>
      <text:p text:style-name="P8"/>
      <text:p text:style-name="Standard"><text:span text:style-name="T4">This spell imbues the chosen object or creature with an enchanted mouth that suddenly appears and speaks its message the next time a specified event occurs. The message, which must be twenty-five or fewer words long, can be in any language known by you and can be delivered over a period of 10 minutes. The mouth cannot utter verbal components, use command words, or activate magical effects. It does, however, move according to the words articulated; if it were placed upon a statue, the mouth of the statue would move and appear to speak. Of course, </text:span><text:span text:style-name="T2">magic mouth </text:span><text:span text:style-name="T4">can be placed upon a tree, rock, or any other object or creature.</text:span></text:p>
      <text:p text:style-name="Standard"><text:span text:style-name="T4">The spell functions when specific conditions are fulfilled according to your command as set in the spell. Commands can be as general or as detailed as desired, although only visual and audible triggers can be used. Triggers react to what appears to be the case. Disguises and illusions can fool them. Normal darkness does not defeat a visual trigger, but magical </text:span><text:span text:style-name="T2">darkness </text:span><text:span text:style-name="T4">or </text:span><text:span text:style-name="T2">invisibility </text:span><text:span text:style-name="T4">does. Silent movement or magical </text:span><text:span text:style-name="T2">silence </text:span><text:span text:style-name="T4">defeats audible triggers. Audible triggers can be keyed to general types of noises or to a specific noise or spoken word. Actions can serve as triggers if they are visible or audible </text:span></text:p>
      <text:p text:style-name="P13">The range limit of a trigger is 15 feet, +15/10 points of margin of success and regardless of range, the mouth can respond only to visible or audible triggers and actions in line of sight or within hearing distance.</text:p>
      <text:p text:style-name="P13"/>
      <text:p text:style-name="P3">Magic Weapon (Arcane)</text:p>
      <text:p text:style-name="Standard"><text:span text:style-name="T6">Power:</text:span><text:span text:style-name="T4"> 10</text:span></text:p>
      <text:p text:style-name="Standard"><text:span text:style-name="T6">Range:</text:span><text:span text:style-name="T4"> Touch</text:span></text:p>
      <text:p text:style-name="Standard"><text:span text:style-name="T6">Target: </text:span><text:span text:style-name="T4">Weapon touched</text:span></text:p>
      <text:p text:style-name="Standard"><text:span text:style-name="T6">Duration:</text:span><text:span text:style-name="T4"> 1 min. +1min/10 points of margin of success</text:span></text:p>
      <text:p text:style-name="P8"/>
      <text:p text:style-name="Standard"><text:span text:style-name="T2">Magic weapon </text:span><text:span text:style-name="T4">gives a weapon a +10 enhancement bonus on attack and a +1 enchantment bonus on damage rolls.</text:span></text:p>
      <text:p text:style-name="P13"/>
      <text:p text:style-name="P3">Mirror Image (Arcane)</text:p>
      <text:p text:style-name="Standard"><text:span text:style-name="T6">Power:</text:span><text:span text:style-name="T4"> 10</text:span></text:p>
      <text:p text:style-name="Standard"><text:span text:style-name="T6">Range:</text:span><text:span text:style-name="T4"> Personal; see text</text:span></text:p>
      <text:p text:style-name="Standard"><text:span text:style-name="T6">Target:</text:span><text:span text:style-name="T4"> You</text:span></text:p>
      <text:p text:style-name="Standard"><text:span text:style-name="T6">Duration:</text:span><text:span text:style-name="T4"> 1 min. +1min/10 points of margin of success</text:span></text:p>
      <text:p text:style-name="P13"/>
      <text:p text:style-name="P13">Several illusory duplicates of you pop into being, making it difficult for enemies to know which target to attack. The <text:soft-page-break/>figments stay near you and disappear when struck.</text:p>
      <text:p text:style-name="Standard"><text:span text:style-name="T2">Mirror image </text:span><text:span text:style-name="T4">creates 1d4 images plus one image, plus 1d4 per 30 points of margin of success (maximum eight images total). These figments separate from you and remain in a cluster, each within 5 feet of at least one other figment or you. You can move into and through a </text:span><text:span text:style-name="T2">mirror image. </text:span><text:span text:style-name="T4">When you and the </text:span><text:span text:style-name="T2">mirror image </text:span><text:span text:style-name="T4">separate, observers can’t use vision or hearing to tell which one is you and which the image. The figments may also move through each other. The figments mimic your actions, pretending to cast spells when you cast a spell, drink potions when you drink a potion, levitate when you levitate, and so on.</text:span></text:p>
      <text:p text:style-name="Standard"><text:span text:style-name="T4">Enemies attempting to attack you or cast spells at you must select from among indistinguishable targets. Generally, roll randomly to see whether the selected target is real or a figment. Any successful attack against an image destroys it. An image is hit with an attack roll of 50 or more. Figments seem to react normally to area spells (such as looking like they’re burned or dead after being hit by a </text:span><text:span text:style-name="T2">fireball</text:span><text:span text:style-name="T4">).</text:span></text:p>
      <text:p text:style-name="P13">While moving, you can merge with and split off from figments so that enemies who have learned which image is real are again confounded.</text:p>
      <text:p text:style-name="P13">An attacker must be able to see the images to be fooled. If you are invisible or an attacker shuts his or her eyes, the spell has no effect. (Being unable to see carries the same penalties as being blinded.)</text:p>
      <text:p text:style-name="P13"/>
      <text:p text:style-name="P3">Pass without Trace (Divine)</text:p>
      <text:p text:style-name="Standard"><text:span text:style-name="T6">Power:</text:span><text:span text:style-name="T4"> 10</text:span></text:p>
      <text:p text:style-name="Standard"><text:span text:style-name="T6">Range:</text:span><text:span text:style-name="T4"> Touch</text:span></text:p>
      <text:p text:style-name="Standard"><text:span text:style-name="T6">Targets:</text:span><text:span text:style-name="T4"> One creature +1/10 points of margin of success touched</text:span></text:p>
      <text:p text:style-name="Standard"><text:span text:style-name="T6">Duration:</text:span><text:span text:style-name="T4"> 1 hour +1hr/10 points of margin of success</text:span></text:p>
      <text:p text:style-name="P8"/>
      <text:p text:style-name="P13">The subject or subjects can move through any type of terrain and leave neither footprints nor scent. Tracking the subjects is impossible by nonmagical means.</text:p>
      <text:p text:style-name="P13"/>
      <text:p text:style-name="P3">Protection from Evil (Divine)</text:p>
      <text:p text:style-name="Standard"><text:span text:style-name="T6">Power:</text:span><text:span text:style-name="T4"> 10</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min. +1min/10 points of margin of success</text:span></text:p>
      <text:p text:style-name="P8"/>
      <text:p text:style-name="P13">This spell wards a creature from attacks by corrupted creatures (i.e. with 10 PCs or more), from mental control, and from summoned creatures. It creates a magical barrier around the subject at a distance of 1 foot. The barrier moves with the subject and has three major effects.</text:p>
      <text:p text:style-name="P13">First, the subject gains a +10 deflection bonus to all his parry rolls and a +10 resistance bonus on all RRs. Both these bonuses apply against attacks made or effects created by corrupted creatures.</text:p>
      <text:p text:style-name="Standard"><text:span text:style-name="T4">Second, the barrier blocks any attempt to possess the warded creature (by a </text:span><text:span text:style-name="T2">magic jar </text:span><text:span text:style-name="T4">attack, for example) or to exercise mental control over the creature (including enchantment (charm) effects and enchantment (compulsion) effects that grant the caster ongoing control over the subject, such as </text:span><text:span text:style-name="T2">dominate person</text:span><text:span text:style-name="T4">). The protection does not prevent such effects from targeting the protected creature, but it suppresses the effect for the duration of the </text:span><text:span text:style-name="T2">protection from evil </text:span><text:span text:style-name="T4">effect. If the </text:span><text:span text:style-name="T2">protection from evil </text:span><text:span text:style-name="T4">effect ends before the effect granting mental control does, the would-be controller would then be able to mentally command the controlled creature. Likewise, the barrier keeps out a possessing life force but does not expel one if it is in place before the spell is cast.</text:span></text:p>
      <text:p text:style-name="P13">Third, the spell prevents bodily contact by summoned creatures. This causes the natural weapon attacks of such creatures to fail and the creatures to recoil if such attacks require touching the warded creature. Good summoned creatures are immune to this effect. The protection against contact by summoned creatures ends if the warded creature makes an attack against or tries to force the barrier against the blocked creature. Spell resistance can allow a creature to overcome this protection and touch the warded creature.</text:p>
      <text:p text:style-name="P13"/>
      <text:p text:style-name="P3">Purify Food and Drink (Divine)</text:p>
      <text:p text:style-name="Standard"><text:span text:style-name="T6">Power:</text:span><text:span text:style-name="T4"> 10</text:span></text:p>
      <text:p text:style-name="Standard"><text:span text:style-name="T6">Range:</text:span><text:span text:style-name="T4"> 10 ft.</text:span></text:p>
      <text:p text:style-name="Standard"><text:span text:style-name="T6">Target:</text:span><text:span text:style-name="T4"> 1 cu. ft. +10cuft./ 10 points of margin of success of contaminated food and water</text:span></text:p>
      <text:p text:style-name="Standard"><text:span text:style-name="T6">Duration:</text:span><text:span text:style-name="T4"> Instantaneous</text:span></text:p>
      <text:p text:style-name="P8"/>
      <text:p text:style-name="Standard"><text:span text:style-name="T4">This spell makes spoiled, rotten, poisonous, or otherwise contaminated food and water pure and suitable for eating and drinking. This spell does not prevent subsequent natural decay or spoilage. Unholy water and similar food and drink of </text:span><text:span text:style-name="T4">significance is spoiled by </text:span><text:span text:style-name="T2">purify food and drink, </text:span><text:span text:style-name="T4">but the spell has no effect on creatures of any type nor upon magic potions.</text:span></text:p>
      <text:p text:style-name="Standard"><text:soft-page-break/><text:span text:style-name="T2">Note: </text:span><text:span text:style-name="T4">Water weighs about 8 pounds per gallon. One cubic foot of water contains roughly 8 gallons and weighs about 60 pounds.</text:span></text:p>
      <text:p text:style-name="P13"/>
      <text:p text:style-name="P40">Sanctuary (Divine)</text:p>
      <text:p text:style-name="P42"><text:span text:style-name="T31">Power:</text:span><text:span text:style-name="T30"> 10</text:span></text:p>
      <text:p text:style-name="P42"><text:span text:style-name="T31">Range:</text:span><text:span text:style-name="T30"> Touch</text:span></text:p>
      <text:p text:style-name="P42"><text:span text:style-name="T31">Target:</text:span><text:span text:style-name="T30"> Creature touched</text:span></text:p>
      <text:p text:style-name="P42"><text:span text:style-name="T31">Duration:</text:span><text:span text:style-name="T30"> 1 round +1rnd/10 points of margin of success</text:span></text:p>
      <text:p text:style-name="P15"/>
      <text:p text:style-name="P15">Any opponent attempting to strike or otherwise directly attack the warded creature, even with a targeted spell, must attempt a Mental RR. If the RR succeeds, the opponent can attack normally and is unaffected by that casting of the spell. If the save fails, the opponent can’t follow through with the attack, that part of its action is lost, and it can’t directly attack the warded creature for the duration of the spell. Those not attempting to attack the subject remain unaffected. This spell does not prevent the warded creature from being attacked or affected by area or effect spells. The subject cannot attack without breaking the spell but may use nonattack spells or otherwise act.</text:p>
      <text:p text:style-name="P13"/>
      <text:p text:style-name="P3">Shield (Divine/Arcane)</text:p>
      <text:p text:style-name="Standard"><text:span text:style-name="T6">Power:</text:span><text:span text:style-name="T4"> 10</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 min. +1min/10 points of margin of success</text:span></text:p>
      <text:p text:style-name="P13"/>
      <text:p text:style-name="Standard"><text:span text:style-name="T2">Shield </text:span><text:span text:style-name="T4">creates an invisible, tower shield-sized mobile disk of force that hovers in front of you. It negates </text:span><text:span text:style-name="T2">magic missile </text:span><text:span text:style-name="T4">attacks directed at you. You can also Block attacks with this disk, using your Directed Spells skill bonus with a special +20 modifier. This bonus applies against incorporeal touch attacks, since it is a force effect. Unlike with a normal tower shield, you can’t use the </text:span><text:span text:style-name="T2">shield </text:span><text:span text:style-name="T4">spell for cover. The Shield has a DR of 8 and 80hps.</text:span></text:p>
      <text:p text:style-name="P13"/>
      <text:p text:style-name="P3">Silence (Divine/Arcane)</text:p>
      <text:p text:style-name="Standard"><text:span text:style-name="T6">Power:</text:span><text:span text:style-name="T4"> 10</text:span></text:p>
      <text:p text:style-name="Standard"><text:span text:style-name="T6">Range:</text:span><text:span text:style-name="T4"> Long (400 ft. + 40 ft./10 points of margin of success)</text:span></text:p>
      <text:p text:style-name="Standard"><text:span text:style-name="T6">Area:</text:span><text:span text:style-name="T4"> 20-ft.-radius emanation centered on a creature, object, or point in space</text:span></text:p>
      <text:p text:style-name="Standard"><text:span text:style-name="T6">Duration:</text:span><text:span text:style-name="T4"> 1 min. +1min/10 points of margin of success</text:span></text:p>
      <text:p text:style-name="P8"/>
      <text:p text:style-name="P13">Upon the casting of this spell, complete silence prevails in the affected area. All sound is stopped: Conversation is impossible, spells with verbal components cannot be cast, and no noise whatsoever issues from, enters, or passes through the area. The spell can be cast on a point in space, but the effect is stationary unless cast on a mobile object. The spell can be centered on a creature, and the effect then radiates from the creature and moves as it moves. An unwilling creature can attempt a Will save to negate the spell and can use spell resistance, if any. Items in a creature’s possession or magic items that emit sound receive the benefits of saves and spell resistance, but unattended objects and points in space do not. This spell provides a defense against sonic or language-based attacks.</text:p>
      <text:p text:style-name="P13"/>
      <text:p text:style-name="P3">Silent Image (Arcane)</text:p>
      <text:p text:style-name="Standard"><text:span text:style-name="T6">Power:</text:span><text:span text:style-name="T4"> 10</text:span></text:p>
      <text:p text:style-name="Standard"><text:span text:style-name="T6">Range:</text:span><text:span text:style-name="T4"> Long (400 ft. + 40 ft./ 10 points of margin of success)</text:span></text:p>
      <text:p text:style-name="Standard"><text:span text:style-name="T6">Effect:</text:span><text:span text:style-name="T4"> Visual figment that cannot extend beyond four 10-ft. cubes + one 10-ft. cube/10 points of margin of success</text:span></text:p>
      <text:p text:style-name="Standard"><text:span text:style-name="T6">Duration:</text:span><text:span text:style-name="T4"> Concentration</text:span></text:p>
      <text:p text:style-name="P8"/>
      <text:p text:style-name="P13">This spell creates the visual illusion of an object, creature, or force, as visualized by you. The illusion does not create sound, smell, texture, or temperature. You can move the image within the limits of the size of the effect.</text:p>
      <text:p text:style-name="P13"/>
      <text:p text:style-name="P3">Sleep (Arcane)</text:p>
      <text:p text:style-name="Standard"><text:span text:style-name="T6">Power:</text:span><text:span text:style-name="T4"> 10</text:span></text:p>
      <text:p text:style-name="Standard"><text:span text:style-name="T6">Range: </text:span><text:span text:style-name="T4">Medium (100 ft. + 10 ft./10 points of margin of success)</text:span></text:p>
      <text:p text:style-name="Standard"><text:span text:style-name="T6">Area:</text:span><text:span text:style-name="T4"> One or more living creatures within a 10-ft.-radius burst</text:span></text:p>
      <text:p text:style-name="Standard"><text:span text:style-name="T6">Duration:</text:span><text:span text:style-name="T4"> 1 min. +1min/10 points of margin of success</text:span></text:p>
      <text:p text:style-name="P8"/>
      <text:p text:style-name="Standard"><text:span text:style-name="T4">A </text:span><text:span text:style-name="T2">sleep </text:span><text:span text:style-name="T4">spell causes a magical slumber to come upon 4 levels of creatures. Creatures of lower level are affected first.</text:span></text:p>
      <text:p text:style-name="P13"><text:soft-page-break/>Levels that are not sufficient to affect a creature are wasted.</text:p>
      <text:p text:style-name="P13">Sleeping creatures are helpless. Slapping or wounding awakens an affected creature, but normal noise does not. Awakening a creature is a standard action (an application of the aid another action).</text:p>
      <text:p text:style-name="Standard"><text:span text:style-name="T2">Sleep </text:span><text:span text:style-name="T4">does not target unconscious creatures, constructs, or undead creatures.</text:span></text:p>
      <text:p text:style-name="P13"/>
      <text:p text:style-name="P3">Speak with Animals (Divine)</text:p>
      <text:p text:style-name="Standard"><text:span text:style-name="T6">Power:</text:span><text:span text:style-name="T4"> 10</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 min. +1min/10 points of margin of success</text:span></text:p>
      <text:p text:style-name="P13"/>
      <text:p text:style-name="Standard"><text:span text:style-name="T4">You can comprehend and communicate with animals. You are able to ask questions of and receive answers from animals, although the spell doesn’t make them any more friendly or cooperative than normal. Furthermore, wary and cunning </text:span><text:span text:style-name="T4">animals are likely to be terse and evasive, while the more stupid ones make inane comments. If an animal is friendly toward you, it may do some favor or service for you.</text:span></text:p>
      <text:p text:style-name="P13"/>
      <text:p text:style-name="P3">Unseen Servant (Arcane)</text:p>
      <text:p text:style-name="Standard"><text:span text:style-name="T6">Power:</text:span><text:span text:style-name="T4"> 10</text:span></text:p>
      <text:p text:style-name="Standard"><text:span text:style-name="T6">Range:</text:span><text:span text:style-name="T4"> Close (25 ft. + 5 ft./ 10 points of margin of success)</text:span></text:p>
      <text:p text:style-name="Standard"><text:span text:style-name="T6">Effect:</text:span><text:span text:style-name="T4"> One invisible, mindless, shapeless servant</text:span></text:p>
      <text:p text:style-name="Standard"><text:span text:style-name="T6">Duration:</text:span><text:span text:style-name="T4"> 1 hour +1hr/10 points of margin of success</text:span></text:p>
      <text:p text:style-name="P8"/>
      <text:p text:style-name="Standard"><text:span text:style-name="T4">An </text:span><text:span text:style-name="T2">unseen servant </text:span><text:span text:style-name="T4">is an invisible, mindless, shapeless force that performs simple tasks at your command. It can run and fetch things, open unstuck doors, and hold chairs, as well as clean and mend. The servant can perform only one activity at a time, but it repeats the same activity over and over again if told to do so as long as you remain within range. It can open only normal doors, drawers, lids, and the like. It has an effective Strength score of 5. It can trigger traps and such, but it can exert only 20 pounds of force, which is not enough to activate certain pressure plates and other devices. It can’t perform any task that requires a skill check with a DC higher than 50. Its speed is 15 feet.</text:span></text:p>
      <text:p text:style-name="P13">The servant cannot attack in any way; it is never allowed an attack roll. It cannot be killed, but it dissipates if it takes 6 points of damage from area attacks. If you attempt to send it beyond the spell’s range (measured from your current position), the servant ceases to exist.</text:p>
      <text:p text:style-name="P13"/>
      <text:p text:style-name="P3">Web (Arcane)</text:p>
      <text:p text:style-name="Standard"><text:span text:style-name="T6">Power:</text:span><text:span text:style-name="T4"> 10</text:span></text:p>
      <text:p text:style-name="Standard"><text:span text:style-name="T6">Range: </text:span><text:span text:style-name="T4">Medium (100 ft. + 10 ft./ 10 points of margin of success)</text:span></text:p>
      <text:p text:style-name="Standard"><text:span text:style-name="T6">Effect: </text:span><text:span text:style-name="T4">Webs in a 20-ft.-radius spread</text:span></text:p>
      <text:p text:style-name="Standard"><text:span text:style-name="T6">Duration:</text:span><text:span text:style-name="T4"> 10 min. +10 min/10 points of margin of success</text:span></text:p>
      <text:p text:style-name="P8"/>
      <text:p text:style-name="Standard"><text:span text:style-name="T2">Web </text:span><text:span text:style-name="T4">creates a many-layered mass of strong, sticky strands. These strands trap those caught in them. The strands are similar to spider webs but far larger and tougher. These masses must be anchored to two or more solid and diametrically opposed points or else the web collapses upon itself and disappears. Creatures caught within a </text:span><text:span text:style-name="T2">web </text:span><text:span text:style-name="T4">become entangled among the gluey fibers. Attacking a creature in a web won’t cause you to become entangled.</text:span></text:p>
      <text:p text:style-name="P13">Anyone in the effect’s area when the spell is cast must make a Magical RR. If this RR succeeds, the creature is entangled, but not prevented from moving, though it an move only at half its normal speed. </text:p>
      <text:p text:style-name="P13">If the save fails, the creature is entangled and immobilized, but can break loose by spending 1 round and making a DC 100 Athletic check or a DC 150 Acrobatic check.</text:p>
      <text:p text:style-name="Standard"><text:span text:style-name="T4">The strands of a </text:span><text:span text:style-name="T2">web </text:span><text:span text:style-name="T4">spell are flammable, any fire can set the webs alight and burn away 5 square feet in 1 round. All creatures within flaming webs take 2d4 points of fire area damage from the flames.</text:span></text:p>
      <text:p text:style-name="P8"/>
      <text:p text:style-name="P46">Second Order</text:p>
      <text:p text:style-name="P3"/>
      <text:p text:style-name="P3"/>
      <text:p text:style-name="P2">Acid Arrow</text:p>
      <text:p text:style-name="P35"><text:span text:style-name="T13">Power:</text:span><text:span text:style-name="T1"> </text:span><text:span text:style-name="T10">12</text:span></text:p>
      <text:p text:style-name="P35"><text:span text:style-name="T13">Range:</text:span><text:span text:style-name="T1"> </text:span><text:span text:style-name="T10">Long (400 ft)</text:span></text:p>
      <text:p text:style-name="P35"><text:span text:style-name="T13">Effect:</text:span><text:span text:style-name="T1"> </text:span><text:span text:style-name="T10">One arrow of acid</text:span></text:p>
      <text:p text:style-name="P35"><text:span text:style-name="T13">Duration:</text:span><text:span text:style-name="T1"> </text:span><text:span text:style-name="T10">1 round (+ 1 round/20 points of margin of success)</text:span></text:p>
      <text:p text:style-name="P17"/>
      <text:p text:style-name="P35">A magical arrow of acid springs from your hand and speeds to its target. You must succeed on a ranged attack to hit your target. The arrow deals 2d4 points of acid damage with no splash damage. </text:p>
      <text:p text:style-name="P35">For every 20 points of margin of success, the acid lasts for another round (up to a maximum of 6 rnd), dealing another 2d4 points of damage in that round.</text:p>
      <text:p text:style-name="P3"/>
      <text:p text:style-name="P3">Aid (Divine)</text:p>
      <text:p text:style-name="Standard"><text:span text:style-name="T6">Power:</text:span><text:span text:style-name="T4"> 12</text:span></text:p>
      <text:p text:style-name="Standard"><text:span text:style-name="T6">Range:</text:span><text:span text:style-name="T4"> Touch</text:span></text:p>
      <text:p text:style-name="Standard"><text:span text:style-name="T6">Target:</text:span><text:span text:style-name="T4"> Living creature touched</text:span></text:p>
      <text:p text:style-name="Standard"><text:span text:style-name="T6">Duration:</text:span><text:span text:style-name="T4"> 1 min (+1 min/10 points of margin of success)</text:span></text:p>
      <text:p text:style-name="P8"/>
      <text:p text:style-name="Standard"><text:span text:style-name="T2">Aid </text:span><text:span text:style-name="T4">grants the target a +10 bonus on attack rolls and saves against fear effects, plus temporary vitality points equal to 1d8 + 1/10 points of margin of success (to a maximum of 1d8+10).</text:span></text:p>
      <text:p text:style-name="P10"/>
      <text:p text:style-name="P13"/>
      <text:p text:style-name="P3">Arcane Lock (Arcane)</text:p>
      <text:p text:style-name="Standard"><text:span text:style-name="T6">Power:</text:span><text:span text:style-name="T4"> 12</text:span></text:p>
      <text:p text:style-name="Standard"><text:span text:style-name="T6">Range:</text:span><text:span text:style-name="T4"> Touch</text:span></text:p>
      <text:p text:style-name="Standard"><text:span text:style-name="T6">Target:</text:span><text:span text:style-name="T4"> The door, chest, or portal touched</text:span></text:p>
      <text:p text:style-name="Standard"><text:span text:style-name="T6">Duration:</text:span><text:span text:style-name="T4"> Permanent</text:span></text:p>
      <text:p text:style-name="P8"/>
      <text:p text:style-name="Standard"><text:span text:style-name="T4">An </text:span><text:span text:style-name="T2">arcane lock </text:span><text:span text:style-name="T4">spell cast upon a door, chest, or portal magically locks it. You can freely pass your own </text:span><text:span text:style-name="T2">arcane lock </text:span><text:span text:style-name="T4">without affecting it; otherwise, a door or object secured with this spell can be opened only by breaking in or with a successful </text:span><text:span text:style-name="T2">dispel magic </text:span><text:span text:style-name="T4">or </text:span><text:span text:style-name="T2">knock </text:span><text:span text:style-name="T4">spell. Add 50 to the normal DC to break open a door or portal affected by this spell. (A </text:span><text:span text:style-name="T2">knock </text:span><text:span text:style-name="T4">spell does not remove an </text:span><text:span text:style-name="T2">arcane lock; </text:span><text:span text:style-name="T4">it only suppresses the effect for 10 minutes.)</text:span></text:p>
      <text:p text:style-name="P13"/>
      <text:p text:style-name="P3">Augury (Divine)</text:p>
      <text:p text:style-name="Standard"><text:span text:style-name="T6">Power:</text:span><text:span text:style-name="T4"> 12</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Instantaneous</text:span></text:p>
      <text:p text:style-name="P6"/>
      <text:p text:style-name="Standard"><text:span text:style-name="T4">An </text:span><text:span text:style-name="T2">augury </text:span><text:span text:style-name="T4">can tell you whether a particular action will bring good or bad results for you in the immediate future.</text:span></text:p>
      <text:p text:style-name="Standard"><text:span text:style-name="T4">The base chance for receiving a meaningful reply is 70% + 1% per 10 points of margin of success, to a maximum of 90%. <text:s/>A question may be so straightforward that a successful result is automatic, or so vague as to have no chance of success. If the </text:span><text:span text:style-name="T2">augury </text:span><text:span text:style-name="T4">succeeds, you get one of four results:</text:span></text:p>
      <text:p text:style-name="Standard"><text:span text:style-name="T12">• </text:span><text:span text:style-name="T4">Weal (if the action will probably bring good results).</text:span></text:p>
      <text:p text:style-name="Standard"><text:span text:style-name="T12">• </text:span><text:span text:style-name="T4">Woe (for bad results).</text:span></text:p>
      <text:p text:style-name="Standard"><text:span text:style-name="T12">• </text:span><text:span text:style-name="T4">Weal and woe (for both).</text:span></text:p>
      <text:p text:style-name="Standard"><text:span text:style-name="T12">• </text:span><text:span text:style-name="T4">Nothing (for actions that don’t have especially good or bad results).</text:span></text:p>
      <text:p text:style-name="P13">If the spell fails, you get the “nothing” result and you cannot ask the same question again.</text:p>
      <text:p text:style-name="Standard"><text:span text:style-name="T4">The </text:span><text:span text:style-name="T2">augury </text:span><text:span text:style-name="T4">can see into the future only about half an hour, so anything that might happen after that does not affect the result. Thus, the result might not take into account the long-term consequences of a contemplated action. All </text:span><text:span text:style-name="T2">auguries </text:span><text:span text:style-name="T4">cast by the same person about the same topic use the same dice result as the first casting.</text:span></text:p>
      <text:p text:style-name="P13"/>
      <text:p text:style-name="P3"><text:soft-page-break/>Blur (Arcane)</text:p>
      <text:p text:style-name="Standard"><text:span text:style-name="T6">Power:</text:span><text:span text:style-name="T4"> 12</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min + 1min/10 points of margin of success</text:span></text:p>
      <text:p text:style-name="P8"/>
      <text:p text:style-name="P13">The subject’s outline appears blurred, shifting and wavering. This distortion grants the subject concealment (20% miss chance).</text:p>
      <text:p text:style-name="Standard"><text:span text:style-name="T4">A </text:span><text:span text:style-name="T2">see invisibility </text:span><text:span text:style-name="T4">spell does not counteract the </text:span><text:span text:style-name="T2">blur </text:span><text:span text:style-name="T4">effect, but a </text:span><text:span text:style-name="T2">true seeing </text:span><text:span text:style-name="T4">spell does.</text:span></text:p>
      <text:p text:style-name="P13">Opponents that cannot see the subject ignore the spell’s effect (though fighting an unseen opponent carries penalties of its own).</text:p>
      <text:p text:style-name="P5"/>
      <text:p text:style-name="P3">Calm Emotions (Divine)</text:p>
      <text:p text:style-name="Standard"><text:span text:style-name="T6">Power:</text:span><text:span text:style-name="T4"> 12</text:span></text:p>
      <text:p text:style-name="Standard"><text:span text:style-name="T6">Range: </text:span><text:span text:style-name="T4">Medium (100 ft. + 10 ft./10 points of margin of success)</text:span></text:p>
      <text:p text:style-name="Standard"><text:span text:style-name="T6">Area:</text:span><text:span text:style-name="T4"> Creatures in a 20-ft.-radius spread</text:span></text:p>
      <text:p text:style-name="Standard"><text:span text:style-name="T6">Duration:</text:span><text:span text:style-name="T4"> Concentration, up to 1 round + 1rnd/10 points of margin of success</text:span></text:p>
      <text:p text:style-name="P8"/>
      <text:p text:style-name="Standard"><text:span text:style-name="T4">This spell calms agitated creatures. You have no control over the affected creatures, but </text:span><text:span text:style-name="T2">calm emotions </text:span><text:span text:style-name="T4">can stop raging creatures from fighting or joyous ones from reveling. Creatures so affected cannot take violent actions (although they can defend themselves) or do anything destructive. Any aggressive action against or damage dealt to a calmed creature immediately breaks the spell on all calmed creatures.</text:span></text:p>
      <text:p text:style-name="Standard"><text:span text:style-name="T4">This spell automatically suppresses (but does not dispel) any morale bonuses granted by spells such as </text:span><text:span text:style-name="T2">bless </text:span><text:span text:style-name="T4">or</text:span><text:span text:style-name="T2"> aid </text:span><text:span text:style-name="T4">as well as negating the effects of </text:span><text:span text:style-name="T2">Frenzy</text:span><text:span text:style-name="T4"> or </text:span><text:span text:style-name="T2">Adrenal </text:span><text:span text:style-name="T4">abilities. It also suppresses any fear effects and removes the </text:span><text:span text:style-name="T2">confused </text:span><text:span text:style-name="T4">condition from all targets</text:span><text:span text:style-name="T2">. </text:span><text:span text:style-name="T4">While the spell lasts, a suppressed spell or effect has no effect. When the </text:span><text:span text:style-name="T2">calm emotions </text:span><text:span text:style-name="T4">spell ends, the original spell or effect takes hold of the creature again, provided that its duration has not expired in the meantime.</text:span></text:p>
      <text:p text:style-name="P13"/>
      <text:p text:style-name="P3">Darkness (Divine/Arcane)</text:p>
      <text:p text:style-name="Standard"><text:span text:style-name="T6">Power:</text:span><text:span text:style-name="T4"> 12</text:span></text:p>
      <text:p text:style-name="Standard"><text:span text:style-name="T6">Range:</text:span><text:span text:style-name="T4"> Touch</text:span></text:p>
      <text:p text:style-name="Standard"><text:span text:style-name="T6">Target:</text:span><text:span text:style-name="T4"> Object touched</text:span></text:p>
      <text:p text:style-name="Standard"><text:span text:style-name="T6">Duration:</text:span><text:span text:style-name="T4"> 10 min +10min/10 points of margin of success</text:span></text:p>
      <text:p text:style-name="P8"/>
      <text:p text:style-name="Standard"><text:span text:style-name="T4">This spell causes an object to radiate shadowy illumination out to a 20-foot radius. All creatures in the area gain concealment (20% miss chance). Even creatures that can normally see in such conditions (such as with darkvision or low-light vision) have the miss chance in an area shrouded in magical </text:span><text:span text:style-name="T2">darkness</text:span><text:span text:style-name="T4">.</text:span></text:p>
      <text:p text:style-name="Standard"><text:span text:style-name="T4">Normal lights (torches, candles, lanterns, and so forth) are incapable of brightening the area, as are light spells of lower level. Higher level light spells are not affected by </text:span><text:span text:style-name="T2">darkness.</text:span></text:p>
      <text:p text:style-name="Standard"><text:span text:style-name="T4">If </text:span><text:span text:style-name="T2">darkness </text:span><text:span text:style-name="T4">is cast on a small object that is then placed inside or under a lightproof covering, the spell’s effect is blocked until the covering is removed.</text:span><text:span text:style-name="T11"> </text:span><text:span text:style-name="T2">Darkness </text:span><text:span text:style-name="T4">counters or dispels any light spell of equal or lower Power.</text:span></text:p>
      <text:p text:style-name="P13"/>
      <text:p text:style-name="P3">Darkvision (Arcane)</text:p>
      <text:p text:style-name="Standard"><text:span text:style-name="T6">Power:</text:span><text:span text:style-name="T4"> 12</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hour +1hr/10 points of margin of success</text:span></text:p>
      <text:p text:style-name="P8"/>
      <text:p text:style-name="Standard"><text:span text:style-name="T4">The subject gains the ability to see 60 feet even in total darkness. Darkvision is black and white only but otherwise like normal sight. </text:span><text:span text:style-name="T2">Darkvision </text:span><text:span text:style-name="T4">does not grant one the ability to see in magical darkness.</text:span></text:p>
      <text:p text:style-name="P13"/>
      <text:p text:style-name="P3">Find Traps (Divine)</text:p>
      <text:p text:style-name="Standard"><text:span text:style-name="T6">Power:</text:span><text:span text:style-name="T4"> 12</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 min. +1min/ </text:span><text:bookmark text:name="__DdeLink__4732_680523981"/><text:span text:style-name="T4">10 points of margin of success</text:span></text:p>
      <text:p text:style-name="P13"/>
      <text:p text:style-name="Standard"><text:span text:style-name="T4">You gain a +50 bonus to all perception maneuvers made to find or detect traps. Note that </text:span><text:span text:style-name="T2">find traps </text:span><text:span text:style-name="T4">grants no ability to </text:span><text:soft-page-break/><text:span text:style-name="T4">disable the traps that you may find.</text:span></text:p>
      <text:p text:style-name="P13"/>
      <text:p text:style-name="P3">Fog Cloud (Arcane)</text:p>
      <text:p text:style-name="Standard"><text:span text:style-name="T6">Power:</text:span><text:span text:style-name="T4"> 12</text:span></text:p>
      <text:p text:style-name="Standard"><text:span text:style-name="T6">Range: </text:span><text:span text:style-name="T4">Medium (100 ft. + 10 ft./10 points of margin of success)</text:span></text:p>
      <text:p text:style-name="Standard"><text:span text:style-name="T6">Effect:</text:span><text:span text:style-name="T4"> Fog spreads in 20-ft. radius, 20 ft. high</text:span></text:p>
      <text:p text:style-name="Standard"><text:span text:style-name="T6">Duration:</text:span><text:span text:style-name="T4"> 10 min. +10min/ 10 points of margin of success</text:span></text:p>
      <text:p text:style-name="P8"/>
      <text:p text:style-name="P13">A bank of fog billows out from the point you designate. The fog obscures all sight, including darkvision, beyond 5 feet. A creature within 5 feet has concealment (attacks have a 20% miss chance). Creatures farther away have total concealment (50% miss chance, and the attacker can’t use sight to locate the target).</text:p>
      <text:p text:style-name="P13">A moderate wind (11+ mph) disperses the fog in 4 rounds; a strong wind (21+ mph) disperses the fog in 1 round.</text:p>
      <text:p text:style-name="P13">The spell does not function underwater.</text:p>
      <text:p text:style-name="P13"/>
      <text:p text:style-name="P3">Hold Person (Divine)</text:p>
      <text:p text:style-name="Standard"><text:span text:style-name="T6">Power:</text:span><text:span text:style-name="T4"> 12</text:span></text:p>
      <text:p text:style-name="Standard"><text:span text:style-name="T6">Range: </text:span><text:span text:style-name="T4">Medium (100 ft. + 10 ft./10 points of margin of success)</text:span></text:p>
      <text:p text:style-name="Standard"><text:span text:style-name="T6">Target:</text:span><text:span text:style-name="T4"> One humanoid creature</text:span></text:p>
      <text:p text:style-name="Standard"><text:span text:style-name="T6">Duration:</text:span><text:span text:style-name="T4"> 1 round +1rnd/10 points of margin of success</text:span></text:p>
      <text:p text:style-name="P8"/>
      <text:p text:style-name="P13">The subject becomes paralyzed and freezes in place. It is aware and breathes normally but cannot take any actions, even speech. Each round on its turn, the subject may attempt a new saving throw to end the effect. <text:s/>A winged creature who is paralyzed cannot flap its wings and falls. A swimmer can’t swim and may drown.</text:p>
      <text:p text:style-name="P13"/>
      <text:p text:style-name="P3">Invisibility (Arcane)</text:p>
      <text:p text:style-name="Standard"><text:span text:style-name="T6">Power:</text:span><text:span text:style-name="T4"> 12</text:span></text:p>
      <text:p text:style-name="Standard"><text:span text:style-name="T6">Range:</text:span><text:span text:style-name="T4"> Personal or touch</text:span></text:p>
      <text:p text:style-name="Standard"><text:span text:style-name="T6">Target:</text:span><text:span text:style-name="T4"> You or a creature or object weighing no more than 100 lb./10 points of margin of success</text:span></text:p>
      <text:p text:style-name="Standard"><text:span text:style-name="T6">Duration:</text:span><text:span text:style-name="T4"> 1 min. +1min/10 points of margin of success</text:span></text:p>
      <text:p text:style-name="P8"/>
      <text:p text:style-name="P13">The creature or object touched becomes invisible, vanishing from sight, even from darkvision. If the recipient is a creature carrying gear, that vanishes, too. If you cast the spell on someone else, neither you nor your allies can see the subject, unless you can normally see invisible things or you employ magic to do so.</text:p>
      <text:p text:style-name="P13">Items dropped or put down by an invisible creature become visible; items picked up disappear if tucked into the clothing or pouches worn by the creature. Light, however, never becomes invisible, although a source of light can become so (thus, the effect is that of a light with no visible source). Any part of an item that the subject carries but that extends more than 10 feet from it becomes visible.</text:p>
      <text:p text:style-name="Standard"><text:span text:style-name="T4">Of course, the subject is not magically </text:span><text:span text:style-name="T2">silenced, </text:span><text:span text:style-name="T4">and certain other conditions can render the recipient detectable (such as stepping in a puddle). The spell ends if the subject attacks any creature. For purposes of this spell, an attack includes any spell targeting a foe or whose area or effect includes a foe. (Exactly who is a foe depends on the invisible character’s perceptions.) Actions directed at unattended objects do not break the spell. Causing harm indirectly is not an attack. Thus, an invisible being can open doors, talk, eat, climb stairs, summon monsters and have them attack, cut the ropes holding a rope bridge while enemies are on the bridge, remotely trigger traps, open a portcullis to release attack dogs, and so forth. If the subject attacks directly, however, it immediately becomes visible along with all its gear. Spells such as </text:span><text:span text:style-name="T2">bless </text:span><text:span text:style-name="T4">that specifically affect allies but not foes are not attacks for this purpose, even when they include foes in their area.</text:span></text:p>
      <text:p text:style-name="P13"/>
      <text:p text:style-name="P3">Knock (Arcane)</text:p>
      <text:p text:style-name="Standard"><text:span text:style-name="T6">Power:</text:span><text:span text:style-name="T4"> 12</text:span></text:p>
      <text:p text:style-name="Standard"><text:span text:style-name="T6">Range: </text:span><text:span text:style-name="T4">Medium (100 ft. + 10 ft./ 10 points of margin of success)</text:span></text:p>
      <text:p text:style-name="Standard"><text:span text:style-name="T6">Target:</text:span><text:span text:style-name="T4"> One door, box, or chest with an area of up to 10 sq. ft./10 points of margin of success</text:span></text:p>
      <text:p text:style-name="Standard"><text:span text:style-name="T6">Duration:</text:span><text:span text:style-name="T4"> Instantaneous; see text</text:span></text:p>
      <text:p text:style-name="P8"/>
      <text:p text:style-name="Standard"><text:span text:style-name="T4">The </text:span><text:span text:style-name="T2">knock </text:span><text:span text:style-name="T4">spell opens stuck, barred, locked, </text:span><text:span text:style-name="T2">held, </text:span><text:span text:style-name="T4">or </text:span><text:span text:style-name="T2">arcane locked </text:span><text:span text:style-name="T4">doors. It opens secret doors, as well as locked or trick-opening boxes or chests. It also loosens welds, shackles, or chains (provided they serve to hold closures shut). If used to open a </text:span><text:span text:style-name="T2">arcane locked </text:span><text:span text:style-name="T4">door, the spell does not remove the </text:span><text:span text:style-name="T2">arcane lock </text:span><text:span text:style-name="T4">but simply suspends its functioning for 10 minutes. In all other cases, the door does not relock itself or become stuck again on its own. </text:span><text:span text:style-name="T2">Knock </text:span><text:span text:style-name="T4">does not raise barred gates or similar impediments (such as a portcullis), nor does it affect ropes, vines, and the like. The effect is limited by the area. Each spell </text:span><text:soft-page-break/><text:span text:style-name="T4">can undo as many as two means of preventing egress. </text:span></text:p>
      <text:p text:style-name="P13"/>
      <text:p text:style-name="P3">Levitate (Arcane)</text:p>
      <text:p text:style-name="Standard"><text:span text:style-name="T6">Power:</text:span><text:span text:style-name="T4"> 12</text:span></text:p>
      <text:p text:style-name="Standard"><text:span text:style-name="T6">Range:</text:span><text:span text:style-name="T4"> Personal or close (25 ft. + 5 ft./20 points of margin of success)</text:span></text:p>
      <text:p text:style-name="Standard"><text:span text:style-name="T6">Target:</text:span><text:span text:style-name="T4"> You or one willing creature or one object (total weight up to 100 lb./ 10 points of margin of success)</text:span></text:p>
      <text:p text:style-name="Standard"><text:span text:style-name="T6">Duration:</text:span><text:span text:style-name="T4"> 1 min./ 10 points of margin of success</text:span></text:p>
      <text:p text:style-name="P8"/>
      <text:p text:style-name="Standard"><text:span text:style-name="T2">Levitate </text:span><text:span text:style-name="T4">allows you to move yourself, another creature, or an object up and down as you wish. A creature must be willing to be </text:span><text:span text:style-name="T2">levitated, </text:span><text:span text:style-name="T4">and an object must be unattended or possessed by a willing creature. You can mentally direct the recipient to move up or down as much as 20 feet each round; doing so is a move action. You cannot move the recipient horizontally, but the recipient could clamber along the face of a cliff, for example, or push against a ceiling to move laterally (generally at half its base land speed).</text:span></text:p>
      <text:p text:style-name="Standard"><text:span text:style-name="T4">A </text:span><text:span text:style-name="T2">levitating </text:span><text:span text:style-name="T4">creature that attacks with a melee or ranged weapon finds itself increasingly unstable; the first attack has a –10 </text:span><text:span text:style-name="T4">penalty on attack rolls, the second –20, and so on, to a maximum penalty of –50. A full round spent stabilizing allows the creature to begin again at –10.</text:span></text:p>
      <text:p text:style-name="P13"/>
      <text:p text:style-name="P3">Locate Object (Divine)</text:p>
      <text:p text:style-name="Standard"><text:span text:style-name="T6">Power:</text:span><text:span text:style-name="T4"> 12</text:span></text:p>
      <text:p text:style-name="Standard"><text:span text:style-name="T6">Range:</text:span><text:span text:style-name="T4"> Long (400 ft. + 40 ft./ 10 points of margin of success)</text:span></text:p>
      <text:p text:style-name="Standard"><text:span text:style-name="T6">Area:</text:span><text:span text:style-name="T4"> Circle, centered on you, with a radius of 400 ft. + 40 ft./ 10 points of margin of success</text:span></text:p>
      <text:p text:style-name="Standard"><text:span text:style-name="T6">Duration:</text:span><text:span text:style-name="T4"> 1 min. +1min/10 points of margin of success</text:span></text:p>
      <text:p text:style-name="P8"/>
      <text:p text:style-name="P13">You sense the direction of a well-known or clearly visualized object. You can search for general items, in which case you locate the nearest one of its kind if more than one is within range. Attempting to find a certain item requires a specific and accurate mental image; if the image is not close enough to the actual object, the spell fails. You cannot specify a unique item unless you have observed that particular item firsthand (not through divination).</text:p>
      <text:p text:style-name="Standard"><text:span text:style-name="T4">The spell is blocked by even a thin sheet of lead. Creatures cannot be found by this spell. </text:span><text:span text:style-name="T2">Polymorph any object </text:span><text:span text:style-name="T4">fools it.</text:span></text:p>
      <text:p text:style-name="P13"/>
      <text:p text:style-name="P3">Produce Flame (Divine)</text:p>
      <text:p text:style-name="Standard"><text:span text:style-name="T6">Power:</text:span><text:span text:style-name="T4"> 12</text:span></text:p>
      <text:p text:style-name="Standard"><text:span text:style-name="T6">Range:</text:span><text:span text:style-name="T4"> 0 ft.</text:span></text:p>
      <text:p text:style-name="Standard"><text:span text:style-name="T6">Effect:</text:span><text:span text:style-name="T4"> Flame in your palm</text:span></text:p>
      <text:p text:style-name="Standard"><text:span text:style-name="T6">Duration:</text:span><text:span text:style-name="T4"> 1 min +1min/10 points of margin of success</text:span></text:p>
      <text:p text:style-name="P8"/>
      <text:p text:style-name="P13">Flames as bright as a torch appear in your open hand. The flames harm neither you nor your equipment.</text:p>
      <text:p text:style-name="P13">In addition to providing illumination, the flames can be hurled or used to touch enemies. You can strike an opponent with a melee attack, dealing 1d6+3 fire damage. Alternatively, you can hurl the flames up to 120 feet as a thrown weapon, dealing the same damage as with the melee attack. No sooner do you hurl the flames than a new set appears in your hand. Each attack you make reduces the remaining duration by 1 minute. If an attack reduces the remaining duration to 0 minutes or less, the spell ends after the attack resolves.</text:p>
      <text:p text:style-name="P13"/>
      <text:p text:style-name="P3">Remove Paralysis (Divine)</text:p>
      <text:p text:style-name="Standard"><text:span text:style-name="T6">Power:</text:span><text:span text:style-name="T4"> 12</text:span></text:p>
      <text:p text:style-name="Standard"><text:span text:style-name="T6">Range:</text:span><text:span text:style-name="T4"> Close (25 ft. + 5 ft./20 points of margin of success)</text:span></text:p>
      <text:p text:style-name="Standard"><text:span text:style-name="T6">Targets:</text:span><text:span text:style-name="T4"> Up to four creatures, no two of which can be more than 30 ft. apart</text:span></text:p>
      <text:p text:style-name="Standard"><text:span text:style-name="T6">Duration:</text:span><text:span text:style-name="T4"> Instantaneous</text:span></text:p>
      <text:p text:style-name="P8"/>
      <text:p text:style-name="Standard"><text:span text:style-name="T4">You can free one or more creatures from the effects of any temporary paralysis or related magic, including a ghoul’s touch or a </text:span><text:span text:style-name="T2">slow </text:span><text:span text:style-name="T4">spell. If the spell is cast on one creature, the paralysis is negated. If cast on two creatures, each receives another RR with a +20 bonus against the effect that afflicts it. If cast on three or four creatures, each receives another RR with a +10 resistance bonus.</text:span></text:p>
      <text:p text:style-name="P13"/>
      <text:p text:style-name="P3">See Invisibility (Arcane)</text:p>
      <text:p text:style-name="Standard"><text:span text:style-name="T6">Power:</text:span><text:span text:style-name="T4"> 12</text:span></text:p>
      <text:p text:style-name="Standard"><text:span text:style-name="T6">Range:</text:span><text:span text:style-name="T4"> Personal</text:span></text:p>
      <text:p text:style-name="Standard"><text:span text:style-name="T6">Target:</text:span><text:span text:style-name="T4"> You</text:span></text:p>
      <text:p text:style-name="Standard"><text:soft-page-break/><text:span text:style-name="T6">Duration:</text:span><text:span text:style-name="T4"> 10 min. +10min/10 points of margin of success</text:span></text:p>
      <text:p text:style-name="P13"/>
      <text:p text:style-name="P13">You can see any objects or beings that are invisible within your range of vision, as well as any that are ethereal, as if they were normally visible. Such creatures are visible to you as translucent shapes, allowing you easily to discern the difference between visible, invisible, and ethereal creatures.</text:p>
      <text:p text:style-name="P13">The spell does not reveal the method used to obtain invisibility. It does not reveal illusions or enable you to see through opaque objects. It does not reveal creatures who are simply hiding, concealed, or otherwise hard to see.</text:p>
      <text:p text:style-name="P13"/>
      <text:p text:style-name="P13"/>
      <text:p text:style-name="P3">Spider Climb (Arcane)</text:p>
      <text:p text:style-name="Standard"><text:span text:style-name="T6">Power:</text:span><text:span text:style-name="T4"> 12</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0 min. +10min/10 points of margin of success</text:span></text:p>
      <text:p text:style-name="P8"/>
      <text:p text:style-name="Standard"><text:span text:style-name="T4">The subject can climb and travel on vertical surfaces or even traverse ceilings as well as a spider does. The affected creature must have its hands free to climb in this manner. The subject gains a climb speed of 20 feet; furthermore, it need not make Climb checks to traverse a vertical or horizontal surface (even upside down). A </text:span><text:span text:style-name="T2">spider climbing </text:span><text:span text:style-name="T4">creature retains its Dexterity bonus to Armor Class (if any) while climbing, and opponents get no special bonus to their attacks against it. It cannot, however, use the run action while climbing.</text:span></text:p>
      <text:p text:style-name="P13"/>
      <text:p text:style-name="P46">Third Order</text:p>
      <text:p text:style-name="P3"/>
      <text:p text:style-name="P3">Clairaudience/Clairvoyance (Arcane)</text:p>
      <text:p text:style-name="Standard"><text:span text:style-name="T6">Power:</text:span><text:span text:style-name="T4"> 15</text:span></text:p>
      <text:p text:style-name="Standard"><text:span text:style-name="T6">Range:</text:span><text:span text:style-name="T4"> Long (400 ft. + 40 ft./10 points of margin of success)</text:span></text:p>
      <text:p text:style-name="Standard"><text:span text:style-name="T6">Effect: </text:span><text:span text:style-name="T4">Magical sensor</text:span></text:p>
      <text:p text:style-name="Standard"><text:span text:style-name="T6">Duration:</text:span><text:span text:style-name="T4"> 1 min + 1min/ 10 points of margin of success</text:span></text:p>
      <text:p text:style-name="P8"/>
      <text:p text:style-name="Standard"><text:span text:style-name="T2">Clairaudience/clairvoyance </text:span><text:span text:style-name="T4">creates an invisible magical sensor at a specific location that enables you to hear or see (your choice) almost as if you were there. You don’t need line of sight or line of effect, but the locale must be known—a place familiar to you or an obvious one. Once you have selected the locale, the sensor doesn’t move, but you can rotate it in all directions to view the area as desired. Unlike other scrying spells, this spell does not allow magically or supernaturally enhanced senses to work through it. If the chosen locale is magically dark, you see nothing. If it is naturally pitch black, you can see in a 10- foot radius around the center of the spell’s effect. </text:span><text:span text:style-name="T2">Clairaudience/clairvoyance </text:span><text:span text:style-name="T4">functions only on the plane of existence you are currently occupying.</text:span></text:p>
      <text:p text:style-name="P13"/>
      <text:p text:style-name="P3">Confusion (Arcane)</text:p>
      <text:p text:style-name="Standard"><text:span text:style-name="T6">Power:</text:span><text:span text:style-name="T4"> 15</text:span></text:p>
      <text:p text:style-name="Standard"><text:span text:style-name="T6">Range: </text:span><text:span text:style-name="T4">Medium (100 ft. + 10 ft./10 points of margin of success)</text:span></text:p>
      <text:p text:style-name="Standard"><text:span text:style-name="T6">Targets:</text:span><text:span text:style-name="T4"> All creatures in a 15-ft. radius burst</text:span></text:p>
      <text:p text:style-name="Standard"><text:span text:style-name="T6">Duration:</text:span><text:span text:style-name="T4"> 1 round +1rnd/10 points of margin of success</text:span></text:p>
      <text:p text:style-name="P8"/>
      <text:p text:style-name="Standard"><text:span text:style-name="T4">This spell causes the targets to become </text:span><text:span text:style-name="T2">confused, </text:span><text:span text:style-name="T4">making them unable to independently determine what they will do.</text:span></text:p>
      <text:p text:style-name="P13">Roll on the following table at the beginning of each subject’s turn each round to see what the subject does in that round.</text:p>
      <text:p text:style-name="P6"/>
      <table:table table:name="Table2" table:style-name="Table2">
        <table:table-column table:style-name="Table2.A"/>
        <table:table-column table:style-name="Table2.B"/>
        <table:table-row table:style-name="Table2.1">
          <table:table-cell table:style-name="Table2.A1" office:value-type="string">
            <text:p text:style-name="P22">d%</text:p>
          </table:table-cell>
          <table:table-cell table:style-name="Table2.A1" office:value-type="string">
            <text:p text:style-name="P22">Behavior</text:p>
          </table:table-cell>
        </table:table-row>
        <table:table-row table:style-name="Table2.1">
          <table:table-cell table:style-name="Table2.A2" office:value-type="string">
            <text:p text:style-name="P23">01–10</text:p>
          </table:table-cell>
          <table:table-cell table:style-name="Table2.A2" office:value-type="string">
            <text:p text:style-name="P13">Attack caster with melee or ranged weapons (or close with caster if attack is not possible).</text:p>
          </table:table-cell>
        </table:table-row>
        <table:table-row table:style-name="Table2.1">
          <table:table-cell table:style-name="Table2.A2" office:value-type="string">
            <text:p text:style-name="P23">11–20</text:p>
          </table:table-cell>
          <table:table-cell table:style-name="Table2.A2" office:value-type="string">
            <text:p text:style-name="P23">Act normally.</text:p>
          </table:table-cell>
        </table:table-row>
        <table:table-row table:style-name="Table2.1">
          <table:table-cell table:style-name="Table2.A2" office:value-type="string">
            <text:p text:style-name="P23">21–50</text:p>
          </table:table-cell>
          <table:table-cell table:style-name="Table2.A2" office:value-type="string">
            <text:p text:style-name="P13">Do nothing but babble incoherently.</text:p>
          </table:table-cell>
        </table:table-row>
        <table:table-row table:style-name="Table2.1">
          <table:table-cell table:style-name="Table2.A2" office:value-type="string">
            <text:p text:style-name="P23">51–70</text:p>
          </table:table-cell>
          <table:table-cell table:style-name="Table2.A2" office:value-type="string">
            <text:p text:style-name="P13">Flee away from caster at top possible speed.</text:p>
          </table:table-cell>
        </table:table-row>
        <table:table-row table:style-name="Table2.1">
          <table:table-cell table:style-name="Table2.A6" office:value-type="string">
            <text:p text:style-name="P23">71–100</text:p>
          </table:table-cell>
          <table:table-cell table:style-name="Table2.A6" office:value-type="string">
            <text:p text:style-name="P13">Attack nearest creature (for this purpose, a familiar counts as part of the subject’s self).</text:p>
          </table:table-cell>
        </table:table-row>
      </table:table>
      <text:p text:style-name="P6"/>
      <text:p text:style-name="Standard"><text:span text:style-name="T4">A </text:span><text:span text:style-name="T2">confused </text:span><text:span text:style-name="T4">character who can’t carry out the indicated action does nothing but babble incoherently. Attackers are not at any special advantage when attacking a </text:span><text:span text:style-name="T2">confused </text:span><text:span text:style-name="T4">character. Any </text:span><text:span text:style-name="T2">confused </text:span><text:span text:style-name="T4">character who is attacked automatically attacks its attackers on its next turn, as long as it is still </text:span><text:span text:style-name="T2">confused </text:span><text:span text:style-name="T4">when its turn comes. </text:span></text:p>
      <text:p text:style-name="P13"/>
      <text:p text:style-name="P3">Dispel Magic (Divine/Arcane)</text:p>
      <text:p text:style-name="Standard"><text:span text:style-name="T6">Power:</text:span><text:span text:style-name="T4"> 15</text:span></text:p>
      <text:p text:style-name="Standard"><text:span text:style-name="T6">Range: </text:span><text:span text:style-name="T4">Medium (100 ft. + 10 ft./ 10 points of margin of success)</text:span></text:p>
      <text:p text:style-name="Standard"><text:span text:style-name="T6">Target or Area:</text:span><text:span text:style-name="T4"> One spellcaster, creature, or object; or 20-ft.-radius burst</text:span></text:p>
      <text:p text:style-name="Standard"><text:span text:style-name="T6">Duration:</text:span><text:span text:style-name="T4"> Instantaneous</text:span></text:p>
      <text:p text:style-name="P8"/>
      <text:p text:style-name="Standard"><text:span text:style-name="T4">You can use </text:span><text:span text:style-name="T2">dispel magic </text:span><text:span text:style-name="T4">to end ongoing spells that have been cast on a creature or object, to temporarily suppress the magical abilities of a magic item, to end ongoing spells (or at least their effects) within an area, or to counter another spellcaster’s spell. A dispelled spell ends as if its duration had expired. Some spells, as detailed in their descriptions, can’t be defeated by </text:span><text:span text:style-name="T2">dispel magic</text:span><text:span text:style-name="T4">. </text:span><text:span text:style-name="T2">Dispel magic </text:span><text:span text:style-name="T4">can dispel (but not counter) spell-like effects just as it does spells.. </text:span></text:p>
      <text:p text:style-name="P13"/>
      <text:p text:style-name="P3">Fireball (Arcane)</text:p>
      <text:p text:style-name="Standard"><text:span text:style-name="T6">Power:</text:span><text:span text:style-name="T4"> 15</text:span></text:p>
      <text:p text:style-name="Standard"><text:span text:style-name="T6">Range:</text:span><text:span text:style-name="T4"> Long (400 ft. + 40 ft./10 points of margin of success)</text:span></text:p>
      <text:p text:style-name="Standard"><text:span text:style-name="T6">Area:</text:span><text:span text:style-name="T4"> 20-ft.-radius spread</text:span></text:p>
      <text:p text:style-name="Standard"><text:span text:style-name="T6">Duration:</text:span><text:span text:style-name="T4"> Instantaneous</text:span></text:p>
      <text:p text:style-name="P8"/>
      <text:p text:style-name="Standard"><text:span text:style-name="T4">A </text:span><text:span text:style-name="T2">fireball </text:span><text:span text:style-name="T4">spell is an explosion of flame that detonates with a low roar and deals 3d6 points of area fire damage +1d6/10 points of margin of success (maximum 8d6) to a target. You must make a directed spells attack roll to hit your target, but if </text:span><text:soft-page-break/><text:span text:style-name="T4">you miss the target with your attack, he still suffer half of that damage.</text:span></text:p>
      <text:p text:style-name="P18">Use the same roll to make an attack against each other creature in the area (with a special modification of -10/ft of distance from the original target): all creatures you hit suffer the same amount of damage, missed creatures takes half of that damage. </text:p>
      <text:p text:style-name="P13"/>
      <text:p text:style-name="P3">Fly (Arcane)</text:p>
      <text:p text:style-name="Standard"><text:span text:style-name="T6">Power:</text:span><text:span text:style-name="T4"> 15</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min. +1min/10 points of margin of success</text:span></text:p>
      <text:p text:style-name="P8"/>
      <text:p text:style-name="Standard"><text:span text:style-name="T4">The subject can fly at a speed of 60 feet (or 40 feet if it wears medium or heavy armor, or if it carries a medium or heavy load). It can ascend at half speed and descend at double speed, and its maneuverability is good. Using a </text:span><text:span text:style-name="T2">fly </text:span><text:span text:style-name="T4">spell requires only as much concentration as walking, so the subject can attack or cast spells normally. The subject of a </text:span><text:span text:style-name="T2">fly </text:span><text:span text:style-name="T4">spell can charge but not run, and it cannot carry aloft more weight than its maximum load, plus any armor it wears.</text:span></text:p>
      <text:p text:style-name="Standard"><text:span text:style-name="T4">Should the spell duration expire while the subject is still aloft, the magic fails slowly. The subject floats downward 60 feet per round for 1d6 rounds. If it reaches the ground in that amount of time, it lands safely. If not, it falls the rest of the distance, taking 1d6 points of damage per 10 feet of fall. Since dispelling a spell effectively ends it, the subject also descends in this way if the </text:span><text:span text:style-name="T2">fly </text:span><text:span text:style-name="T4">spell is dispelled, but not if it is negated by an </text:span><text:span text:style-name="T2">antimagic field</text:span><text:span text:style-name="T4">.</text:span></text:p>
      <text:p text:style-name="P13"/>
      <text:p text:style-name="P3">Gaseous Form (Arcane)</text:p>
      <text:p text:style-name="Standard"><text:span text:style-name="T6">Power:</text:span><text:span text:style-name="T4"> 15</text:span></text:p>
      <text:p text:style-name="Standard"><text:span text:style-name="T6">Range:</text:span><text:span text:style-name="T4"> Touch</text:span></text:p>
      <text:p text:style-name="Standard"><text:span text:style-name="T6">Target: </text:span><text:span text:style-name="T4">Willing corporeal creature touched</text:span></text:p>
      <text:p text:style-name="Standard"><text:span text:style-name="T6">Duration:</text:span><text:span text:style-name="T4"> 2 min. +2min/10 points of margin of success</text:span></text:p>
      <text:p text:style-name="P8"/>
      <text:p text:style-name="Standard"><text:span text:style-name="T4">The subject and all its gear become insubstantial, misty, and translucent. Its material armor (including natural armor) becomes worthless, though armor bonuses from force effects still apply. The subject gains 10 points of magical armor on all location and becomes immune to poison and critical hits. It can’t attack or cast spells while in gaseous form. The subject also loses supernatural abilities while in gaseous form. If it has a touch spell ready to use, that spell is discharged harmlessly when the </text:span><text:span text:style-name="T2">gaseous form </text:span><text:span text:style-name="T4">spell takes effect.</text:span></text:p>
      <text:p text:style-name="P13">A gaseous creature can’t run, but it can fly at a speed of 10 feet (maneuverability perfect). It can pass through small holes or narrow openings, even mere cracks, with all it was wearing or holding in its hands, as long as the spell persists. The creature is subject to the effects of wind, and it can’t enter water or other liquid. It also can’t manipulate objects or activate items, even those carried along with its gaseous form. Continuously active items remain active, though in some cases their effects may be moot.</text:p>
      <text:p text:style-name="P3"/>
      <text:p text:style-name="P5"><text:span text:style-name="T25">Glyph of Warding </text:span><text:span text:style-name="T25">(Divine)</text:span></text:p>
      <text:p text:style-name="Standard"><text:span text:style-name="T6">Power:</text:span><text:span text:style-name="T4"> 15</text:span></text:p>
      <text:p text:style-name="Standard"><text:span text:style-name="T6">Range:</text:span><text:span text:style-name="T4"> Touch</text:span></text:p>
      <text:p text:style-name="Standard"><text:span text:style-name="T6">Target or Area:</text:span><text:span text:style-name="T4"> Object touched or up to 5 sq. ft./ 10 points of margin of success</text:span></text:p>
      <text:p text:style-name="Standard"><text:span text:style-name="T6">Duration:</text:span><text:span text:style-name="T4"> Permanent until discharged</text:span></text:p>
      <text:p text:style-name="P8"/>
      <text:p text:style-name="Standard"><text:span text:style-name="T4">This powerful inscription harms those who enter, pass, or open the warded area or object. A </text:span><text:span text:style-name="T2">glyph of warding </text:span><text:span text:style-name="T4">can guard a bridge or passage, ward a portal, trap a chest or box, and so on.</text:span></text:p>
      <text:p text:style-name="Standard"><text:span text:style-name="T4">You set the conditions of the ward. Typically, any creature entering the warded area or opening the warded object without speaking a password (which you set when casting the spell) is subject to the magic it stores. Alternatively or in addition to a password trigger, </text:span><text:span text:style-name="T2">glyphs </text:span><text:span text:style-name="T4">can be set according to physical characteristics (such as height or weight) or creature type, subtype, or kind. </text:span><text:span text:style-name="T2">Glyphs </text:span><text:span text:style-name="T4">can also be set with respect to uncorrupted, evil, patron, or to pass those of your religion. </text:span></text:p>
      <text:p text:style-name="Standard"><text:span text:style-name="T2">Glyphs </text:span><text:span text:style-name="T4">respond to invisible creatures normally but are not triggered by those who travel past them ethereally. Multiple </text:span><text:span text:style-name="T2">glyphs </text:span><text:span text:style-name="T4">cannot be cast on the same area. However, if a cabinet has three drawers, each can be separately warded.</text:span></text:p>
      <text:p text:style-name="Standard"><text:span text:style-name="T4">When casting the spell, you weave a tracery of faintly glowing lines around the warding sigil. A </text:span><text:span text:style-name="T2">glyph </text:span><text:span text:style-name="T4">can be placed to conform to any shape up to the limitations of your total square footage. When the spell is completed, the </text:span><text:span text:style-name="T2">glyph </text:span><text:span text:style-name="T4">and tracery become nearly invisible. A </text:span><text:span text:style-name="T2">Glyph</text:span><text:span text:style-name="T4"> spell cannot be cast in combat.</text:span></text:p>
      <text:p text:style-name="Standard"><text:span text:style-name="T2">Glyphs </text:span><text:span text:style-name="T4">cannot be affected or bypassed by such means as physical or magical probing, though they can be dispelled. P</text:span><text:span text:style-name="T2">olymorph</text:span><text:span text:style-name="T4"> and similar magical effects)can fool a </text:span><text:span text:style-name="T2">glyph</text:span><text:span text:style-name="T4">, though nonmagical disguises and the like can’t.</text:span></text:p>
      <text:p text:style-name="Standard"><text:span text:style-name="T4">A DC 100 Attunement check allows you to identify a </text:span><text:span text:style-name="T2">glyph of warding</text:span><text:span text:style-name="T4">. Identifying the </text:span><text:span text:style-name="T2">glyph </text:span><text:span text:style-name="T4">does not discharge it and allows you to know the basic nature of the </text:span><text:span text:style-name="T2">glyph </text:span><text:span text:style-name="T4">(version, type of damage caused, what spell is stored). It takes a DC 150 </text:span><text:soft-page-break/><text:span text:style-name="T4">Perception maneuver to a character searching an area to detect a glyph without magical aid.</text:span></text:p>
      <text:p text:style-name="Standard"><text:span text:style-name="T4">Depending on the version selected, a </text:span><text:span text:style-name="T2">glyph </text:span><text:span text:style-name="T4">either blasts the intruder or activates a spell.</text:span></text:p>
      <text:p text:style-name="Standard"><text:span text:style-name="T2">Blast Glyph: </text:span><text:span text:style-name="T4">A </text:span><text:span text:style-name="T2">blast glyph </text:span><text:span text:style-name="T4">deals 1d8 points of area damage, plus 1d8/20 points of margin of success</text:span><text:span text:style-name="T24"> </text:span><text:span text:style-name="T4"><text:s/>(maximum 5d8) to the intruder and to all within 5 feet of him or her. This damage is acid, cold, fire, electricity, or sonic (caster’s choice, made at time of casting). </text:span></text:p>
      <text:p text:style-name="P13">When the Blast Glyph is activated, it makes an attack against the primary target (using the caster attack bonus) and uses the same attack roll against all secondary targets, with a special modification of -10/ft of distance from the original target. Missed creatures stills suffer half of the original damage.</text:p>
      <text:p text:style-name="Standard"><text:span text:style-name="T2">Spell Glyph: </text:span><text:span text:style-name="T4">You can store any harmful spell with a Power of 15 or less that you know. All margin of success dependant features of the spell are based on your roll at the time of casting the </text:span><text:span text:style-name="T2">glyph. </text:span><text:span text:style-name="T4">If the spell has a target, it targets the intruder. If the spell has an area or an amorphous effect the area or effect is centered on the intruder. </text:span></text:p>
      <text:p text:style-name="P10"/>
      <text:p text:style-name="P3">Haste (Arcane)</text:p>
      <text:p text:style-name="Standard"><text:span text:style-name="T6">Power:</text:span><text:span text:style-name="T4"> 15</text:span></text:p>
      <text:p text:style-name="Standard"><text:span text:style-name="T6">Range:</text:span><text:span text:style-name="T4"> Close (25 ft. + 5 ft./20 points of margin of success)</text:span></text:p>
      <text:p text:style-name="Standard"><text:span text:style-name="T6">Targets:</text:span><text:span text:style-name="T4"> One creature +1/10 points of margin of success, no two of which can be more than 30 ft. apart</text:span></text:p>
      <text:p text:style-name="Standard"><text:span text:style-name="T6">Duration:</text:span><text:span text:style-name="T4"> 1 round +1rnd/10 points of margin of success</text:span></text:p>
      <text:p text:style-name="P8"/>
      <text:p text:style-name="Standard"><text:span text:style-name="T4">The transmuted creatures move and act more quickly than normal. This extra speed has several effects. A </text:span><text:span text:style-name="T2">hasted</text:span><text:span text:style-name="T4"> character gain an additional action (up to a maximum of 3) and a +10 bonus to his OB and to all Dodge maneuvers.</text:span></text:p>
      <text:p text:style-name="P13"/>
      <text:p text:style-name="P3">Invisibility Sphere (Arcane)</text:p>
      <text:p text:style-name="Standard"><text:span text:style-name="T6">Power:</text:span><text:span text:style-name="T4"> 15</text:span></text:p>
      <text:p text:style-name="Standard"><text:span text:style-name="T6">Area:</text:span><text:span text:style-name="T4"> 10-ft.-radius emanation around the creature or object touched</text:span></text:p>
      <text:p text:style-name="Standard"><text:span text:style-name="T4">This spell functions like </text:span><text:span text:style-name="T2">invisibility, </text:span><text:span text:style-name="T4">except that this spell confers invisibility upon all creatures within 10 feet of the recipient. The center of the effect is mobile with the recipient.</text:span></text:p>
      <text:p text:style-name="Standard"><text:span text:style-name="T4">Those affected by this spell can see each other and themselves as if unaffected by the spell. Any affected creature moving out of the area becomes visible, but creatures moving into the area after the spell is cast do not become invisible. Affected creatures (other than the recipient) who attack negate the invisibility only for themselves. If the spell recipient attacks, the </text:span><text:span text:style-name="T2">invisibility sphere </text:span><text:span text:style-name="T4">ends.</text:span></text:p>
      <text:p text:style-name="P13"/>
      <text:p text:style-name="P3">Leaving (Arcane)</text:p>
      <text:p text:style-name="Standard"><text:span text:style-name="T6">Power:</text:span><text:span text:style-name="T4"> 15</text:span></text:p>
      <text:p text:style-name="Standard"><text:span text:style-name="T6">Range:</text:span><text:span text:style-name="T4"> Personal</text:span></text:p>
      <text:p text:style-name="Standard"><text:span text:style-name="T6">Area:</text:span><text:span text:style-name="T4"> You</text:span></text:p>
      <text:p text:style-name="Standard"><text:span text:style-name="T6">Duration:</text:span><text:span text:style-name="T4"> Instantaneous</text:span></text:p>
      <text:p text:style-name="P8"/>
      <text:p text:style-name="P13">You teleport to any unoccupied location you can see, up to 30m (or 5 squares) away from you. There cannot be any intervening barrier between you and the point of arrival.</text:p>
      <text:p text:style-name="P3"/>
      <text:p text:style-name="P3">Lightning Bolt (Arcane)</text:p>
      <text:p text:style-name="Standard"><text:span text:style-name="T6">Power:</text:span><text:span text:style-name="T4"> 15</text:span></text:p>
      <text:p text:style-name="Standard"><text:span text:style-name="T6">Range:</text:span><text:span text:style-name="T4"> 120 ft.</text:span></text:p>
      <text:p text:style-name="Standard"><text:span text:style-name="T6">Area:</text:span><text:span text:style-name="T4"> 120-ft. line</text:span></text:p>
      <text:p text:style-name="Standard"><text:span text:style-name="T6">Duration:</text:span><text:span text:style-name="T4"> Instantaneous</text:span></text:p>
      <text:p text:style-name="P8"/>
      <text:p text:style-name="P13">You release a powerful stroke of electrical energy that deals 3d6 points of area electricity damage +1d6/10 points of margin of success (maximum 8d6) to each creature within its area. The bolt begins at your fingertips.</text:p>
      <text:p text:style-name="Standard"><text:span text:style-name="T4">The </text:span><text:span text:style-name="T2">lightning bolt </text:span><text:span text:style-name="T4">sets fire to combustibles and damages objects in its path. It can melt metals with a low melting point, such as lead, gold, copper, silver, or bronze. If the damage caused to an interposing barrier shatters or breaks through it, the bolt may continue beyond the barrier if the spell’s range permits; otherwise, it stops at the barrier just as any other spell effect does.</text:span></text:p>
      <text:p text:style-name="P13"/>
      <text:p text:style-name="P3">Major Image (Arcane)</text:p>
      <text:p text:style-name="Standard"><text:span text:style-name="T6">Power:</text:span><text:span text:style-name="T4"> 15</text:span></text:p>
      <text:p text:style-name="Standard"><text:span text:style-name="T6">Duration:</text:span><text:span text:style-name="T4"> Concentration + 3 rounds</text:span></text:p>
      <text:p text:style-name="Standard"><text:span text:style-name="T4">This spell functions like </text:span><text:span text:style-name="T2">silent image, </text:span><text:span text:style-name="T4">except that sound, smell, and thermal illusions are included in the spell effect. While </text:span><text:soft-page-break/><text:span text:style-name="T4">concentrating, you can move the image within the range. </text:span></text:p>
      <text:p text:style-name="P13">The image disappears when struck by an opponent unless you cause the illusion to react appropriately.</text:p>
      <text:p text:style-name="P13"/>
      <text:p text:style-name="P3">Plant Growth (Divine)</text:p>
      <text:p text:style-name="Standard"><text:span text:style-name="T6">Power:</text:span><text:span text:style-name="T4"> 15</text:span></text:p>
      <text:p text:style-name="Standard"><text:span text:style-name="T6">Range:</text:span><text:span text:style-name="T4"> See text</text:span></text:p>
      <text:p text:style-name="Standard"><text:span text:style-name="T6">Target or Area:</text:span><text:span text:style-name="T4"> See text</text:span></text:p>
      <text:p text:style-name="Standard"><text:span text:style-name="T6">Duration:</text:span><text:span text:style-name="T4"> Instantaneous</text:span></text:p>
      <text:p text:style-name="P8"/>
      <text:p text:style-name="Standard"><text:span text:style-name="T2">Plant growth </text:span><text:span text:style-name="T4">has different effects depending on the version chosen.</text:span></text:p>
      <text:p text:style-name="Standard"><text:span text:style-name="T2">Overgrowth: </text:span><text:span text:style-name="T4">This effect causes normal vegetation (grasses, briars, bushes, creepers, thistles, trees, vines) within long range (400 feet + 40 feet/10 points of margin of success) to become thick and overgrown. The plants entwine to form a thicket or jungle that creatures must hack or force a way through. Speed drops to 5 feet, or 10 feet for Large or larger creatures. The area must have brush and trees in it for this spell to take effect.</text:span></text:p>
      <text:p text:style-name="P13">At your option, the area can be a 100-foot-radius circle, a 150-foot-radius semicircle, or a 200-foot-radius quarter circle.</text:p>
      <text:p text:style-name="P13">You may designate places within the area that are not affected.</text:p>
      <text:p text:style-name="Standard"><text:span text:style-name="T2">Enrichment: </text:span><text:span text:style-name="T4">This effect targets plants within a range of one-half mile, raising their potential productivity over the course of the next year to one-third above normal.</text:span></text:p>
      <text:p text:style-name="P13">This spell has no effect on plant creatures.</text:p>
      <text:p text:style-name="P13"/>
      <text:p text:style-name="P3">Remove Curse (Divine)</text:p>
      <text:p text:style-name="Standard"><text:span text:style-name="T6">Power:</text:span><text:span text:style-name="T4"> 15</text:span></text:p>
      <text:p text:style-name="Standard"><text:span text:style-name="T6">Range:</text:span><text:span text:style-name="T4"> Touch</text:span></text:p>
      <text:p text:style-name="Standard"><text:span text:style-name="T6">Target:</text:span><text:span text:style-name="T4"> Creature or item touched</text:span></text:p>
      <text:p text:style-name="Standard"><text:span text:style-name="T6">Duration:</text:span><text:span text:style-name="T4"> Instantaneous</text:span></text:p>
      <text:p text:style-name="P8"/>
      <text:p text:style-name="Standard"><text:span text:style-name="T2">Remove curse </text:span><text:span text:style-name="T4">instantaneously removes all curses on an object or a creature. </text:span><text:span text:style-name="T2">Remove curse </text:span><text:span text:style-name="T4">does not remove the curse from a cursed shield, weapon, or suit of armor, although the spell typically enables the creature afflicted with any such cursed item to remove and get rid of it. Certain special curses may not be countered by this spell or may be countered only by a caster of a certain level or higher.</text:span></text:p>
      <text:p text:style-name="P13"/>
      <text:p text:style-name="P3">Remove Disease (Divine)</text:p>
      <text:p text:style-name="Standard"><text:span text:style-name="T6">Power:</text:span><text:span text:style-name="T4"> 15</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Instantaneous</text:span></text:p>
      <text:p text:style-name="P8"/>
      <text:p text:style-name="Standard"><text:span text:style-name="T2">Remove disease </text:span><text:span text:style-name="T4">cures all diseases that the subject is suffering from. The spell also kills parasites, including green slime and others. Certain special diseases may not be countered by this spell or may be countered only by a caster of a certain level or higher.</text:span></text:p>
      <text:p text:style-name="Standard"><text:span text:style-name="T2">Note: </text:span><text:span text:style-name="T4">Since the spell’s duration is instantaneous, it does not prevent reinfection after a new exposure to the same disease at a later date.</text:span></text:p>
      <text:p text:style-name="P13"/>
      <text:p text:style-name="P3">Slow (Arcane)</text:p>
      <text:p text:style-name="Standard"><text:span text:style-name="T6">Power:</text:span><text:span text:style-name="T4"> 15</text:span></text:p>
      <text:p text:style-name="Standard"><text:span text:style-name="T6">Range:</text:span><text:span text:style-name="T4"> Close (25 ft. + 5 ft./ 10 points of margin of success)</text:span></text:p>
      <text:p text:style-name="Standard"><text:span text:style-name="T6">Targets:</text:span><text:span text:style-name="T4"> One creature +1/10 points of margin of success, no two of which can be more than 30 ft. apart</text:span></text:p>
      <text:p text:style-name="Standard"><text:span text:style-name="T6">Duration:</text:span><text:span text:style-name="T4"> 1 round +1rnd/10 points of margin of success</text:span></text:p>
      <text:p text:style-name="P8"/>
      <text:p text:style-name="Standard"><text:span text:style-name="T4">An affected creature moves and attacks at a drastically slowed rate. A </text:span><text:span text:style-name="T2">slowed </text:span><text:span text:style-name="T4">creature loses one of its combat actions for the duration of the spell (if this would reduce its actions to 0, the creature can act only once every two round). Additionally, it takes a –10 penalty on attack and to all Dodge maneuvers. A </text:span><text:span text:style-name="T2">slowed </text:span><text:span text:style-name="T4">creature moves at half its normal speed (round down to the next 5-foot increment), which affects the creature’s jumping distance as normal for decreased speed. Multiple </text:span><text:span text:style-name="T2">slow </text:span><text:span text:style-name="T4">effects don’t stack. </text:span><text:span text:style-name="T2">Slow </text:span><text:span text:style-name="T4">counters and dispels </text:span><text:span text:style-name="T2">haste</text:span><text:span text:style-name="T4">.</text:span></text:p>
      <text:p text:style-name="P3"/>
      <text:p text:style-name="P3">Speak with Dead (Divine/Arcane)</text:p>
      <text:p text:style-name="Standard"><text:span text:style-name="T6">Power:</text:span><text:span text:style-name="T4"> 15</text:span></text:p>
      <text:p text:style-name="Standard"><text:soft-page-break/><text:span text:style-name="T6">Range:</text:span><text:span text:style-name="T4"> 10 ft.</text:span></text:p>
      <text:p text:style-name="Standard"><text:span text:style-name="T6">Target:</text:span><text:span text:style-name="T4"> One dead creature</text:span></text:p>
      <text:p text:style-name="Standard"><text:span text:style-name="T6">Duration:</text:span><text:span text:style-name="T4"> 1 min. +1min/10 points of margin of success</text:span></text:p>
      <text:p text:style-name="P8"/>
      <text:p text:style-name="P13">You grant the semblance of life and intellect to a corpse, allowing it to answer several questions that you put to it. You may ask one question per two caster levels. Unasked questions are wasted if the duration expires. The corpse’s knowledge is limited to what the creature knew during life, including the languages it spoke (if any). Answers are usually brief, cryptic, or repetitive. If the creature’s alignment was different from yours, the corpse gets a Will save to resist the spell as if it were alive.</text:p>
      <text:p text:style-name="Standard"><text:span text:style-name="T4">If the corpse has been subject to </text:span><text:span text:style-name="T2">speak with dead </text:span><text:span text:style-name="T4">within the past week, the new spell fails. You can cast this spell on a corpse that has been deceased for any amount of time, but the body must be mostly intact to be able to respond. A damaged corpse may be able to give partial answers or partially correct answers, but it must at least have a mouth in order to speak at all. </text:span></text:p>
      <text:p text:style-name="P13">This spell does not let you actually speak to the person (whose soul has departed). It instead draws on the imprinted knowledge stored in the corpse. The partially animated body retains the imprint of the soul that once inhabited it, and thus it can speak with all the knowledge that the creature had while alive. The corpse, however, cannot learn new information.</text:p>
      <text:p text:style-name="P13">Indeed, it can’t even remember being questioned.</text:p>
      <text:p text:style-name="P13">This spell does not affect a corpse that has been turned into an undead creature.</text:p>
      <text:p text:style-name="P13"/>
      <text:p text:style-name="P3">Suggestion (Arcane)</text:p>
      <text:p text:style-name="Standard"><text:span text:style-name="T6">Power:</text:span><text:span text:style-name="T4"> 15</text:span></text:p>
      <text:p text:style-name="Standard"><text:span text:style-name="T6">Range:</text:span><text:span text:style-name="T4"> Close (25 ft. + 5 ft./ 10 points of margin of success)</text:span></text:p>
      <text:p text:style-name="Standard"><text:span text:style-name="T6">Target:</text:span><text:span text:style-name="T4"> One living creature</text:span></text:p>
      <text:p text:style-name="Standard"><text:span text:style-name="T6">Duration:</text:span><text:span text:style-name="T4"> 1 hour +1hr/10 points of margin of success or until completed</text:span></text:p>
      <text:p text:style-name="P8"/>
      <text:p text:style-name="Standard"><text:span text:style-name="T4">You influence the actions of the target creature by suggesting a course of activity (limited to a sentence or two). The </text:span><text:span text:style-name="T2">suggestion </text:span><text:span text:style-name="T4">must be worded in such a manner as to make the activity sound reasonable. Asking the creature to do some obviously harmful act automatically negates the effect of the spell. </text:span></text:p>
      <text:p text:style-name="P13">The suggested course of activity can continue for the entire duration. If the suggested activity can be completed in a shorter time, the spell ends when the subject finishes what it was asked to do. You can instead specify conditions that will trigger a special activity during the duration. If the condition is not met before the spell duration expires, the activity is not performed.</text:p>
      <text:p text:style-name="P13"/>
      <text:p text:style-name="P3">Water Breathing (Arcane)</text:p>
      <text:p text:style-name="Standard"><text:span text:style-name="T6">Power:</text:span><text:span text:style-name="T4"> 15</text:span></text:p>
      <text:p text:style-name="Standard"><text:span text:style-name="T6">Range:</text:span><text:span text:style-name="T4"> Touch</text:span></text:p>
      <text:p text:style-name="Standard"><text:span text:style-name="T6">Target:</text:span><text:span text:style-name="T4"> Living creatures touched</text:span></text:p>
      <text:p text:style-name="Standard"><text:span text:style-name="T6">Duration:</text:span><text:span text:style-name="T4"> 2 hours +2hr/10 points of margin of success</text:span></text:p>
      <text:p text:style-name="P8"/>
      <text:p text:style-name="P13">The transmuted creatures can breathe water freely. Divide the duration evenly among all the creatures you touch.</text:p>
      <text:p text:style-name="P13">The spell does not make creatures unable to breathe air.</text:p>
      <text:p text:style-name="P13"/>
      <text:p text:style-name="P3">Water Walk (Arcane)</text:p>
      <text:p text:style-name="Standard"><text:span text:style-name="T6">Power:</text:span><text:span text:style-name="T4"> 15</text:span></text:p>
      <text:p text:style-name="Standard"><text:span text:style-name="T6">Range:</text:span><text:span text:style-name="T4"> Touch</text:span></text:p>
      <text:p text:style-name="Standard"><text:span text:style-name="T6">Targets:</text:span><text:span text:style-name="T4"> One touched creature +1/10 points of margin of success</text:span></text:p>
      <text:p text:style-name="Standard"><text:span text:style-name="T6">Duration:</text:span><text:span text:style-name="T4"> 10 min. +10 min/10 points of margin of success</text:span></text:p>
      <text:p text:style-name="P8"/>
      <text:p text:style-name="P13">The transmuted creatures can tread on any liquid as if it were firm ground. Mud, oil, snow, quicksand, running water, ice, and even lava can be traversed easily, since the subjects’ feet hover an inch or two above the surface. (Creatures crossing molten lava still take damage from the heat because they are near it.) The subjects can walk, run, charge, or otherwise move across the surface as if it were normal ground.</text:p>
      <text:p text:style-name="P13">If the spell is cast underwater (or while the subjects are partially or wholly submerged in whatever liquid they are in), the subjects are borne toward the surface at 60 feet per round until they can stand on it.</text:p>
      <text:p text:style-name="P13"/>
      <text:p text:style-name="P3">Wind Wall (Arcane)</text:p>
      <text:p text:style-name="Standard"><text:span text:style-name="T6">Power:</text:span><text:span text:style-name="T4"> 15</text:span></text:p>
      <text:p text:style-name="Standard"><text:soft-page-break/><text:span text:style-name="T6">Range: </text:span><text:span text:style-name="T4">Medium (100 ft. + 10 ft./ 10 points of margin of success)</text:span></text:p>
      <text:p text:style-name="Standard"><text:span text:style-name="T6">Effect: </text:span><text:span text:style-name="T4">Wall up to 10 ft./level long and 5 ft./ 10 points of margin of success high</text:span></text:p>
      <text:p text:style-name="Standard"><text:span text:style-name="T6">Duration:</text:span><text:span text:style-name="T4"> 1 round +1rnd/10 points of margin of success</text:span></text:p>
      <text:p text:style-name="P8"/>
      <text:p text:style-name="Standard"><text:span text:style-name="T4">An invisible vertical curtain of wind appears. It is 2 feet thick and of considerable strength. It is a roaring blast sufficient to blow away any bird smaller than an eagle, or tear papers and similar materials from unsuspecting hands. (A Reflex save allows a creature to maintain its grasp on an object.) Tiny and Small flying creatures cannot pass through the barrier. Loose materials and cloth garments fly upward when caught in a </text:span><text:span text:style-name="T2">wind wall. </text:span><text:span text:style-name="T4">Arrows and bolts are deflected upward and miss, while any other normal ranged weapon passing through the wall has a 30% miss chance. (A giant-thrown boulder, a siege </text:span><text:span text:style-name="T4">engine projectile, and other massive ranged weapons are not affected.) Gases, most gaseous breath weapons, and creatures in gaseous form cannot pass through the wall (although it is no barrier to incorporeal creatures).</text:span></text:p>
      <text:p text:style-name="P13">While the wall must be vertical, you can shape it in any continuous path along the ground that you like. It is possible to create cylindrical or square wind walls to enclose specific points. </text:p>
      <text:p text:style-name="P13"/>
      <text:p text:style-name="P10"/>
      <text:p text:style-name="P46">Fourth Order</text:p>
      <text:p text:style-name="P3"/>
      <text:p text:style-name="P3">Arcane Eye (Arcane)</text:p>
      <text:p text:style-name="Standard"><text:span text:style-name="T6">Power:</text:span><text:span text:style-name="T4"> 17</text:span></text:p>
      <text:p text:style-name="Standard"><text:span text:style-name="T6">Range:</text:span><text:span text:style-name="T4"> Unlimited</text:span></text:p>
      <text:p text:style-name="Standard"><text:span text:style-name="T6">Effect: </text:span><text:span text:style-name="T4">Magical sensor</text:span></text:p>
      <text:p text:style-name="Standard"><text:span text:style-name="T6">Duration:</text:span><text:span text:style-name="T4"> 1 min + 1min/10 points of margin of success</text:span></text:p>
      <text:p text:style-name="P8"/>
      <text:p text:style-name="Standard"><text:span text:style-name="T4">You create an invisible magical sensor that sends you visual information. You can create the </text:span><text:span text:style-name="T2">arcane eye </text:span><text:span text:style-name="T4">at any point you can see, but it can then travel outside your line of sight without hindrance. An </text:span><text:span text:style-name="T2">arcane eye </text:span><text:span text:style-name="T4">travels at 30 feet per round (300 feet per minute) if viewing an area ahead as a human would (primarily looking at the floor) or 10 feet per round (100 feet per minute) if examining the ceiling and walls as well as the floor ahead. It sees exactly as you would see if you were there.</text:span></text:p>
      <text:p text:style-name="Standard"><text:span text:style-name="T4">The eye can travel in any direction as long as the spell lasts. Solid barriers block its passage, but it can pass through a hole or space as small as 1 inch in diameter. The eye can’t enter another plane of existence, even through a </text:span><text:span text:style-name="T2">gate </text:span><text:span text:style-name="T4">or similar magical portal.</text:span></text:p>
      <text:p text:style-name="Standard"><text:span text:style-name="T4">You must concentrate to use an </text:span><text:span text:style-name="T2">arcane eye. </text:span><text:span text:style-name="T4">If you do not concentrate, the eye is inert until you again concentrate.</text:span></text:p>
      <text:p text:style-name="P5"/>
      <text:p text:style-name="P3">Bestow Curse (Divine)</text:p>
      <text:p text:style-name="Standard"><text:span text:style-name="T6">Power:</text:span><text:span text:style-name="T4"> 17</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Permanent</text:span></text:p>
      <text:p text:style-name="P8"/>
      <text:p text:style-name="P13">You place a curse on the subject. Choose one of the following three effects.</text:p>
      <text:p text:style-name="Standard"><text:span text:style-name="T12">• </text:span><text:span text:style-name="T4">–12 decrease to an ability score (minimum 1).</text:span></text:p>
      <text:p text:style-name="Standard"><text:span text:style-name="T12">• </text:span><text:span text:style-name="T4">–20 penalty on attack rolls, saves, ability checks, and skill checks.</text:span></text:p>
      <text:p text:style-name="Standard"><text:span text:style-name="T12">• </text:span><text:span text:style-name="T4">Each turn, the target has a 50% chance to act normally; otherwise, it takes no action.</text:span></text:p>
      <text:p text:style-name="P13">You may also invent your own curse, but it should be no more powerful than those described above.</text:p>
      <text:p text:style-name="Standard"><text:span text:style-name="T4">The </text:span><text:span text:style-name="T2">curse </text:span><text:span text:style-name="T4">bestowed by this spell cannot be dispelled, but it can be removed with a </text:span><text:span text:style-name="T2">remove curse </text:span><text:span text:style-name="T4">spell.</text:span></text:p>
      <text:p text:style-name="P13"/>
      <text:p text:style-name="P3">Divination (Divine)</text:p>
      <text:p text:style-name="Standard"><text:span text:style-name="T6">Power:</text:span><text:span text:style-name="T4"> 17</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Instantaneous </text:span></text:p>
      <text:p text:style-name="P13"/>
      <text:p text:style-name="Standard"><text:span text:style-name="T4">Similar to </text:span><text:span text:style-name="T2">augury </text:span><text:span text:style-name="T4">but more powerful, a </text:span><text:span text:style-name="T2">divination </text:span><text:span text:style-name="T4">spell can provide you with a useful piece of advice in reply to a question concerning a specific goal, event, or activity that is to occur within one week. The advice can be as simple as a short phrase, or it might take the form of a cryptic rhyme or omen. If your party doesn’t act on the information, the conditions may change so that the information is no longer useful. The base chance for a correct </text:span><text:span text:style-name="T2">divination </text:span><text:span text:style-name="T4">is 70% + 1% per 5 points of margin of success, to a maximum of 90%. If the dice roll fails, you know the spell failed, unless specific magic yielding false information is at work.</text:span></text:p>
      <text:p text:style-name="Standard"><text:span text:style-name="T4">As with </text:span><text:span text:style-name="T2">augury</text:span><text:span text:style-name="T4">, multiple </text:span><text:span text:style-name="T2">divinations </text:span><text:span text:style-name="T4">about the same topic by the same caster use the same dice result as the first </text:span><text:span text:style-name="T2">divination </text:span><text:span text:style-name="T4">spell and yield the same answer each time.</text:span></text:p>
      <text:p text:style-name="P13"/>
      <text:p text:style-name="P3">Fire Shield (Arcane)</text:p>
      <text:p text:style-name="Standard"><text:span text:style-name="T6">Power:</text:span><text:span text:style-name="T4"> 17</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 round +1rnd/10 points of margin of success</text:span></text:p>
      <text:p text:style-name="P13"/>
      <text:p text:style-name="P13">This spell wreathes you in flame and causes damage to each creature that attacks you in melee. The flames also protect you from either cold-based or fire-based attacks (your choice).</text:p>
      <text:p text:style-name="Standard"><text:span text:style-name="T4">Any creature striking you with its body or a handheld weapon deals normal damage, but at the same time the attacker takes 1d4+1 points of damage to the location used to attack you. This damage is either cold damage (if the </text:span><text:span text:style-name="T2">shield </text:span><text:span text:style-name="T4">protects against </text:span><text:soft-page-break/><text:span text:style-name="T4">fire-based attacks) or fire damage (if the </text:span><text:span text:style-name="T2">shield </text:span><text:span text:style-name="T4">protects against cold-based attacks). </text:span></text:p>
      <text:p text:style-name="P13">When casting this spell, you appear to immolate yourself, but the flames are thin and wispy, giving off light equal to only half the illumination of a normal torch (10 feet).</text:p>
      <text:p text:style-name="Standard"><text:span text:style-name="T2">Warm Shield: </text:span><text:span text:style-name="T4">The flames are warm to the touch. You take only half damage from cold-based attacks. If such an attack allows a RR for half damage, you take no damage on a successful RR.</text:span></text:p>
      <text:p text:style-name="Standard"><text:span text:style-name="T2">Chill Shield: </text:span><text:span text:style-name="T4">The flames are cool to the touch. You take only half damage from fire-based attacks. If such an attack allows a RR for half damage, you take no damage on a successful RR.</text:span></text:p>
      <text:p text:style-name="P13"/>
      <text:p text:style-name="P3">Freedom of Movement (Arcane)</text:p>
      <text:p text:style-name="Standard"><text:span text:style-name="T6">Power:</text:span><text:span text:style-name="T4"> 17</text:span></text:p>
      <text:p text:style-name="Standard"><text:span text:style-name="T6">Range:</text:span><text:span text:style-name="T4"> Personal or touch</text:span></text:p>
      <text:p text:style-name="Standard"><text:span text:style-name="T6">Target:</text:span><text:span text:style-name="T4"> You or creature touched</text:span></text:p>
      <text:p text:style-name="Standard"><text:span text:style-name="T6">Duration:</text:span><text:span text:style-name="T4"> 10 min. +10min/10 points of margin of success</text:span></text:p>
      <text:p text:style-name="P8"/>
      <text:p text:style-name="Standard"><text:span text:style-name="T4">This spell enables you or a creature you touch to move and attack normally for the duration of the spell, even under the influence of magic that usually impedes movement, such as paralysis, </text:span><text:span text:style-name="T2">solid fog</text:span><text:span text:style-name="T4">, </text:span><text:span text:style-name="T2">slow</text:span><text:span text:style-name="T4">, and </text:span><text:span text:style-name="T2">web</text:span><text:span text:style-name="T4">. The subject automatically succeeds on any check made to resist a grapple attempt, as well as checks made to escape a grapple or a pin.</text:span></text:p>
      <text:p text:style-name="Standard"><text:span text:style-name="T4">The spell also allows the subject to move and attack normally while underwater, even with slashing weapons such as axes and swords or with bludgeoning weapons such as flails, hammers, and maces, provided that the weapon is wielded in the hand rather than hurled. The </text:span><text:span text:style-name="T2">freedom of movement </text:span><text:span text:style-name="T4">spell does not, however, allow water breathing.</text:span></text:p>
      <text:p text:style-name="P13"/>
      <text:p text:style-name="P3">Ice Storm (Arcane)</text:p>
      <text:p text:style-name="Standard"><text:span text:style-name="T6">Power:</text:span><text:span text:style-name="T4"> 17</text:span></text:p>
      <text:p text:style-name="Standard"><text:span text:style-name="T6">Range:</text:span><text:span text:style-name="T4"> Long (400 ft. + 40 ft./10 points of margin of success)</text:span></text:p>
      <text:p text:style-name="Standard"><text:span text:style-name="T6">Area:</text:span><text:span text:style-name="T4"> Cylinder (20-ft. radius, 40 ft. high)</text:span></text:p>
      <text:p text:style-name="Standard"><text:span text:style-name="T6">Duration:</text:span><text:span text:style-name="T4"> 1 full round</text:span></text:p>
      <text:p text:style-name="P8"/>
      <text:p text:style-name="Standard"><text:span text:style-name="T4">Great magical hailstones pound down for 1 full round, dealing 5d6 points of area bludgeoning and cold damage to every creature in the area. A –20 penalty applies to each Perception maneuver made within the </text:span><text:span text:style-name="T2">ice storm</text:span><text:span text:style-name="T4">’s effect, and all land movement within its area is at half speed. </text:span></text:p>
      <text:p text:style-name="P13"/>
      <text:p text:style-name="P3">Locate Creature (Divine)</text:p>
      <text:p text:style-name="Standard"><text:span text:style-name="T6">Power:</text:span><text:span text:style-name="T4"> 17</text:span></text:p>
      <text:p text:style-name="Standard"><text:span text:style-name="T6">Duration:</text:span><text:span text:style-name="T4"> 10 min. +10min/10 points of margin of success</text:span></text:p>
      <text:p text:style-name="P13"/>
      <text:p text:style-name="Standard"><text:span text:style-name="T4">This spell functions like </text:span><text:span text:style-name="T2">locate object, </text:span><text:span text:style-name="T4">except this spell locates a known or familiar creature.</text:span></text:p>
      <text:p text:style-name="P13">You slowly turn and sense when you are facing in the direction of the creature to be located, provided it is within range. You also know in which direction the creature is moving, if any.</text:p>
      <text:p text:style-name="P13">The spell can locate a creature of a specific kind or a specific creature known to you. It cannot find a creature of a certain type. To find a kind of creature, you must have seen such a creature up close (within 30 feet) at least once.</text:p>
      <text:p text:style-name="Standard"><text:span text:style-name="T4">Running water blocks the spell. It cannot detect objects. It can be fooled by </text:span><text:span text:style-name="T2">mislead</text:span><text:span text:style-name="T4">, </text:span><text:span text:style-name="T2">nondetection</text:span><text:span text:style-name="T4">, and </text:span><text:span text:style-name="T2">polymorph </text:span><text:span text:style-name="T4">spells.</text:span></text:p>
      <text:p text:style-name="P3"/>
      <text:p text:style-name="P3">Modify Memory (Arcane)</text:p>
      <text:p text:style-name="Standard"><text:span text:style-name="T6">Power:</text:span><text:span text:style-name="T4"> 17</text:span></text:p>
      <text:p text:style-name="Standard"><text:span text:style-name="T6">Range:</text:span><text:span text:style-name="T4"> Close (25 ft. + 5 ft./20 points of margin of success)</text:span></text:p>
      <text:p text:style-name="Standard"><text:span text:style-name="T6">Target:</text:span><text:span text:style-name="T4"> One living creature</text:span></text:p>
      <text:p text:style-name="Standard"><text:span text:style-name="T6">Duration:</text:span><text:span text:style-name="T4"> Permanent</text:span></text:p>
      <text:p text:style-name="P8"/>
      <text:p text:style-name="P13">You reach into the subject’s mind and modify as many as 5 minutes of its memories in one of the following ways.</text:p>
      <text:p text:style-name="Standard"><text:span text:style-name="T12">• </text:span><text:span text:style-name="T4">Eliminate all memory of an event the subject actually experienced. This spell cannot negate </text:span><text:span text:style-name="T2">charm, geas/quest, suggestion, </text:span><text:span text:style-name="T4">or similar spells.</text:span></text:p>
      <text:p text:style-name="Standard"><text:span text:style-name="T12">• </text:span><text:span text:style-name="T4">Allow the subject to recall with perfect clarity an event it actually experienced.</text:span></text:p>
      <text:p text:style-name="Standard"><text:span text:style-name="T12">• </text:span><text:span text:style-name="T4">Change the details of an event the subject actually experienced.</text:span></text:p>
      <text:p text:style-name="Standard"><text:span text:style-name="T12">• </text:span><text:span text:style-name="T4">Implant a memory of an event the subject never experienced.</text:span></text:p>
      <text:p text:style-name="P13">If the subject fails his RR, you proceed with the spell by spending as much as 5 minutes (a period of time equal to the amount of memory time you want to modify) visualizing the memory you wish to modify in the subject. If your concentration is disturbed before the visualization is complete, or if the subject is ever beyond the spell’s range during this <text:soft-page-break/>time, the spell is lost.</text:p>
      <text:p text:style-name="P13">A modified memory does not necessarily affect the subject’s actions, particularly if it contradicts the creature’s natural inclinations. An illogical modified memory is dismissed by the creature as a bad dream or a memory muddied by too much wine. </text:p>
      <text:p text:style-name="P13"/>
      <text:p text:style-name="P3">Neutralize Poison (Divine)</text:p>
      <text:p text:style-name="Standard"><text:span text:style-name="T6">Power:</text:span><text:span text:style-name="T4"> 17</text:span></text:p>
      <text:p text:style-name="Standard"><text:span text:style-name="T6">Range:</text:span><text:span text:style-name="T4"> Touch</text:span></text:p>
      <text:p text:style-name="Standard"><text:span text:style-name="T6">Target:</text:span><text:span text:style-name="T4"> Creature or object of up to 1 cu. ft./10 points of margin of success touched</text:span></text:p>
      <text:p text:style-name="Standard"><text:span text:style-name="T6">Duration:</text:span><text:span text:style-name="T4"> 10 min. +10min/10 points of margin of success</text:span></text:p>
      <text:p text:style-name="P8"/>
      <text:p text:style-name="P13">You detoxify any sort of venom in the creature or object touched. A poisoned creature suffers no additional effects from the poison, and any temporary effects are ended, but the spell does not reverse instantaneous effects, such as hit point damage, temporary ability damage, or effects that don’t go away on their own.</text:p>
      <text:p text:style-name="P13">The creature is immune to any poison it is exposed to during the duration of the spell. This spell can instead neutralize the poison in a poisonous creature or object for the duration of the spell, at the caster’s option.</text:p>
      <text:p text:style-name="P10"/>
      <text:p text:style-name="P3">Phantasmal Killer (Arcane)</text:p>
      <text:p text:style-name="Standard"><text:span text:style-name="T6">Power:</text:span><text:span text:style-name="T4"> 17</text:span></text:p>
      <text:p text:style-name="Standard"><text:span text:style-name="T6">Range: </text:span><text:span text:style-name="T4">Medium (100 ft. + 10 ft./10 points of margin of success)</text:span></text:p>
      <text:p text:style-name="Standard"><text:span text:style-name="T6">Target:</text:span><text:span text:style-name="T4"> One living creature</text:span></text:p>
      <text:p text:style-name="Standard"><text:span text:style-name="T6">Duration:</text:span><text:span text:style-name="T4"> Instantaneous</text:span></text:p>
      <text:p text:style-name="P8"/>
      <text:p text:style-name="P13">You create a phantasmal image of the most fearsome creature imaginable to the subject simply by forming the fears of the subject’s subconscious mind into something that its conscious mind can visualize: this most horrible beast. Only the spell’s subject can see the phantasmal killer. You see only a vague shape. The target first gets a Magic RR save to recognize the image as unreal. If that save fails, the phantasm touches the subject, and the subject must succeed on a Physical RR or die from fear. Even if the Physical RR is successful, the subject takes 2d6 points of Body damage.</text:p>
      <text:p text:style-name="Standard"><text:span text:style-name="T4">If the subject of a </text:span><text:span text:style-name="T2">phantasmal killer </text:span><text:span text:style-name="T4">attack succeeds in disbelieving and is capable of telepathy</text:span><text:span text:style-name="T2">, </text:span><text:span text:style-name="T4">the beast can be turned upon you. You must then disbelieve it or become subject to its deadly fear attack.</text:span></text:p>
      <text:p text:style-name="P13"/>
      <text:p text:style-name="P3">Polymorph (Arcane)</text:p>
      <text:p text:style-name="Standard"><text:span text:style-name="T6">Power:</text:span><text:span text:style-name="T4"> 17</text:span></text:p>
      <text:p text:style-name="Standard"><text:span text:style-name="T6">Range:</text:span><text:span text:style-name="T4"> Touch</text:span></text:p>
      <text:p text:style-name="Standard"><text:span text:style-name="T6">Target: </text:span><text:span text:style-name="T4">Willing living creature touched</text:span></text:p>
      <text:p text:style-name="Standard"><text:span text:style-name="T6">Duration:</text:span><text:span text:style-name="T4"> 1 min. +1min/10 points of margin of success</text:span></text:p>
      <text:p text:style-name="P8"/>
      <text:p text:style-name="P13">You change the willing subject into another form of living creature. The new form may be of the same type as the subject or any of the following types: aberration, animal, dragon, fey, giant, humanoid, magical beast, monstrous humanoid, ooze, plant, or vermin. The assumed form can’t be higher in level than you (or the subject’s level, whichever is lower). You can’t cause a subject to assume a form smaller than Fine, nor can you cause a subject to assume an incorporeal or gaseous form. The subject’s creature type and subtype (if any) change to match the new form.</text:p>
      <text:p text:style-name="P13">Upon changing, the subject regains lost hit points as if it had rested for a night (though this healing does not restore temporary ability damage and provide other benefits of resting; and changing back does not heal the subject further). If slain, the subject reverts to its original form, though it remains dead.</text:p>
      <text:p text:style-name="P13">The subject gains the Strength, Dexterity, and Constitution scores of the new form but retains its own Intelligence, Self Discipline, and Charisma scores. It also gains all extraordinary special attacks possessed by the form but does not gain the extraordinary special qualities possessed by the new form or any supernatural or spell-like abilities.</text:p>
      <text:p text:style-name="Standard"><text:span text:style-name="T4">Incorporeal or gaseous creatures are immune to being </text:span><text:span text:style-name="T2">polymorphed</text:span><text:span text:style-name="T4">, and a creature with the shapechanger subtype can revert to its natural form as a standard action.</text:span></text:p>
      <text:p text:style-name="P10"/>
      <text:p text:style-name="P3">Wall of Fire (Arcane)</text:p>
      <text:p text:style-name="Standard"><text:span text:style-name="T6">Power:</text:span><text:span text:style-name="T4"> 17</text:span></text:p>
      <text:p text:style-name="Standard"><text:span text:style-name="T6">Range: </text:span><text:span text:style-name="T4">Medium (100 ft. + 10 ft./ 10 points of margin of success)</text:span></text:p>
      <text:p text:style-name="Standard"><text:span text:style-name="T6">Effect:</text:span><text:span text:style-name="T4"> Opaque sheet of flame </text:span></text:p>
      <text:p text:style-name="Standard"><text:span text:style-name="T6">Duration:</text:span><text:span text:style-name="T4"> Concentration + 1 round/level10 points of margin of success </text:span></text:p>
      <text:p text:style-name="P13"/>
      <text:p text:style-name="P13"><text:soft-page-break/>An immobile, blazing curtain of shimmering violet fire springs into existence. One side of the wall, selected by you, sends forth waves of heat, dealing 2d4 points of fire area damage to creatures within 10. The wall deals this damage when it appears and on your turn each round to all creatures in the area. In addition, the wall deals 2d8 points of area fire to any creature passing through it. The wall deals double damage to undead creatures.</text:p>
      <text:p text:style-name="P13">If you evoke the wall so that it appears where creatures are, each creature takes damage as if passing through the wall. If any 5-foot length of wall takes 20 points of cold damage or more in 1 round, that length goes out.</text:p>
      <text:p text:style-name="P13"/>
      <text:p text:style-name="P3">Wall of Ice (Arcane)</text:p>
      <text:p text:style-name="Standard"><text:span text:style-name="T6">Power:</text:span><text:span text:style-name="T4"> 17</text:span></text:p>
      <text:p text:style-name="Standard"><text:span text:style-name="T6">Range: </text:span><text:span text:style-name="T4">Medium (100 ft. + 10 ft./ 10 points of margin of success)</text:span></text:p>
      <text:p text:style-name="Standard"><text:span text:style-name="T6">Effect:</text:span><text:span text:style-name="T4"> Anchored plane of ice</text:span></text:p>
      <text:p text:style-name="Standard"><text:span text:style-name="T6">Duration:</text:span><text:span text:style-name="T4"> 1 min. +1min/10 points of margin of success</text:span></text:p>
      <text:p text:style-name="P8"/>
      <text:p text:style-name="Standard"><text:span text:style-name="T4">This spell creates an anchored plane of ice or a hemisphere of ice, depending on the version selected. A </text:span><text:span text:style-name="T2">wall of ice </text:span><text:span text:style-name="T4">cannot form in an area occupied by physical objects or creatures. Its surface must be smooth and unbroken when created. </text:span></text:p>
      <text:p text:style-name="Standard"><text:span text:style-name="T4">Fire can melt a </text:span><text:span text:style-name="T2">wall of ice, </text:span><text:span text:style-name="T4">and it deals full damage to the wall (instead of the normal half damage taken by objects). Suddenly melting a </text:span><text:span text:style-name="T2">wall of ice </text:span><text:span text:style-name="T4">creates a great cloud of steamy fog that lasts for 10 minutes.</text:span></text:p>
      <text:p text:style-name="Standard"><text:span text:style-name="T2">Ice Plane: </text:span><text:span text:style-name="T4">A sheet of strong, hard ice appears. The wall is 1 inch thick per 10 points of margin of success. It covers up to a 10-foot-square area per 10 points of margin of success. The plane can be oriented in any fashion as long as it is anchored. A vertical wall need only be anchored on the floor, while a horizontal or slanting wall must be anchored on two opposite sides.</text:span></text:p>
      <text:p text:style-name="P13">Each 10-foot square of wall has 3 hit points per inch of thickness. Creatures can hit the wall automatically. A section of wall whose hit points drop to 0 is breached</text:p>
      <text:p text:style-name="P13">Even when the ice has been broken through, a sheet of frigid air remains. Any creature stepping through it (including the one who broke through the wall) takes 1d6 points of area cold.</text:p>
      <text:p text:style-name="Standard"><text:span text:style-name="T2">Hemisphere: </text:span><text:span text:style-name="T4">The wall takes the form of a hemisphere whose maximum radius is 3 feet + 1 foot per 10 points of margin of success. The </text:span><text:span text:style-name="T2">hemisphere </text:span><text:span text:style-name="T4">is as hard to break through as the </text:span><text:span text:style-name="T2">ice plane </text:span><text:span text:style-name="T4">form, but it does not deal damage to those who go through a breach.</text:span></text:p>
      <text:p text:style-name="P10"/>
      <text:p text:style-name="P46">Fifth Order</text:p>
      <text:p text:style-name="P3"/>
      <text:p text:style-name="P3">Cloudkill (Arcane)</text:p>
      <text:p text:style-name="Standard"><text:span text:style-name="T6">Power:</text:span><text:span text:style-name="T4"> 19</text:span></text:p>
      <text:p text:style-name="Standard"><text:span text:style-name="T6">Range: </text:span><text:span text:style-name="T4">Medium (100 ft. + 10 ft./10 points of margin of success)</text:span></text:p>
      <text:p text:style-name="Standard"><text:span text:style-name="T6">Effect:</text:span><text:span text:style-name="T4"> Cloud spreads in 20-ft. radius, 20 ft. high</text:span></text:p>
      <text:p text:style-name="Standard"><text:span text:style-name="T6">Duration:</text:span><text:span text:style-name="T4"> 1 min + 1min/ 10 points of margin of success</text:span></text:p>
      <text:p text:style-name="P8"/>
      <text:p text:style-name="Standard"><text:span text:style-name="T4">This spell generates a bank of fog, similar to a </text:span><text:span text:style-name="T2">fog cloud, </text:span><text:span text:style-name="T4">except that its vapors are yellowish green and poisonous. These vapors automatically kill any living creature with 3 or fewer levels (no save). A living creature of level 4 to 6 is slain unless it succeeds on a Physical RR (in which case it takes 1d10 points of Body damage on your turn each round while in the cloud).</text:span></text:p>
      <text:p text:style-name="P13">A living creature with 6 or more levels takes 1d10 points of Body damage on your turn each round while in the cloud (a successful Physical RR halves this damage). Holding one’s breath doesn’t help and armor doesn't prevent the damage done by the cloud, but creatures immune to poison are unaffected by the spell.</text:p>
      <text:p text:style-name="Standard"><text:span text:style-name="T4">The </text:span><text:span text:style-name="T2">cloudkill </text:span><text:span text:style-name="T4">moves away from you at 10 feet per round, rolling along the surface of the ground.</text:span></text:p>
      <text:p text:style-name="P13">Because the vapors are heavier than air, they sink to the lowest level of the land, even pouring down den or sinkhole openings. It cannot penetrate liquids, nor can it be cast underwater.</text:p>
      <text:p text:style-name="P3"/>
      <text:p text:style-name="P3">Commune (Divine)</text:p>
      <text:p text:style-name="Standard"><text:span text:style-name="T6">Power:</text:span><text:span text:style-name="T4"> 19</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1 round + 1rnd/10 points of margin of success</text:span></text:p>
      <text:p text:style-name="P13"/>
      <text:p text:style-name="P13">You contact your patron and ask questions that can be answered by a simple yes or no. You are allowed one such question per caster level. The answers given are correct within the limits of the entity’s knowledge. “Unclear” is a legitimate answer, because powerful beings of the Outer Planes are not necessarily omniscient. In cases where a one-word answer would be misleading or contrary to the patron’s interests, a short phrase (five words or less) may be given as an answer instead.</text:p>
      <text:p text:style-name="P13">The spell, at best, provides information to aid character decisions. The entities contacted structure their answers to further their own purposes. If you lag, discuss the answers, or go off to do anything else, the spell ends.</text:p>
      <text:p text:style-name="P3"/>
      <text:p text:style-name="P3">Cone of Cold (Arcane)</text:p>
      <text:p text:style-name="Standard"><text:span text:style-name="T6">Power:</text:span><text:span text:style-name="T4"> 19</text:span></text:p>
      <text:p text:style-name="Standard"><text:span text:style-name="T6">Range:</text:span><text:span text:style-name="T4"> 60 ft.</text:span></text:p>
      <text:p text:style-name="Standard"><text:span text:style-name="T6">Area:</text:span><text:span text:style-name="T4"> Cone-shaped burst</text:span></text:p>
      <text:p text:style-name="Standard"><text:span text:style-name="T6">Duration:</text:span><text:span text:style-name="T4"> Instantaneous</text:span></text:p>
      <text:p text:style-name="P8"/>
      <text:p text:style-name="Standard"><text:span text:style-name="T2">Cone of cold </text:span><text:span text:style-name="T4">creates an area of extreme cold, originating at your hand and extending outward in a cone. It drains heat, dealing 4d6 points of area cold damage, +1d6 per 10 points of margin of success (maximum 10d6). Missed targets takes half damage.</text:span></text:p>
      <text:p text:style-name="P13"/>
      <text:p text:style-name="P3">Dismissal (Divine)</text:p>
      <text:p text:style-name="Standard"><text:span text:style-name="T6">Power:</text:span><text:span text:style-name="T4"> 19</text:span></text:p>
      <text:p text:style-name="Standard"><text:span text:style-name="T6">Range:</text:span><text:span text:style-name="T4"> Close (25 ft. + 5 ft./20 points of margin of success)</text:span></text:p>
      <text:p text:style-name="Standard"><text:span text:style-name="T6">Target:</text:span><text:span text:style-name="T4"> One extraplanar creature</text:span></text:p>
      <text:p text:style-name="Standard"><text:span text:style-name="T6">Duration:</text:span><text:span text:style-name="T4"> Instantaneous</text:span></text:p>
      <text:p text:style-name="P8"/>
      <text:p text:style-name="P13">This spell forces an extraplanar creature back to its proper plane if it fails Magic RR. If the spell is successful, the creature is instantly whisked away, but there is a 20% chance of actually sending the subject to a plane other than its own.</text:p>
      <text:p text:style-name="P13"/>
      <text:p text:style-name="P3">Dominate (Arcane)</text:p>
      <text:p text:style-name="Standard"><text:span text:style-name="T6">Power:</text:span><text:span text:style-name="T4"> 19</text:span></text:p>
      <text:p text:style-name="Standard"><text:span text:style-name="T6">Range:</text:span><text:span text:style-name="T4"> Close (25 ft. + 5 ft./20 points of margin of success)</text:span></text:p>
      <text:p text:style-name="Standard"><text:span text:style-name="T6">Target:</text:span><text:span text:style-name="T4"> One humanoid</text:span></text:p>
      <text:p text:style-name="Standard"><text:soft-page-break/><text:span text:style-name="T6">Duration:</text:span><text:span text:style-name="T4"> One day +1 day/10 points of margin of success</text:span></text:p>
      <text:p text:style-name="P8"/>
      <text:p text:style-name="P13">You can control the actions of any humanoid creature through a telepathic link that you establish with the subject’s mind.</text:p>
      <text:p text:style-name="P13">If you and the subject have a common language, you can generally force the subject to perform as you desire, within the limits of its abilities. If no common language exists, you can communicate only basic commands, such as “Come here,” “Go there,” “Fight,” and “Stand still.” You know what the subject is experiencing, but you do not receive direct sensory input from it, nor can it communicate with you telepathically.</text:p>
      <text:p text:style-name="Standard"><text:span text:style-name="T4">Once you have given a </text:span><text:span text:style-name="T2">dominated </text:span><text:span text:style-name="T4">creature a command, it continues to attempt to carry out that command to the exclusion of all other activities except those necessary for day-to-day survival (such as sleeping, eating, and so forth). </text:span></text:p>
      <text:p text:style-name="P13">By concentrating fully on the spell, you can receive full sensory input as interpreted by the mind of the subject, though it still can’t communicate with you. You can’t actually see through the subject’s eyes, so it’s not as good as being there yourself, but you still get a good idea of what’s going on.</text:p>
      <text:p text:style-name="P13">Subjects resist this control, and any subject forced to take actions against its nature receives a new RR with a +10 bonus. Obviously self-destructive orders are not carried out. Once control is established, the range at which it can be exercised is unlimited, as long as you and the subject are on the same plane. You need not see the subject to control it.</text:p>
      <text:p text:style-name="P13">If you don’t spend at least 1 round concentrating on the spell each day, the subject receives a new RR to throw off the domination.</text:p>
      <text:p text:style-name="Standard"><text:span text:style-name="T2">Protection from evil </text:span><text:span text:style-name="T4">or a similar spell can prevent you from exercising control or using the telepathic link while the subject is so warded, but such an effect neither prevents the establishment of domination nor dispels it.</text:span></text:p>
      <text:p text:style-name="P13"/>
      <text:p text:style-name="P3">Dream (Divine)</text:p>
      <text:p text:style-name="Standard"><text:span text:style-name="T6">Power:</text:span><text:span text:style-name="T4"> 19</text:span></text:p>
      <text:p text:style-name="Standard"><text:span text:style-name="T6">Range:</text:span><text:span text:style-name="T4"> Unlimited</text:span></text:p>
      <text:p text:style-name="Standard"><text:span text:style-name="T6">Target:</text:span><text:span text:style-name="T4"> One living creature touched</text:span></text:p>
      <text:p text:style-name="Standard"><text:span text:style-name="T6">Duration:</text:span><text:span text:style-name="T4"> See text</text:span></text:p>
      <text:p text:style-name="P8"/>
      <text:p text:style-name="P13">You, or a messenger touched by you, sends a phantasmal message to others in the form of a dream. At the beginning of the spell, you must name the recipient or identify him or her by some title that leaves no doubt as to identity. The messenger then enters a trance, appears in the intended recipient’s dream, and delivers the message. The message can be of any length, and the recipient remembers it perfectly upon waking. The communication is one-way. The recipient cannot ask questions or offer information, nor can the messenger gain any information by observing the dreams of the recipient.</text:p>
      <text:p text:style-name="P13">Once the message is delivered, the messenger’s mind returns instantly to its body. The duration of the spell is the time required for the messenger to enter the recipient’s dream and deliver the message.</text:p>
      <text:p text:style-name="P13">If the recipient is awake when the spell begins, the messenger can choose to wake up (ending the spell) or remain in the trance. The messenger can remain in the trance until the recipient goes to sleep, then enter the recipient’s dream and deliver the message as normal. A messenger that is disturbed during the trance comes awake, ending the spell.</text:p>
      <text:p text:style-name="P13">Creatures who don’t sleep or don’t dream cannot be contacted by this spell.</text:p>
      <text:p text:style-name="P13">The messenger is unaware of its own surroundings or of the activities around it while in the trance. It is defenseless both physically and mentally (always fails any saving throw) while in the trance.</text:p>
      <text:p text:style-name="P10"/>
      <text:p text:style-name="P13"/>
      <text:p text:style-name="P3">Magic Jar (Arcane)</text:p>
      <text:p text:style-name="Standard"><text:span text:style-name="T6">Power:</text:span><text:span text:style-name="T4"> 19</text:span></text:p>
      <text:p text:style-name="Standard"><text:span text:style-name="T6">Range:</text:span><text:span text:style-name="T4"> Medium (100 ft. + 10 ft./10 points of margin of success l)</text:span></text:p>
      <text:p text:style-name="Standard"><text:span text:style-name="T6">Target:</text:span><text:span text:style-name="T4"> One creature</text:span></text:p>
      <text:p text:style-name="Standard"><text:span text:style-name="T6">Duration:</text:span><text:span text:style-name="T4"> 1 hour +1hr/10 points of margin of success or until you return to your body</text:span></text:p>
      <text:p text:style-name="P8"/>
      <text:p text:style-name="Standard"><text:span text:style-name="T4">By casting </text:span><text:span text:style-name="T2">magic jar, </text:span><text:span text:style-name="T4">you place your soul in a gem or large crystal (known as the </text:span><text:span text:style-name="T2">magic jar</text:span><text:span text:style-name="T4">), leaving your body lifeless. Then you can attempt to take control of a nearby body, forcing its soul into the </text:span><text:span text:style-name="T2">magic jar. </text:span><text:span text:style-name="T4">You may move back to the jar (thereby returning the trapped soul to its body) and attempt to possess another body. The spell ends when you send your soul back to your own body, leaving the receptacle empty.</text:span></text:p>
      <text:p text:style-name="Standard"><text:span text:style-name="T4">To cast the spell, the </text:span><text:span text:style-name="T2">magic jar </text:span><text:span text:style-name="T4">must be within spell range and you must know where it is, though you do not need line of sight or line of effect to it. When you transfer your soul upon casting, your body is, as near as anyone can tell, dead. </text:span></text:p>
      <text:p text:style-name="Standard"><text:span text:style-name="T4">While in the </text:span><text:span text:style-name="T2">magic jar, </text:span><text:span text:style-name="T4">you can sense and attack any life force within 10 feet per caster level (and on the same plane of existence). You do need line of effect from the jar to the creatures. You cannot determine the exact creature types or positions of these creatures. In a group of life forces, you can sense a difference of 4 or more levels between one creature </text:span><text:span text:style-name="T4">and another and can determine whether a life force is powered by positive or negative energy</text:span></text:p>
      <text:p text:style-name="P13">You could choose to take over either a stronger or a weaker creature, but which particular stronger or weaker creature you <text:soft-page-break/>attempt to possess is determined randomly.</text:p>
      <text:p text:style-name="Standard"><text:span text:style-name="T4">Attempting to possess a body is a full-round action. It is blocked by </text:span><text:span text:style-name="T2">protection from evil </text:span><text:span text:style-name="T4">or a similar ward. You possess the body and force the creature’s soul into the </text:span><text:span text:style-name="T2">magic jar </text:span><text:span text:style-name="T4">unless the subject succeeds on a Magic RR. Failure to take over the host leaves your life force in the </text:span><text:span text:style-name="T2">magic jar, </text:span><text:span text:style-name="T4">and the target automatically succeeds on further saving throws if you attempt to possess its body again.</text:span></text:p>
      <text:p text:style-name="Standard"><text:span text:style-name="T4">If you are successful, your life force occupies the host body, and the host’s life force is imprisoned in the </text:span><text:span text:style-name="T2">magic jar. </text:span><text:span text:style-name="T4">You keep your Intelligence, Self Discipline, Charisma, level, and mental abilities. The body retains its Strength, Dexterity, Constitution, natural abilities, and automatic abilities. A body with extra limbs does not allow you to make more attacks (or more advantageous two-weapon attacks) than normal. You can’t choose to activate the body’s extraordinary or supernatural abilities. The creature’s spells and spell-like abilities do not stay with the body.</text:span></text:p>
      <text:p text:style-name="Standard"><text:span text:style-name="T4">As a standard action, you can shift freely from a host to the </text:span><text:span text:style-name="T2">magic jar </text:span><text:span text:style-name="T4">if within range, sending the trapped soul back to its body. The spell ends when you shift from the jar to your own body.</text:span></text:p>
      <text:p text:style-name="Standard"><text:span text:style-name="T4">If the host body is slain, you return to the </text:span><text:span text:style-name="T2">magic jar, </text:span><text:span text:style-name="T4">if within range, and the life force of the host departs (it is dead). If the host body is slain beyond the range of the spell, both you and the host die. Any life force with nowhere to go is treated as slain.</text:span></text:p>
      <text:p text:style-name="Standard"><text:span text:style-name="T4">If the spell ends while you are in the </text:span><text:span text:style-name="T2">magic jar, </text:span><text:span text:style-name="T4">you return to your body (or die if your body is out of range or destroyed). If the spell ends while you are in a host, you return to your body (or die, if it is out of range of your current position), and the soul in the </text:span><text:span text:style-name="T2">magic jar </text:span><text:span text:style-name="T4">returns to its body (or dies if it is out of range). Destroying the receptacle ends the spell, and the spell can be dispelled at either the </text:span><text:span text:style-name="T2">magic jar </text:span><text:span text:style-name="T4">or at the host’s location.</text:span></text:p>
      <text:p text:style-name="P10"/>
      <text:p text:style-name="P3">Passwall (Arcane)</text:p>
      <text:p text:style-name="Standard"><text:span text:style-name="T6">Power:</text:span><text:span text:style-name="T4"> 19</text:span></text:p>
      <text:p text:style-name="Standard"><text:span text:style-name="T6">Range:</text:span><text:span text:style-name="T4"> Touch</text:span></text:p>
      <text:p text:style-name="Standard"><text:span text:style-name="T6">Effect:</text:span><text:span text:style-name="T4"> 5 ft. by 8 ft. opening, 10 ft. deep plus 5 ft. deep/20 points of margin of success</text:span></text:p>
      <text:p text:style-name="Standard"><text:span text:style-name="T6">Duration:</text:span><text:span text:style-name="T4"> 1 hour + 1hr/10 points of margin of success</text:span></text:p>
      <text:p text:style-name="P8"/>
      <text:p text:style-name="Standard"><text:span text:style-name="T4">You create a passage through wooden, plaster, or stone walls, but not through metal or other harder materials. The passage is 10 feet deep plus an additional 5 feet deep per 10 points of margin of success h (up to a maximum of 25 feet deep). If the wall’s thickness is more than the depth of the passage created, then a single </text:span><text:span text:style-name="T2">passwall </text:span><text:span text:style-name="T4">simply makes a niche or short tunnel. Several </text:span><text:span text:style-name="T2">passwall </text:span><text:span text:style-name="T4">spells can then form a continuing passage to breach very thick walls. When </text:span><text:span text:style-name="T2">passwall </text:span><text:span text:style-name="T4">ends, creatures within the passage are ejected out the nearest exit. If someone dispels the </text:span><text:span text:style-name="T2">passwall </text:span><text:span text:style-name="T4">or you dismiss it, creatures in the passage are ejected out the far exit, if there is one, or out the sole exit if there is only one.</text:span></text:p>
      <text:p text:style-name="P10"/>
      <text:p text:style-name="P3">Raise Dead (Divine)</text:p>
      <text:p text:style-name="Standard"><text:span text:style-name="T6">Power:</text:span><text:span text:style-name="T4"> 19</text:span></text:p>
      <text:p text:style-name="Standard"><text:span text:style-name="T6">Range:</text:span><text:span text:style-name="T4"> Touch</text:span></text:p>
      <text:p text:style-name="Standard"><text:span text:style-name="T6">Target:</text:span><text:span text:style-name="T4"> Dead creature touched</text:span></text:p>
      <text:p text:style-name="P8"/>
      <text:p text:style-name="Standard"><text:span text:style-name="T4">You restore life to a deceased creature. You can raise a creature that has been dead for no longer than one day per caster level. In addition, the subject’s soul must be free and willing to return. If the subject’s soul is not willing to return, the spell does not work; therefore, a subject that wants to return receives no saving throw.</text:span><text:span text:style-name="T24"> </text:span><text:span text:style-name="T4">Coming back from the dead is an ordeal. The subject of the spell loses 2 points of Constitution when it is raised, that cannot be repaired by any means. </text:span></text:p>
      <text:p text:style-name="P13">Normal poison and normal disease are cured in the process of raising the subject, but magical diseases and curses are not undone. While the spell closes mortal wounds and repairs lethal damage of most kinds, the body of the creature to be raised must be whole. Otherwise, missing parts are still missing when the creature is brought back to life. None of the dead creature’s equipment or possessions are affected in any way by this spell.</text:p>
      <text:p text:style-name="P13">A creature who has been turned into an undead creature or killed by a death effect can’t be raised by this spell. Constructs, elementals, outsiders, and undead creatures can’t be raised. The spell cannot bring back a creature that has died of old age.</text:p>
      <text:p text:style-name="P5"/>
      <text:p text:style-name="P3">Teleport (Arcane)</text:p>
      <text:p text:style-name="Standard"><text:span text:style-name="T6">Power:</text:span><text:span text:style-name="T4"> 19</text:span></text:p>
      <text:p text:style-name="Standard"><text:span text:style-name="T6">Range:</text:span><text:span text:style-name="T4"> Personal and touch</text:span></text:p>
      <text:p text:style-name="Standard"><text:span text:style-name="T6">Target:</text:span><text:span text:style-name="T4"> You and touched objects or other touched willing creatures</text:span></text:p>
      <text:p text:style-name="Standard"><text:span text:style-name="T6">Duration:</text:span><text:span text:style-name="T4"> Instantaneous</text:span></text:p>
      <text:p text:style-name="P8"/>
      <text:p text:style-name="P13">This spell instantly transports you to a designated destination, which may be as distant as 100 miles +100 miles/10 points of margin of success. Interplanar travel is not possible. You can bring along objects as long as their weight doesn’t exceed your <text:soft-page-break/>maximum load. You may also bring one additional willing Medium or smaller creature (carrying gear or objects up to its maximum load) or its equivalent (see below) per 20 points of margin of success. A Large creature counts as two Medium creatures, a Huge creature counts as two Large creatures, and so forth. All creatures to be transported must be in contact with one another, and at least one of those creatures must be in contact with you. As with all spells where the range is personal and the target is you, you need not make a saving throw, nor is spell resistance applicable to you. Only objects held or in use (attended) by another person receive saving throws and spell resistance.</text:p>
      <text:p text:style-name="P13">You must have some clear idea of the location and layout of the destination. The clearer your mental image, the more likely the teleportation works. Areas of strong physical or magical energy may make teleportation more hazardous or even impossible.</text:p>
      <text:p text:style-name="P13">To see how well the teleportation works, roll d% and consult the Teleport table. Refer to the following information for definitions of the terms on the table.</text:p>
      <text:p text:style-name="Standard"><text:span text:style-name="T2">Familiarity: </text:span><text:span text:style-name="T4">“Very familiar” is a place where you have been very often and where you feel at home. “Studied carefully” is a place you know well, either because you can currently see it, you’ve been there often, or you have used other means (such as </text:span><text:span text:style-name="T2">scrying</text:span><text:span text:style-name="T4">) to study the place for at least one hour. “Seen casually” is a place that you have seen more than once but with which you are not very familiar. “Viewed once” is a place that you have seen once, possibly using magic. </text:span></text:p>
      <text:p text:style-name="P13">“False destination” is a place that does not truly exist or if you are teleporting to an otherwise familiar location that no longer exists as such or has been so completely altered as to no longer be familiar to you. When traveling to a false destination, roll 1d20+80 to obtain results on the table, rather than rolling d%, since there is no real destination for you to hope to arrive at or even be off target from.</text:p>
      <text:p text:style-name="Standard"><text:span text:style-name="T2">On Target: </text:span><text:span text:style-name="T4">You appear where you want to be.</text:span></text:p>
      <text:p text:style-name="Standard"><text:span text:style-name="T2">Off Target: </text:span><text:span text:style-name="T4">You appear safely a random distance away from the destination in a random direction. Distance off target is 1d10x1d10% of the distance that was to be traveled. The direction off target is determined randomly</text:span></text:p>
      <text:p text:style-name="Standard"><text:span text:style-name="T2">Similar Area: </text:span><text:span text:style-name="T4">You wind up in an area that’s visually or thematically similar to the target area.</text:span></text:p>
      <text:p text:style-name="P13">Generally, you appear in the closest similar place within range. If no such area exists within the spell’s range, the spell simply fails instead.</text:p>
      <text:p text:style-name="Standard"><text:span text:style-name="T2">Mishap: </text:span><text:span text:style-name="T4">You and anyone else teleporting with you have gotten “scrambled.” You each take 1d10 points of damage, and you reroll on the chart to see where you wind up. For these rerolls, roll 1d20+80. Each time “Mishap” comes up, the characters take more damage and must reroll.</text:span></text:p>
      <text:p text:style-name="P29"/>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0">Familiarity</text:p>
          </table:table-cell>
          <table:table-cell table:style-name="Table9.A1" office:value-type="string">
            <text:p text:style-name="P31">On Target</text:p>
          </table:table-cell>
          <table:table-cell table:style-name="Table9.A1" office:value-type="string">
            <text:p text:style-name="P31">Off Target</text:p>
          </table:table-cell>
          <table:table-cell table:style-name="Table9.A1" office:value-type="string">
            <text:p text:style-name="P31">Similar Area</text:p>
          </table:table-cell>
          <table:table-cell table:style-name="Table9.A1" office:value-type="string">
            <text:p text:style-name="P31">Mishap</text:p>
          </table:table-cell>
        </table:table-row>
        <table:table-row table:style-name="Table9.1">
          <table:table-cell table:style-name="Table9.A2" office:value-type="string">
            <text:p text:style-name="P33">Very familiar</text:p>
          </table:table-cell>
          <table:table-cell table:style-name="Table9.A2" office:value-type="string">
            <text:p text:style-name="P34">01–97</text:p>
          </table:table-cell>
          <table:table-cell table:style-name="Table9.A2" office:value-type="string">
            <text:p text:style-name="P34">98–99</text:p>
          </table:table-cell>
          <table:table-cell table:style-name="Table9.A2" office:value-type="string">
            <text:p text:style-name="P34">100</text:p>
          </table:table-cell>
          <table:table-cell table:style-name="Table9.A2" office:value-type="string">
            <text:p text:style-name="P34">—</text:p>
          </table:table-cell>
        </table:table-row>
        <table:table-row table:style-name="Table9.1">
          <table:table-cell table:style-name="Table9.A2" office:value-type="string">
            <text:p text:style-name="P33">Studied carefully</text:p>
          </table:table-cell>
          <table:table-cell table:style-name="Table9.A2" office:value-type="string">
            <text:p text:style-name="P34">01–94</text:p>
          </table:table-cell>
          <table:table-cell table:style-name="Table9.A2" office:value-type="string">
            <text:p text:style-name="P34">95–97</text:p>
          </table:table-cell>
          <table:table-cell table:style-name="Table9.A2" office:value-type="string">
            <text:p text:style-name="P34">98–99</text:p>
          </table:table-cell>
          <table:table-cell table:style-name="Table9.A2" office:value-type="string">
            <text:p text:style-name="P34">100</text:p>
          </table:table-cell>
        </table:table-row>
        <table:table-row table:style-name="Table9.1">
          <table:table-cell table:style-name="Table9.A2" office:value-type="string">
            <text:p text:style-name="P33">Seen casually</text:p>
          </table:table-cell>
          <table:table-cell table:style-name="Table9.A2" office:value-type="string">
            <text:p text:style-name="P34">01–88</text:p>
          </table:table-cell>
          <table:table-cell table:style-name="Table9.A2" office:value-type="string">
            <text:p text:style-name="P34">89–94</text:p>
          </table:table-cell>
          <table:table-cell table:style-name="Table9.A2" office:value-type="string">
            <text:p text:style-name="P34">95–98</text:p>
          </table:table-cell>
          <table:table-cell table:style-name="Table9.A2" office:value-type="string">
            <text:p text:style-name="P34">99–100</text:p>
          </table:table-cell>
        </table:table-row>
        <table:table-row table:style-name="Table9.1">
          <table:table-cell table:style-name="Table9.A2" office:value-type="string">
            <text:p text:style-name="P33">Viewed once</text:p>
          </table:table-cell>
          <table:table-cell table:style-name="Table9.A2" office:value-type="string">
            <text:p text:style-name="P34">01–76</text:p>
          </table:table-cell>
          <table:table-cell table:style-name="Table9.A2" office:value-type="string">
            <text:p text:style-name="P34">77–88</text:p>
          </table:table-cell>
          <table:table-cell table:style-name="Table9.A2" office:value-type="string">
            <text:p text:style-name="P34">89–96</text:p>
          </table:table-cell>
          <table:table-cell table:style-name="Table9.A2" office:value-type="string">
            <text:p text:style-name="P34">97–100</text:p>
          </table:table-cell>
        </table:table-row>
        <table:table-row table:style-name="Table9.1">
          <table:table-cell table:style-name="Table9.A6" office:value-type="string">
            <text:p text:style-name="P33">False destination (1d20+80)</text:p>
          </table:table-cell>
          <table:table-cell table:style-name="Table9.A6" office:value-type="string">
            <text:p text:style-name="P34">—</text:p>
          </table:table-cell>
          <table:table-cell table:style-name="Table9.A6" office:value-type="string">
            <text:p text:style-name="P34">—</text:p>
          </table:table-cell>
          <table:table-cell table:style-name="Table9.A6" office:value-type="string">
            <text:p text:style-name="P34">81–92</text:p>
          </table:table-cell>
          <table:table-cell table:style-name="Table9.A6" office:value-type="string">
            <text:p text:style-name="P34">93–100</text:p>
          </table:table-cell>
        </table:table-row>
      </table:table>
      <text:p text:style-name="P23"/>
      <text:p text:style-name="P24">Transmute Mud to Rock <text:span text:style-name="T23">(Arcane)</text:span></text:p>
      <text:p text:style-name="Standard"><text:span text:style-name="T8">Power:</text:span><text:span text:style-name="T9"> 19</text:span></text:p>
      <text:p text:style-name="Standard"><text:span text:style-name="T6">Range: </text:span><text:span text:style-name="T4">Medium (100 ft. + 10 ft./ 10 points of margin of success)</text:span></text:p>
      <text:p text:style-name="Standard"><text:span text:style-name="T6">Area:</text:span><text:span text:style-name="T4"> Up to two 10-ft. cubes/10 points of margin of success</text:span></text:p>
      <text:p text:style-name="Standard"><text:span text:style-name="T6">Duration:</text:span><text:span text:style-name="T4"> Permanent</text:span></text:p>
      <text:p text:style-name="P8"/>
      <text:p text:style-name="P13">This spell transforms normal mud or quicksand of any depth into soft stone (sandstone or a similar mineral) permanently.</text:p>
      <text:p text:style-name="P13">Any creature in the mud is allowed a Magical RR to escape before the area is hardened to stone.</text:p>
      <text:p text:style-name="Standard"><text:span text:style-name="T2">Transmute mud to rock </text:span><text:span text:style-name="T4">counters and dispels </text:span><text:span text:style-name="T2">transmute rock to mud</text:span><text:span text:style-name="T4">.</text:span></text:p>
      <text:p text:style-name="P13"/>
      <text:p text:style-name="P3">Transmute Rock to Mud (Arcane)</text:p>
      <text:p text:style-name="Standard"><text:span text:style-name="T6">Power:</text:span><text:span text:style-name="T4"> 19</text:span></text:p>
      <text:p text:style-name="Standard"><text:span text:style-name="T6">Range: </text:span><text:span text:style-name="T4">Medium (100 ft. + 10 ft./ 10 points of margin of success l)</text:span></text:p>
      <text:p text:style-name="Standard"><text:span text:style-name="T6">Area:</text:span><text:span text:style-name="T4"> Up to two 10-ft. cubes/10 points of margin of success</text:span></text:p>
      <text:p text:style-name="Standard"><text:span text:style-name="T6">Duration:</text:span><text:span text:style-name="T4"> Permanent; see text</text:span></text:p>
      <text:p text:style-name="P8"/>
      <text:p text:style-name="P13">This spell turns natural, uncut or unworked rock of any sort into an equal volume of mud. Magical stone is not affected by the spell. The depth of the mud created cannot exceed 10 feet. A creature unable to levitate, fly, or otherwise free itself from the mud sinks until hip- or chest-deep, reducing its speed to 5 feet and causing a –20 penalty on attack rolls. Brush thrown atop the mud can support creatures able to climb on top of it. Creatures large enough to walk on the bottom can wade <text:soft-page-break/>through the area at a speed of 5 feet.</text:p>
      <text:p text:style-name="Standard"><text:span text:style-name="T4">If </text:span><text:span text:style-name="T2">transmute rock to mud </text:span><text:span text:style-name="T4">is cast upon the ceiling of a cavern or tunnel, the mud falls to the floor and spreads out in a pool at a depth of 5 feet. The falling mud and the ensuing cave-in deal 6d6 points of area bludgeoning damage to anyone caught directly beneath the area, or half damage to those who succeed on a DC 100 Acrobatic maneuvrer.</text:span></text:p>
      <text:p text:style-name="Standard"><text:span text:style-name="T4">Castles and large stone buildings are generally immune to the effect of the spell, since </text:span><text:span text:style-name="T2">transmute rock to mud </text:span><text:span text:style-name="T4">can’t affect worked stone and doesn’t reach deep enough to undermine such buildings’ foundations. However, small buildings or structures often rest upon foundations shallow enough to be damaged or even partially toppled by this spell.</text:span></text:p>
      <text:p text:style-name="Standard"><text:span text:style-name="T4">The mud remains until a successful </text:span><text:span text:style-name="T2">dispel magic </text:span><text:span text:style-name="T4">or </text:span><text:span text:style-name="T2">transmute mud to rock </text:span><text:span text:style-name="T4">spell restores its substance—but not necessarily its form. Evaporation turns the mud to normal dirt over a period of days. The exact time depends on exposure to the sun, wind, and normal drainage.</text:span></text:p>
      <text:p text:style-name="P29"/>
      <text:p text:style-name="P3">Wall of Force (Arcane)</text:p>
      <text:p text:style-name="Standard"><text:span text:style-name="T6">Power:</text:span><text:span text:style-name="T4"> 19</text:span></text:p>
      <text:p text:style-name="Standard"><text:span text:style-name="T6">Range:</text:span><text:span text:style-name="T4"> Close (25 ft. + 5 ft./ 10 points of margin of success)</text:span></text:p>
      <text:p text:style-name="Standard"><text:span text:style-name="T6">Effect: </text:span><text:span text:style-name="T4">Wall whose area is up to one 10-ft. square/10 points of margin of success</text:span></text:p>
      <text:p text:style-name="Standard"><text:span text:style-name="T6">Duration:</text:span><text:span text:style-name="T4"> 1 round +1rnd/10 points of margin of success</text:span></text:p>
      <text:p text:style-name="P8"/>
      <text:p text:style-name="Standard"><text:span text:style-name="T4">A </text:span><text:span text:style-name="T2">wall of force </text:span><text:span text:style-name="T4">spell creates an invisible wall of force. The wall cannot move, it is immune to damage of all kinds, and it is unaffected by most spells, including </text:span><text:span text:style-name="T2">dispel magic</text:span><text:span text:style-name="T4">. However, </text:span><text:span text:style-name="T2">disintegrate </text:span><text:span text:style-name="T4">immediately destroys it, as does <text:s/>a </text:span><text:span text:style-name="T2">mage’s disjunction </text:span><text:span text:style-name="T4">spell. Breath weapons and spells cannot pass through the wall in either direction, although </text:span><text:span text:style-name="T2">dimension door, teleport, </text:span><text:span text:style-name="T4">and similar effects can bypass the barrier. It blocks ethereal creatures as well as material ones (though ethereal creatures can usually get around the wall by floating under or over it through material floors and ceilings). Gaze attacks can operate through a </text:span><text:span text:style-name="T2">wall of force</text:span><text:span text:style-name="T4">.</text:span></text:p>
      <text:p text:style-name="Text_20_body"><text:span text:style-name="T26">The caster can form the wall into a flat, vertical plane whose area is up to one 10- foot square per </text:span><text:span text:style-name="T5">10 points of margin of success</text:span><text:span text:style-name="T26">. The wall must be continuous and unbroken when formed. If its surface is broken by any object or creature, the spell fails.</text:span></text:p>
      <text:p text:style-name="P13"/>
      <text:p text:style-name="P3">Wall of Stone (Arcane)</text:p>
      <text:p text:style-name="Standard"><text:span text:style-name="T6">Power:</text:span><text:span text:style-name="T4"> 19</text:span></text:p>
      <text:p text:style-name="Standard"><text:span text:style-name="T6">Range: </text:span><text:span text:style-name="T4">Medium (100 ft. + 10 ft./ 10 points of margin of success)</text:span></text:p>
      <text:p text:style-name="Standard"><text:span text:style-name="T6">Effect:</text:span><text:span text:style-name="T4"> Stone wall whose area is up to one 5-ft. square/10 points of margin of success</text:span></text:p>
      <text:p text:style-name="Standard"><text:span text:style-name="T6">Duration:</text:span><text:span text:style-name="T4"> Instantaneous</text:span></text:p>
      <text:p text:style-name="P8"/>
      <text:p text:style-name="Standard"><text:span text:style-name="T4">This spell creates a wall of rock that merges into adjoining rock surfaces. A </text:span><text:span text:style-name="T2">wall of stone </text:span><text:span text:style-name="T4">is 1 inch thick per 20 points of margin of success and composed of up to one 5-foot square per 10 points of margin of success. You can double the wall’s area by halving its thickness. The wall cannot be conjured so that it occupies the same space as a creature or another object.</text:span></text:p>
      <text:p text:style-name="Standard"><text:span text:style-name="T4">Unlike a </text:span><text:span text:style-name="T2">wall of iron, </text:span><text:span text:style-name="T4">you can create a </text:span><text:span text:style-name="T2">wall of stone </text:span><text:span text:style-name="T4">in almost any shape you desire. The wall created need not be vertical, nor rest upon any firm foundation; however, it must merge with and be solidly supported by existing stone. It can be used to bridge a chasm, for instance, or as a ramp. For this use, if the span is more than 20 feet, the wall must be arched and buttressed. This requirement reduces the spell’s area by half. The wall can be crudely shaped to allow crenellations, battlements, and so forth by likewise reducing the area.</text:span></text:p>
      <text:p text:style-name="Standard"><text:span text:style-name="T4">Like any other stone wall, this one can be destroyed by a </text:span><text:span text:style-name="T2">disintegrate </text:span><text:span text:style-name="T4">spell or by normal means such as breaking and chipping. Each 5-foot square of the wall has 15 hit points per inch of thickness and hardness 8. A section of wall whose hit points drop to 0 is breached. </text:span></text:p>
      <text:p text:style-name="P10"/>
      <text:p text:style-name="P46">Sixth Order</text:p>
      <text:p text:style-name="P3"/>
      <text:p text:style-name="P3">Animate Objects (Divine)</text:p>
      <text:p text:style-name="Standard"><text:span text:style-name="T6">Power: </text:span><text:span text:style-name="T4">21</text:span></text:p>
      <text:p text:style-name="Standard"><text:span text:style-name="T6">Range: </text:span><text:span text:style-name="T4">Medium (100 ft. </text:span><text:span text:style-name="T9">+ 10 ft./level)</text:span></text:p>
      <text:p text:style-name="Standard"><text:span text:style-name="T6">Targets:</text:span><text:span text:style-name="T4"> One Small object +1 per 2 extra PPs</text:span></text:p>
      <text:p text:style-name="Standard"><text:span text:style-name="T6">Duration:</text:span><text:span text:style-name="T4"> 1 round +1rnd/10 points of margin of success</text:span></text:p>
      <text:p text:style-name="P8"/>
      <text:p text:style-name="P13">You imbue inanimate objects with mobility and a semblance of life. Each such animated object then immediately attacks whomever or whatever you initially designate.</text:p>
      <text:p text:style-name="P13">An animated object can be of any nonmagical material. You may animate one Small or smaller object or an equivalent number of larger objects per caster level. A Medium object counts as two Small or smaller objects, a Large object as four, a Huge object as eight, a Gargantuan object as sixteen, and a Colossal object as thirty-two. You can change the designated target or targets as a move action, as if directing an active spell.</text:p>
      <text:p text:style-name="P13">This spell cannot animate objects carried or worn by a creature.</text:p>
      <text:p text:style-name="P13"/>
      <text:p text:style-name="P3">Antimagic Field (Arcane)</text:p>
      <text:p text:style-name="Standard"><text:span text:style-name="T6">Power:</text:span><text:span text:style-name="T4"> 21</text:span></text:p>
      <text:p text:style-name="Standard"><text:span text:style-name="T6">Range:</text:span><text:span text:style-name="T4"> 10 ft.</text:span></text:p>
      <text:p text:style-name="Standard"><text:span text:style-name="T6">Area:</text:span><text:span text:style-name="T4"> 10-ft.-radius emanation, centered on you</text:span></text:p>
      <text:p text:style-name="Standard"><text:span text:style-name="T6">Duration:</text:span><text:span text:style-name="T4"> 10 min +10min/10 points of margin of success</text:span></text:p>
      <text:p text:style-name="P8"/>
      <text:p text:style-name="P13">An invisible barrier surrounds you and moves with you. The space within this barrier is impervious to most magical effects, including spells, spell-like abilities, and supernatural abilities. Likewise, it prevents the functioning of any magic items or spells within its confines.</text:p>
      <text:p text:style-name="Standard"><text:span text:style-name="T4">An </text:span><text:span text:style-name="T2">antimagic field </text:span><text:span text:style-name="T4">suppresses any spell or magical effect used within, brought into, or cast into the area, but does not dispel it. Time spent within an </text:span><text:span text:style-name="T2">antimagic field </text:span><text:span text:style-name="T4">counts against the suppressed spell’s duration.</text:span></text:p>
      <text:p text:style-name="Standard"><text:span text:style-name="T4">Summoned creatures of any type and incorporeal undead wink out if they enter an </text:span><text:span text:style-name="T2">antimagic field. </text:span><text:span text:style-name="T4">They reappear in the same spot once the field goes away. Time spent winked out counts normally against the duration of the conjuration that is maintaining the creature</text:span></text:p>
      <text:p text:style-name="Standard"><text:span text:style-name="T4">A normal creature can enter the area, as can normal missiles. Furthermore, while a magic sword does not function magically within the area, it is still a sword (and a masterwork sword at that). The spell has no effect on golems and other constructs that are imbued with magic during their creation process and are thereafter self-supporting (unless they have been summoned, in which case they are treated like any other summoned creatures). Elementals, corporeal undead, and outsiders are likewise unaffected unless summoned. These creatures’ spell-like or supernatural abilities, however, may be temporarily nullified by the field. </text:span><text:span text:style-name="T2">Dispel magic </text:span><text:span text:style-name="T4">does not remove the field.</text:span></text:p>
      <text:p text:style-name="Standard"><text:span text:style-name="T4">Two or more </text:span><text:span text:style-name="T2">antimagic fields </text:span><text:span text:style-name="T4">sharing any of the same space have no effect on each other. Certain spells, such as </text:span><text:span text:style-name="T2">wall of force, prismatic sphere</text:span><text:span text:style-name="T4">, and </text:span><text:span text:style-name="T2">prismatic wall, </text:span><text:span text:style-name="T4">remain unaffected by </text:span><text:span text:style-name="T2">antimagic field </text:span><text:span text:style-name="T4">(see the individual spell descriptions). Artifacts and deities are unaffected by mortal magic such as this. </text:span></text:p>
      <text:p text:style-name="P13">Should a creature be larger than the area enclosed by the barrier, any part of it that lies outside the barrier is unaffected by the field.</text:p>
      <text:p text:style-name="P10"/>
      <text:p text:style-name="P5"><text:span text:style-name="T25">Chain Lightning </text:span><text:span text:style-name="T25">(Arcane)</text:span></text:p>
      <text:p text:style-name="Standard"><text:span text:style-name="T6">Power:</text:span><text:span text:style-name="T4"> 21</text:span></text:p>
      <text:p text:style-name="Standard"><text:span text:style-name="T6">Range:</text:span><text:span text:style-name="T4"> Long (400 ft. + 40 ft./</text:span><text:bookmark-start text:name="__DdeLink__4789_869474293"/><text:span text:style-name="T4">10 points of margin of success</text:span><text:bookmark-end text:name="__DdeLink__4789_869474293"/><text:span text:style-name="T4">)</text:span></text:p>
      <text:p text:style-name="Standard"><text:span text:style-name="T6">Targets:</text:span><text:span text:style-name="T4"> 1 target, plus 1 target/10 points of margin of success (each of which must be within 30 ft. of the primary target)</text:span></text:p>
      <text:p text:style-name="Standard"><text:span text:style-name="T6">Duration:</text:span><text:span text:style-name="T4"> Instantaneous</text:span></text:p>
      <text:p text:style-name="P13"/>
      <text:p text:style-name="Standard"><text:span text:style-name="T4">This spell creates an electrical discharge that begins as a single stroke commencing from your fingertips. Unlike </text:span><text:span text:style-name="T2">lightning bolt</text:span><text:span text:style-name="T4">, </text:span><text:span text:style-name="T2">chain lightning </text:span><text:span text:style-name="T4">strikes one object or creature initially, then arcs to other targets.</text:span></text:p>
      <text:p text:style-name="P13">The bolt deals 4d6 points of electricity damage, +1d6 per 10 points of margin of success (maximum 8d6) to a single location of the primary target. After it strikes, lightning can arc to a number of secondary targets equal to your margin of success/10 (maximum 20). The secondary bolts each strike one target and deal half as much damage as the primary one did (rounded down).</text:p>
      <text:p text:style-name="P13">Make a single attack roll, and apply result to each target. You choose secondary targets as you like, but they must all be within 30 feet of the primary target, and no target can be struck more than once. You can choose to affect fewer secondary <text:soft-page-break/>targets than the maximum.</text:p>
      <text:p text:style-name="P3"/>
      <text:p text:style-name="P3">Contingency (Arcane)</text:p>
      <text:p text:style-name="Standard"><text:span text:style-name="T6">Power:</text:span><text:span text:style-name="T4"> 21</text:span></text:p>
      <text:p text:style-name="Standard"><text:span text:style-name="T6">Range:</text:span><text:span text:style-name="T4"> Personal</text:span></text:p>
      <text:p text:style-name="Standard"><text:span text:style-name="T6">Target:</text:span><text:span text:style-name="T4"> You</text:span></text:p>
      <text:p text:style-name="Standard"><text:span text:style-name="T6">Duration:</text:span><text:span text:style-name="T4"> One day +1day/10 points of margin of success or until discharged</text:span></text:p>
      <text:p text:style-name="P13"/>
      <text:p text:style-name="Standard"><text:span text:style-name="T4">You can place another spell upon your person so that it comes into effect under some condition you dictate when casting </text:span><text:span text:style-name="T2">contingency</text:span><text:span text:style-name="T4">. The </text:span><text:span text:style-name="T2">contingency </text:span><text:span text:style-name="T4">spell and the companion spell are cast at the same time. </text:span><text:span text:style-name="T2">Contingency</text:span><text:span text:style-name="T4"> cannot be cast in combat.</text:span></text:p>
      <text:p text:style-name="Standard"><text:span text:style-name="T4">The spell to be brought into effect by the </text:span><text:span text:style-name="T2">contingency </text:span><text:span text:style-name="T4">must be one that affects your person and its Power cannot be higher of 10 plus your margin of success in casting </text:span><text:span text:style-name="T2">contingency</text:span><text:span text:style-name="T4">/30 (rounded down, maximum of 21).</text:span></text:p>
      <text:p text:style-name="Standard"><text:span text:style-name="T4">The conditions needed to bring the spell into effect must be clear, although they can be general. In all cases, the </text:span><text:span text:style-name="T2">contingency </text:span><text:span text:style-name="T4">immediately brings into effect the companion spell, the latter being “cast” instantaneously when the prescribed circumstances occur. If complicated or convoluted conditions are prescribed, the whole spell combination (</text:span><text:span text:style-name="T2">contingency </text:span><text:span text:style-name="T4">and the companion magic) may fail when called on. The companion spell occurs based solely on the stated conditions, regardless of whether you want it to.</text:span></text:p>
      <text:p text:style-name="Standard"><text:span text:style-name="T4">You can use only one </text:span><text:span text:style-name="T2">contingency </text:span><text:span text:style-name="T4">spell at a time; if a second is cast, the first one (if still active) is dispelled.</text:span></text:p>
      <text:p text:style-name="P13"/>
      <text:p text:style-name="P3">Create Undead </text:p>
      <text:p text:style-name="Standard"><text:span text:style-name="T6">Power:</text:span><text:span text:style-name="T4"> 21</text:span></text:p>
      <text:p text:style-name="Standard"><text:span text:style-name="T6">Range:</text:span><text:span text:style-name="T4"> Close (25 ft. + 5 ft./20 points of margin of success)</text:span></text:p>
      <text:p text:style-name="Standard"><text:span text:style-name="T6">Target:</text:span><text:span text:style-name="T4"> One corpse</text:span></text:p>
      <text:p text:style-name="Standard"><text:span text:style-name="T6">Duration:</text:span><text:span text:style-name="T4"> Instantaneous</text:span></text:p>
      <text:p text:style-name="P8"/>
      <text:p text:style-name="Standard"><text:span text:style-name="T4">A much more potent spell than </text:span><text:span text:style-name="T2">animate dead, </text:span><text:span text:style-name="T4">this evil spell allows you to create more powerful sorts of undead: ghouls, ghasts, mummies, ... The type or types of undead you can create is based on your caster level, as shown on the table below.</text:span></text:p>
      <text:p text:style-name="P13"/>
      <table:table table:name="Table4" table:style-name="Table4">
        <table:table-column table:style-name="Table4.A"/>
        <table:table-column table:style-name="Table4.B"/>
        <table:table-row table:style-name="Table4.1">
          <table:table-cell table:style-name="Table4.A1" office:value-type="string">
            <text:p text:style-name="P25">Margin of Success</text:p>
          </table:table-cell>
          <table:table-cell table:style-name="Table4.A1" office:value-type="string">
            <text:p text:style-name="P25">Type</text:p>
          </table:table-cell>
        </table:table-row>
        <table:table-row table:style-name="Table4.1">
          <table:table-cell table:style-name="Table4.A1" office:value-type="string">
            <text:p text:style-name="P27">0</text:p>
          </table:table-cell>
          <table:table-cell table:style-name="Table4.A1" office:value-type="string">
            <text:p text:style-name="P27">II</text:p>
          </table:table-cell>
        </table:table-row>
        <table:table-row table:style-name="Table4.1">
          <table:table-cell table:style-name="Table4.A1" office:value-type="string">
            <text:p text:style-name="P27">20</text:p>
          </table:table-cell>
          <table:table-cell table:style-name="Table4.A1" office:value-type="string">
            <text:p text:style-name="P27">III</text:p>
          </table:table-cell>
        </table:table-row>
        <table:table-row table:style-name="Table4.1">
          <table:table-cell table:style-name="Table4.A1" office:value-type="string">
            <text:p text:style-name="P27">30</text:p>
          </table:table-cell>
          <table:table-cell table:style-name="Table4.A1" office:value-type="string">
            <text:p text:style-name="P27">IV</text:p>
          </table:table-cell>
        </table:table-row>
        <table:table-row table:style-name="Table4.1">
          <table:table-cell table:style-name="Table4.A1" office:value-type="string">
            <text:p text:style-name="P27">40</text:p>
          </table:table-cell>
          <table:table-cell table:style-name="Table4.A1" office:value-type="string">
            <text:p text:style-name="P27">V</text:p>
          </table:table-cell>
        </table:table-row>
      </table:table>
      <text:p text:style-name="P23"/>
      <text:p text:style-name="P23"/>
      <text:p text:style-name="P13">You can create undead of lesser Type that your margin of success would allow, if you choose. Created undead are not automatically under the control of their animator. If you are capable of commanding undead, you may attempt to command the undead creature as it forms.</text:p>
      <text:p text:style-name="P28"/>
      <text:p text:style-name="P3">Find the Path (Arcane)</text:p>
      <text:p text:style-name="Standard"><text:span text:style-name="T6">Power:</text:span><text:span text:style-name="T4"> 21</text:span></text:p>
      <text:p text:style-name="Standard"><text:span text:style-name="T6">Range:</text:span><text:span text:style-name="T4"> Personal or touch</text:span></text:p>
      <text:p text:style-name="Standard"><text:span text:style-name="T6">Target:</text:span><text:span text:style-name="T4"> You or creature touched</text:span></text:p>
      <text:p text:style-name="Standard"><text:span text:style-name="T6">Duration:</text:span><text:span text:style-name="T4"> 10 min. +10min/10 points of margin of success</text:span></text:p>
      <text:p text:style-name="P8"/>
      <text:p text:style-name="Standard"><text:span text:style-name="T4">The recipient of this spell can find the shortest, most direct physical route to a specified destination, be it the way into or out of a locale. The locale can be outdoors, underground, or even inside a </text:span><text:span text:style-name="T2">maze </text:span><text:span text:style-name="T4">spell. </text:span><text:span text:style-name="T2">Find the path </text:span><text:span text:style-name="T4">works with respect to locations, not objects or creatures at a locale. The location must be on the same plane as you are at the time of casting.</text:span></text:p>
      <text:p text:style-name="Standard"><text:span text:style-name="T4">The spell enables the subject to sense the correct direction that will eventually lead it to its destination, indicating at appropriate times the exact path to follow or physical actions to take. For example, the spell enables the subject to sense trip wires or the proper word to bypass a </text:span><text:span text:style-name="T2">glyph of warding. </text:span><text:span text:style-name="T4">The spell ends when the destination is reached or the duration expires, whichever comes first. </text:span><text:span text:style-name="T2">Find the path </text:span><text:span text:style-name="T4">can be used to remove the subject and its companions from the effect of a </text:span><text:span text:style-name="T2">maze </text:span><text:span text:style-name="T4">spell in a single round.</text:span></text:p>
      <text:p text:style-name="P3"/>
      <text:p text:style-name="P29"><text:soft-page-break/><text:span text:style-name="T14">Flesh to Stone </text:span><text:span text:style-name="T14">(Arcane)</text:span></text:p>
      <text:p text:style-name="Standard"><text:span text:style-name="T6">Power:</text:span><text:span text:style-name="T4"> 21</text:span></text:p>
      <text:p text:style-name="Standard"><text:span text:style-name="T6">Range: </text:span><text:span text:style-name="T4">Medium (100 ft. + 10 ft./10 points of margin of success)</text:span></text:p>
      <text:p text:style-name="Standard"><text:span text:style-name="T6">Target:</text:span><text:span text:style-name="T4"> One creature</text:span></text:p>
      <text:p text:style-name="Standard"><text:span text:style-name="T6">Duration:</text:span><text:span text:style-name="T4"> Instantaneous</text:span></text:p>
      <text:p text:style-name="P8"/>
      <text:p text:style-name="P13">The subject, along with all its carried gear, turns into a mindless, inert statue. If the statue resulting from this spell is broken or damaged, the subject (if ever returned to its original state) has similar damage or deformities. Only creatures made of flesh are affected by this spell..</text:p>
      <text:p text:style-name="P13"/>
      <text:p text:style-name="P3">Forbiddance (Divine)</text:p>
      <text:p text:style-name="Standard"><text:span text:style-name="T6">Power:</text:span><text:span text:style-name="T4"> 21</text:span></text:p>
      <text:p text:style-name="Standard"><text:span text:style-name="T6">Range: </text:span><text:span text:style-name="T4">Medium (100 ft. + 10 ft./10 points of margin of success)</text:span></text:p>
      <text:p text:style-name="Standard"><text:span text:style-name="T6">Area:</text:span><text:span text:style-name="T4"> 60-ft. cube/level</text:span></text:p>
      <text:p text:style-name="Standard"><text:span text:style-name="T6">Duration:</text:span><text:span text:style-name="T4"> Permanent</text:span></text:p>
      <text:p text:style-name="P8"/>
      <text:p text:style-name="Standard"><text:span text:style-name="T2">Forbiddance </text:span><text:span text:style-name="T4">seals an area against all planar travel into or within it. This includes all teleportation spells (such as </text:span><text:span text:style-name="T2">dimension door </text:span><text:span text:style-name="T4">and </text:span><text:span text:style-name="T2">teleport), plane shifting, </text:span><text:span text:style-name="T4">astral travel, ethereal travel, and all summoning spells. Such effects simply fail automatically.</text:span></text:p>
      <text:p text:style-name="P10"/>
      <text:p text:style-name="P3">Freezing Sphere (Arcane)</text:p>
      <text:p text:style-name="Standard"><text:span text:style-name="T6">Power:</text:span><text:span text:style-name="T4"> 21</text:span></text:p>
      <text:p text:style-name="Standard"><text:span text:style-name="T6">Range:</text:span><text:span text:style-name="T4"> Long (400 ft. + 40 ft./10 points of margin of success)</text:span></text:p>
      <text:p text:style-name="Standard"><text:span text:style-name="T6">Target, Effect, or Area:</text:span><text:span text:style-name="T4"> See text</text:span></text:p>
      <text:p text:style-name="Standard"><text:span text:style-name="T6">Duration:</text:span><text:span text:style-name="T4"> Instantaneous or 1 rnd +1rnd/10 points of margin of success; see text</text:span></text:p>
      <text:p text:style-name="P8"/>
      <text:p text:style-name="Standard"><text:span text:style-name="T2">Freezing sphere </text:span><text:span text:style-name="T4">creates a frigid globe of cold energy that streaks from your fingertips to the location you select, where it explodes in a 10-foot-radius burst, dealing 4d6 points of <text:s/>are cold damage, +1d6/</text:span><text:bookmark-start text:name="__DdeLink__3449_781431292"/><text:span text:style-name="T4">10 points of margin of success </text:span><text:bookmark-end text:name="__DdeLink__3449_781431292"/><text:span text:style-name="T4">(maximum 10d6) to each creature in the area. An elemental (water) creature instead takes 4d8 points of <text:s/>are cold damage, +1d8/10 points of margin of success (maximum 10d8).</text:span></text:p>
      <text:p text:style-name="Standard"><text:span text:style-name="T4">If the </text:span><text:span text:style-name="T2">freezing sphere </text:span><text:span text:style-name="T4">strikes a body of water or a liquid that is principally water (not including water-based creatures), it freezes the liquid to a depth of 6 inches over an area equal to 100 square feet (a 10- foot square) per 10 points of margin of success <text:s/>(maximum 1,500 square feet). This ice lasts for 1 round, plus 1rnd per 10 points of margin of success. Creatures that were swimming on the surface of frozen water become trapped in the ice. Attempting to break free is a full-round action. A trapped creature must make a DC150 Atheltic or Acrobatics check to do so.</text:span></text:p>
      <text:p text:style-name="Standard"><text:span text:style-name="T4">You can refrain from firing the globe after completing the spell, if you wish. Treat this as a touch spell for which you are holding the charge. You can hold the charge for as long as 1 round, plus 1rnd/10 points of margin of success , at the end of which time the </text:span><text:span text:style-name="T2">freezing sphere </text:span><text:span text:style-name="T4">bursts centered on you (and you receive no saving throw to resist its effect). Firing the globe in a later round is a standard action.</text:span></text:p>
      <text:p text:style-name="P13"/>
      <text:p text:style-name="P3">Geas/Quest (Divine)</text:p>
      <text:p text:style-name="Standard"><text:span text:style-name="T6">Power</text:span><text:span text:style-name="T4"> 21</text:span></text:p>
      <text:p text:style-name="Standard"><text:span text:style-name="T6">Range:</text:span><text:span text:style-name="T4"> Close (25 ft. + 5 ft./20 points of margin of success )</text:span></text:p>
      <text:p text:style-name="Standard"><text:span text:style-name="T6">Target:</text:span><text:span text:style-name="T4"> One living creature</text:span></text:p>
      <text:p text:style-name="P8"/>
      <text:p text:style-name="Standard"><text:span text:style-name="T27">A </text:span><text:span text:style-name="T28">Geas </text:span><text:span text:style-name="T27">places a magical command on a creature to carry out some service or to refrain from some action or course of activity, as desired by you. The creature be able to understand you. While a </text:span><text:span text:style-name="T28">geas </text:span><text:span text:style-name="T27">cannot compel a creature to kill itself or perform acts that would result in certain death, it can cause almost any other course of activity.</text:span></text:p>
      <text:p text:style-name="Standard"><text:span text:style-name="T27">The </text:span><text:span text:style-name="T28">geased </text:span><text:span text:style-name="T27">creature must follow the given instructions until the </text:span><text:span text:style-name="T28">geas </text:span><text:span text:style-name="T27">is completed, no matter how long it takes.</text:span></text:p>
      <text:p text:style-name="Standard"><text:span text:style-name="T27">If the instructions involve some open-ended task that the recipient cannot complete through his own actions the spell remains in effect for a maximum of one day, plus one day/</text:span><text:span text:style-name="T4">10 points of margin of success</text:span><text:span text:style-name="T27">. A clever recipient can subvert some instructions.</text:span></text:p>
      <text:p text:style-name="Standard"><text:span text:style-name="T27">If the subject is prevented from obeying the </text:span><text:span text:style-name="T28">Geas </text:span><text:span text:style-name="T27">for 24 hours, it takes a –10 penalty to all actions and 1d4 damage to his body. Each day, another –10 penalty accumulates, up to a total of –80, and the target takes another 1d4 points of damage. </text:span><text:span text:style-name="T4">These effects end 24 hours after the creature attempts to resume the </text:span><text:span text:style-name="T2">geas/ quest</text:span><text:span text:style-name="T4">.</text:span></text:p>
      <text:p text:style-name="Standard"><text:span text:style-name="T4">A </text:span><text:span text:style-name="T2">remove curse </text:span><text:span text:style-name="T4">spell ends a </text:span><text:span text:style-name="T2">geas/quest </text:span><text:span text:style-name="T4">spell only if its caster level is at least two higher than your caster level. </text:span></text:p>
      <text:p text:style-name="P10"/>
      <text:p text:style-name="P3"><text:soft-page-break/>Harm (Divine)</text:p>
      <text:p text:style-name="Standard"><text:span text:style-name="T6">Power:</text:span><text:span text:style-name="T4"> 21</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Instantaneous</text:span></text:p>
      <text:p text:style-name="P8"/>
      <text:p text:style-name="Standard"><text:span text:style-name="T2">Harm </text:span><text:span text:style-name="T4">immediately Destroy a single location. If the creature successfully saves, </text:span><text:span text:style-name="T2">harm</text:span><text:span text:style-name="T4"> Cripples target location instead.</text:span><text:span text:style-name="T24"> </text:span><text:span text:style-name="T4">If used on an undead creature, </text:span><text:span text:style-name="T2">harm </text:span><text:span text:style-name="T4">acts like </text:span><text:span text:style-name="T2">heal</text:span><text:span text:style-name="T4">.</text:span></text:p>
      <text:p text:style-name="P13"/>
      <text:p text:style-name="P3">Heal (Divine)</text:p>
      <text:p text:style-name="Standard"><text:span text:style-name="T6">Power:</text:span><text:span text:style-name="T4"> 21</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Instantaneous</text:span></text:p>
      <text:p text:style-name="P8"/>
      <text:p text:style-name="Standard"><text:span text:style-name="T2">Heal </text:span><text:span text:style-name="T4">enables you to channel positive energy into a creature to wipe away injury and afflictions. It immediately ends any and all of the following adverse conditions affecting the Target: ability damage, blinded, </text:span><text:span text:style-name="T2">confused, </text:span><text:span text:style-name="T4">dazed, dazzled, deafened, diseased, exhausted, fatigued, </text:span><text:span text:style-name="T2">feebleminded, </text:span><text:span text:style-name="T4">insanity, nauseated, sickened, stunned, and poisoned. It also cures 2 hits point of damage per margin of success to a single location, to a maximum of 50 points.</text:span><text:span text:style-name="T24"> </text:span><text:span text:style-name="T4">If used against an undead creature, </text:span><text:span text:style-name="T2">heal </text:span><text:span text:style-name="T4">instead acts like </text:span><text:span text:style-name="T2">harm</text:span><text:span text:style-name="T4">.</text:span></text:p>
      <text:p text:style-name="P13"/>
      <text:p text:style-name="P3">Stone to Flesh (Arcane)</text:p>
      <text:p text:style-name="Standard"><text:span text:style-name="T6">Power:</text:span><text:span text:style-name="T4"> 21</text:span></text:p>
      <text:p text:style-name="Standard"><text:span text:style-name="T6">Range: </text:span><text:span text:style-name="T4">Medium (100 ft. + 10 ft. 10 points of margin of success)</text:span></text:p>
      <text:p text:style-name="Standard"><text:span text:style-name="T6">Target:</text:span><text:span text:style-name="T4"> One petrified creature or a cylinder of stone from 1 ft. to 3 ft. in diameter and up to 10 ft. long</text:span></text:p>
      <text:p text:style-name="Standard"><text:span text:style-name="T6">Duration:</text:span><text:span text:style-name="T4"> Instantaneous</text:span></text:p>
      <text:p text:style-name="P8"/>
      <text:p text:style-name="P13">This spell restores a petrified creature to its normal state, restoring life and goods. <text:s/>Any petrified creature, regardless of size, can be restored.</text:p>
      <text:p text:style-name="P13">The spell also can convert a mass of stone into a fleshy substance. Such flesh is inert and lacking a vital life force unless a life force or magical energy is available. (For example, this spell would turn a stone golem into a flesh golem, but an ordinary statue would become a corpse.) You can affect an object that fits within a cylinder from 1 foot to 3 feet in diameter and up to 10 feet long or a cylinder of up to those dimensions in a larger mass of stone.</text:p>
      <text:p text:style-name="P13"/>
      <text:p text:style-name="P3">Suggestion, Mass (Arcane)</text:p>
      <text:p text:style-name="Standard"><text:span text:style-name="T6">Power:</text:span><text:span text:style-name="T4"> 21</text:span></text:p>
      <text:p text:style-name="Standard"><text:span text:style-name="T6">Range: </text:span><text:span text:style-name="T4">Medium (100 ft. + 10 ft./ 10 points of margin of success)</text:span></text:p>
      <text:p text:style-name="Standard"><text:span text:style-name="T6">Targets:</text:span><text:span text:style-name="T4"> One creature +1/10 points of margin of success, no two of which can be more than 30 ft. apart</text:span></text:p>
      <text:p text:style-name="Standard"><text:span text:style-name="T4">This spell functions like </text:span><text:span text:style-name="T2">suggestion</text:span><text:span text:style-name="T4">, except that it can affect more creatures. The same </text:span><text:span text:style-name="T2">suggestion </text:span><text:span text:style-name="T4">applies to all these creatures.</text:span></text:p>
      <text:p text:style-name="P10"/>
      <text:p text:style-name="P3">True Seeing (Divine)</text:p>
      <text:p text:style-name="Standard"><text:span text:style-name="T6">Power:</text:span><text:span text:style-name="T4"> 21</text:span></text:p>
      <text:p text:style-name="Standard"><text:span text:style-name="T6">Range:</text:span><text:span text:style-name="T4"> Touch</text:span></text:p>
      <text:p text:style-name="Standard"><text:span text:style-name="T6">Target:</text:span><text:span text:style-name="T4"> Creature touched</text:span></text:p>
      <text:p text:style-name="Standard"><text:span text:style-name="T6">Duration:</text:span><text:span text:style-name="T4"> 1 min. +1min/10 points of margin of success</text:span><text:span text:style-name="T6"> </text:span></text:p>
      <text:p text:style-name="Standard"><text:span text:style-name="T4">You confer on the subject the ability to see all things as they actually are. The subject sees through normal and magical darkness, notices secret doors hidden by magic, sees the exact locations of creatures or objects under </text:span><text:span text:style-name="T2">blur </text:span><text:span text:style-name="T4">or </text:span><text:span text:style-name="T2">displacement </text:span><text:span text:style-name="T4">effects, sees invisible creatures or objects normally, sees through illusions, and sees the true form of polymorphed, changed, or transmuted things. Further, the subject can focus its vision to see into the Ethereal Plane (but not into extradimensional spaces). The range of </text:span><text:span text:style-name="T2">true seeing </text:span><text:span text:style-name="T4">conferred is 120 feet. </text:span><text:span text:style-name="T2">True seeing</text:span><text:span text:style-name="T4">, however, does not penetrate solid objects. It in no way confers X-ray vision or its equivalent. It does not negate concealment, including that caused by fog and the like. </text:span><text:span text:style-name="T2">True seeing </text:span><text:span text:style-name="T4">does not help the viewer see through mundane disguises, spot creatures who are simply hiding, or notice secret doors hidden by mundane means. In addition, the spell effects cannot be further enhanced with known magic, so one cannot use </text:span><text:span text:style-name="T2">true seeing </text:span><text:span text:style-name="T4">through a </text:span><text:span text:style-name="T2">crystal ball </text:span><text:span text:style-name="T4">or in conjunction with </text:span><text:span text:style-name="T2">clairaudience/clairvoyance</text:span><text:span text:style-name="T4">.</text:span></text:p>
      <text:p text:style-name="P46">Seventh Order</text:p>
      <text:p text:style-name="P3"/>
      <text:p text:style-name="P5"><text:span text:style-name="T25">Animal Shapes </text:span><text:span text:style-name="T25">(Divine)</text:span></text:p>
      <text:p text:style-name="Standard"><text:span text:style-name="T6">Power: </text:span><text:span text:style-name="T4">22</text:span></text:p>
      <text:p text:style-name="Standard"><text:span text:style-name="T6">Range:</text:span><text:span text:style-name="T4"> Close (25 ft. </text:span><text:span text:style-name="T9">+ 5 ft./2 levels)</text:span></text:p>
      <text:p text:style-name="Standard"><text:span text:style-name="T6">Targets:</text:span><text:span text:style-name="T4"> One willing creature +1 per extra PP, all within 30 ft. of each other</text:span></text:p>
      <text:p text:style-name="Standard"><text:span text:style-name="T6">Duration:</text:span><text:span text:style-name="T4"> 1 hour +1 hr/10 points of margin of success</text:span></text:p>
      <text:p text:style-name="P8"/>
      <text:p text:style-name="Standard"><text:span text:style-name="T4">As </text:span><text:span text:style-name="T2">polymorph, </text:span><text:span text:style-name="T4">except you polymorph up to one willing creature per caster level into an animal of your choice; the spell has no effect on unwilling creatures. All creatures must take the same kind of animal form. Recipients remain in the animal form until the spell expires or until you dismiss it for all recipients. In addition, an individual subject may choose to resume its normal form as a full-round action; doing so ends the spell for that subject alone. </text:span></text:p>
      <text:p text:style-name="P10"/>
      <text:p text:style-name="P3">Control Undead (Divine)</text:p>
      <text:p text:style-name="Standard"><text:span text:style-name="T6">Power:</text:span><text:span text:style-name="T4"> 22</text:span></text:p>
      <text:p text:style-name="Standard"><text:span text:style-name="T6">Range:</text:span><text:span text:style-name="T4"> Close (25 ft. + 5 ft./20 points of margin of success )</text:span></text:p>
      <text:p text:style-name="Standard"><text:span text:style-name="T6">Targets:</text:span><text:span text:style-name="T4"> Up to 2 levels of undead creatures +2/10 points of margin of success, no two of which can be more than 30 ft. apart</text:span></text:p>
      <text:p text:style-name="Standard"><text:span text:style-name="T6">Duration:</text:span><text:span text:style-name="T4"> 1 min. + 1min/10 points of margin of success</text:span></text:p>
      <text:p text:style-name="P8"/>
      <text:p text:style-name="P13">This spell enables you to command undead creatures for a short period of time. You command them by voice and they understand you, no matter what language you speak. Even if vocal communication is impossible the controlled undead do not attack you. At the end of the spell, the subjects revert to their normal behavior.</text:p>
      <text:p text:style-name="P13">Intelligent undead creatures remember that you controlled them.</text:p>
      <text:p text:style-name="P13"/>
      <text:p text:style-name="P3">Control Weather (Divine)</text:p>
      <text:p text:style-name="Standard"><text:span text:style-name="T6">Power:</text:span><text:span text:style-name="T4"> 22</text:span></text:p>
      <text:p text:style-name="Standard"><text:span text:style-name="T6">Range:</text:span><text:span text:style-name="T4"> 2 miles</text:span></text:p>
      <text:p text:style-name="Standard"><text:span text:style-name="T6">Area:</text:span><text:span text:style-name="T4"> 2-mile-radius circle, centered on you; see text</text:span></text:p>
      <text:p text:style-name="Standard"><text:span text:style-name="T6">Duration:</text:span><text:span text:style-name="T4"> 4d12 hours; see text</text:span></text:p>
      <text:p text:style-name="P8"/>
      <text:p text:style-name="Standard"><text:span text:style-name="T4">You change the weather in the local area. It takes 10 minutes to cast the spell and an additional 10 minutes for the effects to manifest.</text:span><text:span text:style-name="T2"> </text:span><text:span text:style-name="T4">You can call forth weather appropriate to the climate and season of the area you are in.</text:span></text:p>
      <text:p text:style-name="P13"/>
      <table:table table:name="Table3" table:style-name="Table3">
        <table:table-column table:style-name="Table3.A"/>
        <table:table-column table:style-name="Table3.B"/>
        <table:table-row table:style-name="Table3.1">
          <table:table-cell table:style-name="Table3.A1" table:number-columns-spanned="2" office:value-type="string">
            <text:p text:style-name="P1">Possible Weather</text:p>
          </table:table-cell>
          <table:covered-table-cell/>
        </table:table-row>
        <table:table-row table:style-name="Table3.1">
          <table:table-cell table:style-name="Table3.A1" office:value-type="string">
            <text:p text:style-name="P26">Spring</text:p>
          </table:table-cell>
          <table:table-cell table:style-name="Table3.A1" office:value-type="string">
            <text:p text:style-name="P5">Tornado, thunderstorm, sleet storm, or hot weather</text:p>
          </table:table-cell>
        </table:table-row>
        <table:table-row table:style-name="Table3.1">
          <table:table-cell table:style-name="Table3.A1" office:value-type="string">
            <text:p text:style-name="P26">Summer</text:p>
          </table:table-cell>
          <table:table-cell table:style-name="Table3.A1" office:value-type="string">
            <text:p text:style-name="P5">Torrential rain, heat wave, or hailstorm</text:p>
          </table:table-cell>
        </table:table-row>
        <table:table-row table:style-name="Table3.1">
          <table:table-cell table:style-name="Table3.A1" office:value-type="string">
            <text:p text:style-name="P26">Autumn</text:p>
          </table:table-cell>
          <table:table-cell table:style-name="Table3.A1" office:value-type="string">
            <text:p text:style-name="P5">Hot or cold weather, fog, or sleet</text:p>
          </table:table-cell>
        </table:table-row>
        <table:table-row table:style-name="Table3.1">
          <table:table-cell table:style-name="Table3.A1" office:value-type="string">
            <text:p text:style-name="P26">Winter</text:p>
          </table:table-cell>
          <table:table-cell table:style-name="Table3.A1" office:value-type="string">
            <text:p text:style-name="P5">Frigid cold, blizzard, or thaw</text:p>
          </table:table-cell>
        </table:table-row>
        <table:table-row table:style-name="Table3.1">
          <table:table-cell table:style-name="Table3.A1" office:value-type="string">
            <text:p text:style-name="P26">Late winter</text:p>
          </table:table-cell>
          <table:table-cell table:style-name="Table3.A1" office:value-type="string">
            <text:p text:style-name="P5">Hurricane-force winds or early spring (coastal area)</text:p>
          </table:table-cell>
        </table:table-row>
      </table:table>
      <text:p text:style-name="P29"/>
      <text:p text:style-name="P13">You control the general tendencies of the weather, such as the direction and intensity of the wind. You cannot control specific applications of the weather—where lightning strikes, for example, or the exact path of a tornado. When you select a certain weather condition to occur, the weather assumes that condition 10 minutes later (changing gradually, not abruptly). The weather continues as you left it for the duration, or until you use a standard action to designate a new kind of weather (which fully manifests itself 10 minutes later). Contradictory conditions are not possible simultaneously.</text:p>
      <text:p text:style-name="P18"><text:soft-page-break/><text:span text:style-name="T22">Control weather </text:span><text:span text:style-name="T32">can do away with atmospheric phenomena (naturally occurring or otherwise) as well as create them.</text:span></text:p>
      <text:p text:style-name="P19"/>
      <text:p text:style-name="P3">Disintegrate (Arcane)</text:p>
      <text:p text:style-name="Standard"><text:span text:style-name="T6">Power:</text:span><text:span text:style-name="T4"> 22</text:span></text:p>
      <text:p text:style-name="Standard"><text:span text:style-name="T6">Range: </text:span><text:span text:style-name="T4">Medium (100 ft. + 10 ft./10 points of margin of success)</text:span></text:p>
      <text:p text:style-name="Standard"><text:span text:style-name="T6">Effect:</text:span><text:span text:style-name="T4"> Ray</text:span></text:p>
      <text:p text:style-name="Standard"><text:span text:style-name="T6">Duration:</text:span><text:span text:style-name="T4"> Instantaneous</text:span></text:p>
      <text:p text:style-name="P8"/>
      <text:p text:style-name="P13">A thin, green ray springs from your pointing finger. Any creature struck by the ray takes 3d6 points of damage to every location, plus 2d6/10 points of margin of success (to a maximum of 12d6). Any location destroyed by this spell is entirely disintegrated, leaving behind only a trace of fine dust. A disintegrated creature’s equipment is unaffected.</text:p>
      <text:p text:style-name="P19">When used against an object, the ray simply disintegrates as much as one 10- foot cube of nonliving matter. Thus, the spell disintegrates only part of any very large object or structure targeted. <text:s/>A creature or object that makes a successful Physical RR is partially affected, taking only 2d6 points of damage (objects and locations destroyed by this damage are still disintegrated). Only the first creature or object struck can be affected; that is, the ray affects only one target per casting.</text:p>
      <text:p text:style-name="P19"/>
      <text:p text:style-name="P3">Finger of Death (Divine)</text:p>
      <text:p text:style-name="Standard"><text:span text:style-name="T6">Power:</text:span><text:span text:style-name="T4"> 22</text:span></text:p>
      <text:p text:style-name="Standard"><text:span text:style-name="T6">Range:</text:span><text:span text:style-name="T4"> Close (25 ft. + 5 ft./20 points of margin of success )</text:span></text:p>
      <text:p text:style-name="Standard"><text:span text:style-name="T6">Target:</text:span><text:span text:style-name="T4"> One living creature</text:span></text:p>
      <text:p text:style-name="Standard"><text:span text:style-name="T6">Duration:</text:span><text:span text:style-name="T4"> Instantaneous</text:span></text:p>
      <text:p text:style-name="P8"/>
      <text:p text:style-name="P13">You can slay any one living creature within range. The target is entitled to a Magic RR to survive the attack. If the save is successful, the creature instead takes 2d6+1/10 points of margin points of damage of success to its body.</text:p>
      <text:p text:style-name="P13">The subject might die from damage even if it succeeds on its saving throw.</text:p>
      <text:p text:style-name="P8"/>
      <text:p text:style-name="P3">Forcecage (Arcane)</text:p>
      <text:p text:style-name="Standard"><text:span text:style-name="T6">Power:</text:span><text:span text:style-name="T4"> 22</text:span></text:p>
      <text:p text:style-name="Standard"><text:span text:style-name="T6">Range:</text:span><text:span text:style-name="T4"> Close (25 ft. + 5 ft./20 points of margin of success )</text:span></text:p>
      <text:p text:style-name="Standard"><text:span text:style-name="T6">Area:</text:span><text:span text:style-name="T4"> Barred cage (20-ft. cube) or windowless cell (10-ft. cube)</text:span></text:p>
      <text:p text:style-name="Standard"><text:span text:style-name="T6">Duration:</text:span><text:span text:style-name="T4"> 2 hours +1hr/5 points of margin of success</text:span></text:p>
      <text:p text:style-name="P8"/>
      <text:p text:style-name="P13">This powerful spell brings into being an immobile, invisible cubical prison composed of either bars of force or solid walls of force (your choice).</text:p>
      <text:p text:style-name="P13">Creatures within the area are caught and contained unless they are too big to fit inside, in which case the spell automatically fails. Teleportation and other forms of astral travel provide a means of escape, but the force walls or bars extend into the Ethereal Plane, blocking ethereal travel.</text:p>
      <text:p text:style-name="Standard"><text:span text:style-name="T2">Barred Cage: </text:span><text:span text:style-name="T4">This version of the spell produces a 20-foot cube made of bands of force (similar to a </text:span><text:span text:style-name="T2">wall of force </text:span><text:span text:style-name="T4">spell) for bars. The bands are a half-inch wide, with half-inch gaps between them. Any creature capable of passing through such a small space can escape; others are confined. You can’t attack a creature in a barred cage with a weapon unless the weapon can fit between the gaps. Even against such weapons (including arrows and similar ranged attacks), a creature in the barred cage has cover. All spells and breath weapons can pass through the gaps in the bars.</text:span></text:p>
      <text:p text:style-name="Standard"><text:span text:style-name="T2">Windowless Cell: </text:span><text:span text:style-name="T4">This version of the spell produces a 10-foot cube with no way in and no way out. Solid walls of force form its six sides.</text:span></text:p>
      <text:p text:style-name="P11"/>
      <text:p text:style-name="P3">Holy Word (Divine)</text:p>
      <text:p text:style-name="Standard"><text:span text:style-name="T6">Power:</text:span><text:span text:style-name="T4"> 22</text:span></text:p>
      <text:p text:style-name="Standard"><text:span text:style-name="T6">Range:</text:span><text:span text:style-name="T4"> 40 ft.</text:span></text:p>
      <text:p text:style-name="Standard"><text:span text:style-name="T6">Area:</text:span><text:span text:style-name="T4"> Corrupted creatures in a 40-ft.-radius spread centered on you</text:span></text:p>
      <text:p text:style-name="Standard"><text:span text:style-name="T6">Duration:</text:span><text:span text:style-name="T4"> Instantaneous</text:span></text:p>
      <text:p text:style-name="P8"/>
      <text:p text:style-name="Standard"><text:span text:style-name="T4">Any corrupted (i.e. with 10 or more CPs) creature within the area that hears the </text:span><text:span text:style-name="T2">holy word </text:span><text:span text:style-name="T4">suffers the following ill effects.</text:span></text:p>
      <text:p text:style-name="P29"/>
      <table:table table:name="Table5" table:style-name="Table5">
        <table:table-column table:style-name="Table5.A"/>
        <table:table-column table:style-name="Table5.B"/>
        <table:table-row table:style-name="Table5.1">
          <table:table-cell table:style-name="Table5.A1" office:value-type="string">
            <text:p text:style-name="P30">Margin of Success</text:p>
          </table:table-cell>
          <table:table-cell table:style-name="Table5.A1" office:value-type="string">
            <text:p text:style-name="P30">Effect</text:p>
          </table:table-cell>
        </table:table-row>
        <table:table-row table:style-name="Table5.1">
          <table:table-cell table:style-name="Table5.A2" office:value-type="string">
            <text:p text:style-name="P34">0</text:p>
          </table:table-cell>
          <table:table-cell table:style-name="Table5.A2" office:value-type="string">
            <text:p text:style-name="P33">Deafened</text:p>
          </table:table-cell>
        </table:table-row>
        <table:table-row table:style-name="Table5.1">
          <table:table-cell table:style-name="Table5.A2" office:value-type="string">
            <text:p text:style-name="P34">1-15</text:p>
          </table:table-cell>
          <table:table-cell table:style-name="Table5.A2" office:value-type="string">
            <text:p text:style-name="P33">Blinded, deafened</text:p>
          </table:table-cell>
        </table:table-row>
        <text:soft-page-break/>
        <table:table-row table:style-name="Table5.1">
          <table:table-cell table:style-name="Table5.A2" office:value-type="string">
            <text:p text:style-name="P37">16-50</text:p>
          </table:table-cell>
          <table:table-cell table:style-name="Table5.A2" office:value-type="string">
            <text:p text:style-name="P33">Paralyzed, blinded, deafened</text:p>
          </table:table-cell>
        </table:table-row>
        <table:table-row table:style-name="Table5.1">
          <table:table-cell table:style-name="Table5.A5" office:value-type="string">
            <text:p text:style-name="P34">51+</text:p>
          </table:table-cell>
          <table:table-cell table:style-name="Table5.A5" office:value-type="string">
            <text:p text:style-name="P33">Killed, paralyzed, blinded, deafened</text:p>
          </table:table-cell>
        </table:table-row>
      </table:table>
      <text:p text:style-name="P23"/>
      <text:p text:style-name="P13">The effects are cumulative and concurrent. No saving throw is allowed against these effects.</text:p>
      <text:p text:style-name="Standard"><text:span text:style-name="T2">Deafened: </text:span><text:span text:style-name="T4">The creature is deafened for 1d4 rounds.</text:span></text:p>
      <text:p text:style-name="Standard"><text:span text:style-name="T2">Blinded: </text:span><text:span text:style-name="T4">The creature is blinded for 2d4 rounds.</text:span></text:p>
      <text:p text:style-name="Standard"><text:span text:style-name="T2">Paralyzed: </text:span><text:span text:style-name="T4">The creature is paralyzed and helpless for 1d10 minutes.</text:span></text:p>
      <text:p text:style-name="Standard"><text:span text:style-name="T2">Killed: </text:span><text:span text:style-name="T4">Living creatures die. Undead creatures are destroyed.</text:span></text:p>
      <text:p text:style-name="Standard"><text:span text:style-name="T4">Furthermore, if you are on your home plane when you cast this spell, demons within the area are instantly banished back to their home planes. Creatures so banished cannot return for at least 24 hours. This effect takes place regardless of whether the creatures hear the </text:span><text:span text:style-name="T2">holy word. </text:span></text:p>
      <text:p text:style-name="P20"/>
      <text:p text:style-name="P39">Insanity (Arcane)</text:p>
      <text:p text:style-name="P38"><text:span text:style-name="T31">Power:</text:span><text:span text:style-name="T30"> 22</text:span></text:p>
      <text:p text:style-name="P38"><text:span text:style-name="T31">Range: </text:span><text:span text:style-name="T30">Medium (100 ft. + 10 ft./10 points of margin of success)</text:span></text:p>
      <text:p text:style-name="P38"><text:span text:style-name="T31">Target:</text:span><text:span text:style-name="T30"> One living creature</text:span></text:p>
      <text:p text:style-name="P38"><text:span text:style-name="T31">Duration:</text:span><text:span text:style-name="T30"> Instantaneous</text:span></text:p>
      <text:p text:style-name="P38"><text:span text:style-name="T30">The affected creature suffers from a continuous </text:span><text:span text:style-name="T29">confusion </text:span><text:span text:style-name="T30">effect, as the spell.</text:span></text:p>
      <text:p text:style-name="P21"/>
      <text:p text:style-name="P3">Mage’s Magnificent Mansion (Arcane)</text:p>
      <text:p text:style-name="Standard"><text:span text:style-name="T6">Power:</text:span><text:span text:style-name="T4"> 22</text:span></text:p>
      <text:p text:style-name="Standard"><text:span text:style-name="T6">Range:</text:span><text:span text:style-name="T4"> Close (25 ft. + 5 ft./ 10 points of margin of success s)</text:span></text:p>
      <text:p text:style-name="Standard"><text:span text:style-name="T6">Effect:</text:span><text:span text:style-name="T4"> Extradimensional mansion, up to three 10-ft. cubes +10ft/10 points of margin of success</text:span></text:p>
      <text:p text:style-name="Standard"><text:span text:style-name="T6">Duration:</text:span><text:span text:style-name="T4"> 2 hours +2hr/10 points of margin of success</text:span></text:p>
      <text:p text:style-name="P8"/>
      <text:p text:style-name="P13">You conjure up an extradimensional dwelling that has a single entrance on the plane from which the spell was cast. The entry point looks like a faint shimmering in the air that is 4 feet wide and 8 feet high. Only those you designate may enter the mansion, and the portal is shut and made invisible behind you when you enter. You may open it again from your own side at will. Once observers have passed beyond the entrance, they are in a magnificent foyer with numerous chambers beyond. The atmosphere is clean, fresh, and warm.</text:p>
      <text:p text:style-name="Standard"><text:span text:style-name="T4">You can create any floor plan you desire to the limit of the spell’s effect. The place is furnished and contains sufficient foodstuffs to serve a nine-course banquet to a dozen people per caster level. A staff of near-transparent servants (as many as two per caster level), liveried and obedient, wait upon all who enter. The servants function as </text:span><text:span text:style-name="T2">unseen servant </text:span><text:span text:style-name="T4">spells except that they are visible and can go anywhere in the mansion.</text:span></text:p>
      <text:p text:style-name="P13">Since the place can be entered only through its special portal, outside conditions do not affect the mansion, nor do conditions inside it pass to the plane beyond.</text:p>
      <text:p text:style-name="P18"/>
      <text:p text:style-name="P3">Phase Door (Arcane)</text:p>
      <text:p text:style-name="Standard"><text:span text:style-name="T6">Power:</text:span><text:span text:style-name="T4"> 22</text:span></text:p>
      <text:p text:style-name="Standard"><text:span text:style-name="T6">Range:</text:span><text:span text:style-name="T4"> 0 ft.</text:span></text:p>
      <text:p text:style-name="Standard"><text:span text:style-name="T6">Effect:</text:span><text:span text:style-name="T4"> Ethereal 5 ft. by 8 ft. opening, 10 ft. deep + 5 ft. deep/20 points of margin of success</text:span></text:p>
      <text:p text:style-name="Standard"><text:span text:style-name="T6">Duration:</text:span><text:span text:style-name="T4"> One usage, plus 1/10 points of margin of success</text:span></text:p>
      <text:p text:style-name="P8"/>
      <text:p text:style-name="Standard"><text:span text:style-name="T4">This spell creates an ethereal passage through wooden, plaster, or stone walls, but not other materials. The </text:span><text:span text:style-name="T2">phase door </text:span><text:span text:style-name="T4">is invisible and inaccessible to all creatures except you, and only you can use the passage. You disappear when you enter the </text:span><text:span text:style-name="T2">phase door </text:span><text:span text:style-name="T4">and appear when you exit. If you desire, you can take one other creature (Medium or smaller) through the door. This counts as two uses of the door. The door does not allow light, sound, or spell effects through it, nor can you see through it without using it. Thus, the spell can provide an escape route, though certain creatures, such as phase spiders, can follow with ease.</text:span><text:span text:style-name="T24"> </text:span><text:span text:style-name="T4">A </text:span><text:span text:style-name="T2">phase door </text:span><text:span text:style-name="T4">is subject to </text:span><text:span text:style-name="T2">dispel magic. </text:span><text:span text:style-name="T4">If anyone is within the passage when it is dispelled, he is harmlessly ejected just as if he were inside a </text:span><text:span text:style-name="T2">passwall </text:span><text:span text:style-name="T4">effect.</text:span></text:p>
      <text:p text:style-name="Standard"><text:span text:style-name="T4">You can allow other creatures to use the </text:span><text:span text:style-name="T2">phase door </text:span><text:span text:style-name="T4">by setting some triggering condition for the door. Such conditions can be as simple or elaborate as you desire. They can be based on a creature’s name or identity but otherwise must be based on observable actions or qualities.</text:span></text:p>
      <text:p text:style-name="P3"/>
      <text:p text:style-name="P3">Power Word Blind (Divine/Arcane)</text:p>
      <text:p text:style-name="Standard"><text:span text:style-name="T6">Power:</text:span><text:span text:style-name="T4"> 22</text:span></text:p>
      <text:p text:style-name="Standard"><text:span text:style-name="T6">Range:</text:span><text:span text:style-name="T4"> Close (25 ft. + 5 ft./10 points of margin of success)</text:span></text:p>
      <text:p text:style-name="Standard"><text:soft-page-break/><text:span text:style-name="T6">Target:</text:span><text:span text:style-name="T4"> One creature</text:span></text:p>
      <text:p text:style-name="Standard"><text:span text:style-name="T6">Duration:</text:span><text:span text:style-name="T4"> See text</text:span></text:p>
      <text:p text:style-name="P8"/>
      <text:p text:style-name="P13">You utter a single word of power that causes one creature of your choice to become blinded, whether the creature can hear the word or not.</text:p>
      <text:p text:style-name="P13"/>
      <text:p text:style-name="P23"/>
      <table:table table:name="Table8" table:style-name="Table8">
        <table:table-column table:style-name="Table8.A"/>
        <table:table-column table:style-name="Table8.B"/>
        <table:table-row table:style-name="Table8.1">
          <table:table-cell table:style-name="Table8.A1" office:value-type="string">
            <text:p text:style-name="P32">Margin of Success</text:p>
          </table:table-cell>
          <table:table-cell table:style-name="Table8.A1" office:value-type="string">
            <text:p text:style-name="P32">Duration</text:p>
          </table:table-cell>
        </table:table-row>
        <table:table-row table:style-name="Table8.1">
          <table:table-cell table:style-name="Table8.A2" office:value-type="string">
            <text:p text:style-name="P33">50 or more</text:p>
          </table:table-cell>
          <table:table-cell table:style-name="Table8.A2" office:value-type="string">
            <text:p text:style-name="P33">Permanent</text:p>
          </table:table-cell>
        </table:table-row>
        <table:table-row table:style-name="Table8.1">
          <table:table-cell table:style-name="Table8.A2" office:value-type="string">
            <text:p text:style-name="P33">21–49</text:p>
          </table:table-cell>
          <table:table-cell table:style-name="Table8.A2" office:value-type="string">
            <text:p text:style-name="P33">1d4+1 minutes</text:p>
          </table:table-cell>
        </table:table-row>
        <table:table-row table:style-name="Table8.1">
          <table:table-cell table:style-name="Table8.A4" office:value-type="string">
            <text:p text:style-name="P33">0-20</text:p>
          </table:table-cell>
          <table:table-cell table:style-name="Table8.A4" office:value-type="string">
            <text:p text:style-name="P33">1d4+1 rounds</text:p>
          </table:table-cell>
        </table:table-row>
      </table:table>
      <text:p text:style-name="P18"/>
      <text:p text:style-name="P3">Regenerate (Divine)</text:p>
      <text:p text:style-name="Standard"><text:span text:style-name="T6">Power:</text:span><text:span text:style-name="T4"> 22</text:span></text:p>
      <text:p text:style-name="Standard"><text:span text:style-name="T6">Range:</text:span><text:span text:style-name="T4"> Touch</text:span></text:p>
      <text:p text:style-name="Standard"><text:span text:style-name="T6">Target:</text:span><text:span text:style-name="T4"> Living creature touched</text:span></text:p>
      <text:p text:style-name="Standard"><text:span text:style-name="T6">Duration:</text:span><text:span text:style-name="T4"> Instantaneous</text:span></text:p>
      <text:p text:style-name="P8"/>
      <text:p text:style-name="Standard"><text:span text:style-name="T2">Regenerate</text:span><text:span text:style-name="T4"> cures 3d8 points of damage +1 point/10 points of margin of success (maximum +35) to all locations, rids the subject of exhaustion and/or fatigue, and eliminates all nonlethal damage the subject has taken. Destroyed and severed locations are regenerated in 1rnd if the damaged body part is still present, or in 2d10 rounds if not. It has no effect on nonliving creatures (including undead).</text:span></text:p>
      <text:p text:style-name="P3"/>
      <text:p text:style-name="P5"><text:span text:style-name="T25">Resurrection </text:span><text:span text:style-name="T25">(Divine)</text:span></text:p>
      <text:p text:style-name="Standard"><text:span text:style-name="T6">Power:</text:span><text:span text:style-name="T4"> 22</text:span></text:p>
      <text:p text:style-name="Standard"><text:span text:style-name="T4">This spell functions like </text:span><text:span text:style-name="T2">raise dead, </text:span><text:span text:style-name="T4">except that you are able to restore life and complete strength to any deceased creature.</text:span></text:p>
      <text:p text:style-name="Standard"><text:span text:style-name="T4">The condition of the remains is not a factor. So long as some small portion of the creature’s body still exists, it can be resurrected, but the portion receiving the spell must have been part of the creature’s body at the time of death. (The remains of a creature hit by a </text:span><text:span text:style-name="T2">disintegrate </text:span><text:span text:style-name="T4">spell count as a small portion of its body.) The creature can have been dead no longer than 10 years per caster level.</text:span></text:p>
      <text:p text:style-name="P13">The subject loses 2 points of Constitution (If this reduction would bring its Con to 0 or lower, it can’t be resurrected). This Constitution loss cannot be repaired by any means.</text:p>
      <text:p text:style-name="P13">You can resurrect someone killed by a death effect or someone who has been turned into an undead creature and then destroyed. You cannot resurrect someone who has died of old age. Constructs, elementals, outsiders, and undead creatures can’t be resurrected.</text:p>
      <text:p text:style-name="P13"/>
      <text:p text:style-name="P3">Reverse Gravity (Arcane)</text:p>
      <text:p text:style-name="Standard"><text:span text:style-name="T6">Power:</text:span><text:span text:style-name="T4"> 22</text:span></text:p>
      <text:p text:style-name="Standard"><text:span text:style-name="T6">Range: </text:span><text:span text:style-name="T4">Medium (100 ft. + 10 ft./10 points of margin of success)</text:span></text:p>
      <text:p text:style-name="Standard"><text:span text:style-name="T6">Area:</text:span><text:span text:style-name="T4"> Up to one 10-ft. cube per 10 points of margin of success</text:span></text:p>
      <text:p text:style-name="Standard"><text:span text:style-name="T6">Duration:</text:span><text:span text:style-name="T4"> 1 round +1rnd/10 points of margin of success</text:span></text:p>
      <text:p text:style-name="P8"/>
      <text:p text:style-name="P13">This spell reverses gravity in an area, causing all unattached objects and creatures within that area to fall upward and reach the top of the area in 1 round. If some solid object (such as a ceiling) is encountered in this fall, falling objects and creatures strike it in the same manner as they would during a normal downward fall. If an object or creature reaches the top of the area without striking anything, it remains there, oscillating slightly, until the spell ends. At the end of the spell duration, affected objects and creatures fall downward.</text:p>
      <text:p text:style-name="P13">Provided it has something to hold onto, a creature caught in the area can attempt a Reflex save to secure itself when the spell strikes. Creatures who can fly or levitate can keep themselves from falling.</text:p>
      <text:p text:style-name="P18"/>
      <text:p text:style-name="P18"/>
      <text:p text:style-name="P46">Eight Order</text:p>
      <text:p text:style-name="P3"/>
      <text:p text:style-name="P3">Earthquake (Divine)</text:p>
      <text:p text:style-name="Standard"><text:span text:style-name="T6">Power:</text:span><text:span text:style-name="T4"> 24</text:span></text:p>
      <text:p text:style-name="Standard"><text:span text:style-name="T6">Range:</text:span><text:span text:style-name="T4"> Long (400 ft. + 40 ft./10 points of margin of success)</text:span></text:p>
      <text:p text:style-name="Standard"><text:span text:style-name="T6">Area:</text:span><text:span text:style-name="T4"> 80-ft.-radius spread</text:span></text:p>
      <text:p text:style-name="Standard"><text:span text:style-name="T6">Duration:</text:span><text:span text:style-name="T4"> 1 round</text:span></text:p>
      <text:p text:style-name="P8"/>
      <text:p text:style-name="Standard"><text:span text:style-name="T4">When you cast </text:span><text:span text:style-name="T2">earthquake, </text:span><text:span text:style-name="T4">an intense but highly localized tremor rips the ground. The shock knocks creatures down, collapses structures, opens cracks in the ground, and more. The effect lasts for 1 round, during which time creatures on the ground can’t move or attack. A spellcaster on the ground suffer a -30 penalty to all casting maneuvers. The earthquake affects all terrain, vegetation, structures, and creatures in the area. The specific effect of an </text:span><text:span text:style-name="T2">earthquake </text:span><text:span text:style-name="T4">spell depends on the nature of the terrain where it is cast.</text:span></text:p>
      <text:p text:style-name="Standard"><text:span text:style-name="T2">Cave, Cavern, or Tunnel: </text:span><text:span text:style-name="T4">The spell collapses the roof, dealing 6d6 points of bludgeoning area damage to any creature caught under the cave-in (Acrobatic DC 100 half ) and pinning that creature beneath the rubble (see below). An </text:span><text:span text:style-name="T2">earthquake </text:span><text:span text:style-name="T4">cast on the roof of a very large cavern could also endanger those outside the actual area but below the falling debris.</text:span></text:p>
      <text:p text:style-name="Standard"><text:span text:style-name="T2">Cliffs: Earthquake </text:span><text:span text:style-name="T4">causes a cliff to crumble, creating a landslide that travels horizontally as far as it fell vertically. Any creature in the path takes 6d6 points of area bludgeoning damage (Acrobatic DC 100 half ) and is pinned beneath the rubble (see below).</text:span></text:p>
      <text:p text:style-name="Standard"><text:span text:style-name="T2">Open Ground: </text:span><text:span text:style-name="T4">Each creature standing in the area must make a Acrobatic DC 100 check or fall down. Fissures open in the earth, and every creature on the ground has a 25% chance to fall into one (Dodge DC 125 to avoid a fissure). At the end of the spell, all fissures grind shut, killing any creatures still trapped within.</text:span></text:p>
      <text:p text:style-name="Standard"><text:span text:style-name="T2">Structure: </text:span><text:span text:style-name="T4">Any structure standing on open ground takes 100 points of damage, enough to collapse a typical wooden or masonry building, but not a structure built of stone or reinforced masonry. Hardness does not reduce this damage, nor is it halved as damage dealt to objects normally is. Any creature caught inside a collapsing structure takes 8d6 points of area bludgeoning damage (Acrobatic DC 100 half ) and is pinned beneath the rubble (see below).</text:span></text:p>
      <text:p text:style-name="Standard"><text:span text:style-name="T2">River, Lake, or Marsh: </text:span><text:span text:style-name="T4">Fissures open underneath the water, draining away the water from that area and forming muddy ground. Soggy marsh or swampland becomes quicksand for the duration of the spell, sucking down creatures and structures. Each creature in the area must make a Acrobatic DC 100 check or sink down in the mud and quicksand. At the end of the spell, the rest of the body of water rushes in to replace the drained water, possibly drowning those caught in the mud.</text:span></text:p>
      <text:p text:style-name="Standard"><text:span text:style-name="T2">Pinned beneath Rubble: </text:span><text:span text:style-name="T4">Any creature pinned beneath rubble takes 1d3 points of damage to the body per minute while pinned.</text:span></text:p>
      <text:p text:style-name="P13"/>
      <text:p text:style-name="P39">Holy Aura (Divine)</text:p>
      <text:p text:style-name="P38"><text:span text:style-name="T31">Power:</text:span><text:span text:style-name="T30"> 24</text:span></text:p>
      <text:p text:style-name="P38"><text:span text:style-name="T31">Range:</text:span><text:span text:style-name="T30"> 20 ft.</text:span></text:p>
      <text:p text:style-name="P38"><text:span text:style-name="T31">Targets:</text:span><text:span text:style-name="T30"> One creature +one/10 points of margin of success in a 20-ft.-radius burst centered on you</text:span></text:p>
      <text:p text:style-name="P38"><text:span text:style-name="T31">Duration:</text:span><text:span text:style-name="T30"> 1 round + 1rnd/10 points of margin of success</text:span></text:p>
      <text:p text:style-name="P41"/>
      <text:p text:style-name="P41">A brilliant divine radiance surrounds the subjects, protecting them from attacks, granting them resistance to spells cast by creatures opposing his patron, and causing them to become blinded when they strike the subjects. This abjuration has four effects.</text:p>
      <text:p text:style-name="P41">First, each warded creature gains a +20 deflection bonus to all his Dodge and Block checks and a +20 bonus on all RRs against all attacks. Second, each warded creature gains and additional +25 bonus to all Magical RRs against spells cast by creatures opposing his patron.</text:p>
      <text:p text:style-name="P38"><text:span text:style-name="T30">Third, the abjuration blocks possession and mental influence, just as </text:span><text:span text:style-name="T29">protection from evil </text:span><text:span text:style-name="T30">does.</text:span></text:p>
      <text:p text:style-name="P41">Finally, if an creature opposing the caster patron succeeds on a melee attack against a warded creature, the offending attacker is blinded (Physical RR negates).</text:p>
      <text:p text:style-name="P14"/>
      <text:p text:style-name="P51">Symbol of Death (Divine)</text:p>
      <text:p text:style-name="P53"><text:span text:style-name="T18">Power</text:span><text:span text:style-name="T18">:</text:span><text:span text:style-name="T17"> </text:span><text:span text:style-name="T17">24</text:span></text:p>
      <text:p text:style-name="P53"><text:span text:style-name="T18">Range:</text:span><text:span text:style-name="T17"> 0 ft.; see text</text:span></text:p>
      <text:p text:style-name="P53"><text:span text:style-name="T18">Effect:</text:span><text:span text:style-name="T17"> One symbol</text:span></text:p>
      <text:p text:style-name="P53"><text:span text:style-name="T18">Duration:</text:span><text:span text:style-name="T17"> See text</text:span></text:p>
      <text:p text:style-name="P50"/>
      <text:p text:style-name="P53"><text:span text:style-name="T17">This spell allows you to scribe a potent rune of power upon a surface. When triggered, a </text:span><text:span text:style-name="T19">symbol of death </text:span><text:span text:style-name="T17">slays one or more </text:span><text:soft-page-break/><text:span text:style-name="T17">creatures within 60 feet of the symbol (treat as a burst) whose combined total current </text:span><text:span text:style-name="T17">body </text:span><text:span text:style-name="T17">hit points do not exceed 150. The </text:span><text:span text:style-name="T19">symbol of death </text:span><text:span text:style-name="T17">affects the closest creatures first, skipping creatures with too many hit points to affect. Once triggered, the </text:span><text:span text:style-name="T19">symbol </text:span><text:span text:style-name="T17">becomes active and glows, lasting for 10 minutes per caster level or until it has affected 150 hit points’ worth of creatures, whichever comes first. Any creature that enters the area while the </text:span><text:span text:style-name="T19">symbol of death </text:span><text:span text:style-name="T17">is active is subject to its effect, whether or not that creature was in the area when it was triggered. A creature need save against the </text:span><text:span text:style-name="T19">symbol </text:span><text:span text:style-name="T17">only once as long as it remains within the area, though if it leaves the area and returns while the </text:span><text:span text:style-name="T19">symbol </text:span><text:span text:style-name="T17">is still active, it must save again.</text:span></text:p>
      <text:p text:style-name="P53"><text:span text:style-name="T17">Until it is triggered, the </text:span><text:span text:style-name="T19">symbol of death </text:span><text:span text:style-name="T17">is inactive (though visible and legible at a distance of 60 feet). To be effective, a </text:span><text:span text:style-name="T19">symbol of death </text:span><text:span text:style-name="T17">must always be placed in plain sight and in a prominent location. Covering or hiding the rune renders the </text:span><text:span text:style-name="T19">symbol of death </text:span><text:span text:style-name="T17">ineffective, unless a creature removes the covering, in which case the </text:span><text:span text:style-name="T19">symbol of death </text:span><text:span text:style-name="T17">works normally.</text:span></text:p>
      <text:p text:style-name="P53"><text:span text:style-name="T17">As a default, a </text:span><text:span text:style-name="T19">symbol of death </text:span><text:span text:style-name="T17">is triggered whenever a creature does one or more of the following, as you select: looks at the rune; reads the rune; touches the rune; passes over the rune; or passes through a portal bearing the rune. Regardless of the trigger method or methods chosen, a creature more than 60 feet from a symbol of death can’t trigger it (even if it meets one or more of the triggering conditions, such as reading the rune). Once the spell is cast, a </text:span><text:span text:style-name="T19">symbol of death</text:span><text:span text:style-name="T17">’s triggering conditions cannot be changed.</text:span></text:p>
      <text:p text:style-name="P53"><text:span text:style-name="T17">In this case, “reading” the rune means any attempt to study it, identify it, or fathom its meaning. Throwing a cover over a </text:span><text:span text:style-name="T19">symbol of death </text:span><text:span text:style-name="T17">to render it inoperative triggers it if the symbol reacts to touch. You can’t use a </text:span><text:span text:style-name="T19">symbol of death </text:span><text:span text:style-name="T17">offensively; for instance, a touch-triggered symbol of death remains untriggered if an item bearing the </text:span><text:span text:style-name="T19">symbol of death </text:span><text:span text:style-name="T17">is used to touch a creature. Likewise, a </text:span><text:span text:style-name="T19">symbol of death </text:span><text:span text:style-name="T17">cannot be placed on a weapon and set to activate when the weapon strikes a foe.</text:span></text:p>
      <text:p text:style-name="P53"><text:span text:style-name="T17">You can also set special triggering limitations of your own. These can be as simple or elaborate as you desire. Special conditions for triggering a </text:span><text:span text:style-name="T19">symbol of death </text:span><text:span text:style-name="T17">can be based on a creature’s name </text:span><text:span text:style-name="T17">or</text:span><text:span text:style-name="T17"> identity, but otherwise must be based on observable actions or qualities. Intangibles such as level and hit points don’t qualify. </text:span></text:p>
      <text:p text:style-name="P53"><text:span text:style-name="T17">When scribing a </text:span><text:span text:style-name="T19">symbol of death</text:span><text:span text:style-name="T17">, you can specify a password or phrase that prevents a creature using it from triggering the effect</text:span><text:span text:style-name="T19">. </text:span><text:span text:style-name="T17">Anyone using the password remains immune to that particular rune’s effects so long as the creature remains within 60 feet of the rune. If the creature leaves the radius and returns later, it must use the password again.</text:span></text:p>
      <text:p text:style-name="P53"><text:span text:style-name="T17">You also can attune any number of creatures to the </text:span><text:span text:style-name="T19">symbol of death, </text:span><text:span text:style-name="T17">but doing this can extend the casting time. Attuning one or two creatures takes negligible time, and attuning a small group (as many as ten creatures) extends the casting time to 1 hour. Attuning a large group (as many as twenty-five creatures) takes 24 hours. Attuning larger groups takes proportionately longer. Any creature attuned to a </text:span><text:span text:style-name="T19">symbol of death </text:span><text:span text:style-name="T17">cannot trigger it and is immune to its effects, even if within its radius when triggered. You are automatically considered attuned to your own </text:span><text:span text:style-name="T19">symbols of death</text:span><text:span text:style-name="T17">, and thus always ignore the effects and cannot inadvertently trigger them.</text:span></text:p>
      <text:p text:style-name="P53"><text:span text:style-name="T20">A</text:span><text:span text:style-name="T17"> </text:span><text:span text:style-name="T19">symbol of death </text:span><text:span text:style-name="T20">can be identified </text:span><text:span text:style-name="T17">with a DC </text:span><text:span text:style-name="T17">150</text:span><text:span text:style-name="T17"> </text:span><text:span text:style-name="T17">Attunement</text:span><text:span text:style-name="T17"> check. Of course, if the </text:span><text:span text:style-name="T19">symbol of death </text:span><text:span text:style-name="T17">is set to be triggered by reading it, this will trigger the symbol.</text:span></text:p>
      <text:p text:style-name="P53"><text:span text:style-name="T17">A </text:span><text:span text:style-name="T19">symbol of death </text:span><text:span text:style-name="T17">can be removed by a successful </text:span><text:span text:style-name="T19">dispel magic </text:span><text:span text:style-name="T17">targeted solely on the rune. </text:span><text:span text:style-name="T19"><text:s/></text:span><text:span text:style-name="T17">Destruction of the surface where a </text:span><text:span text:style-name="T19">symbol of death </text:span><text:span text:style-name="T17">is inscribed destroys the </text:span><text:span text:style-name="T19">symbol </text:span><text:span text:style-name="T17">but also triggers it.</text:span></text:p>
      <text:p text:style-name="P50"/>
      <text:p text:style-name="P54"><text:span text:style-name="T15">Symbol of Insanity </text:span><text:span text:style-name="T15">(Divine)</text:span></text:p>
      <text:p text:style-name="P53"><text:span text:style-name="T18">Power</text:span><text:span text:style-name="T18">:</text:span><text:span text:style-name="T17"> </text:span><text:span text:style-name="T17">24</text:span></text:p>
      <text:p text:style-name="P50"/>
      <text:p text:style-name="P53"><text:span text:style-name="T17">This spell functions like </text:span><text:span text:style-name="T19">symbol of death</text:span><text:span text:style-name="T17">, except that all creatures within the radius of the </text:span><text:span text:style-name="T19">symbol of insanity </text:span><text:span text:style-name="T17">instead become permanently insane (as the </text:span><text:span text:style-name="T19">insanity </text:span><text:span text:style-name="T17">spell).</text:span></text:p>
      <text:p text:style-name="P53"><text:span text:style-name="T17">Unlike </text:span><text:span text:style-name="T19">symbol of death</text:span><text:span text:style-name="T17">, symbol of insanity has no hit point limit; once triggered, a </text:span><text:span text:style-name="T19">symbol of insanity </text:span><text:span text:style-name="T17">simply remains active for 10 minutes per caster level.</text:span></text:p>
      <text:p text:style-name="P52"/>
      <text:p text:style-name="P3">Trap the Soul (Arcane)</text:p>
      <text:p text:style-name="Standard"><text:span text:style-name="T6">Power:</text:span><text:span text:style-name="T4"> 24</text:span></text:p>
      <text:p text:style-name="Standard"><text:span text:style-name="T6">Range:</text:span><text:span text:style-name="T4"> Close (25 ft. + 5 ft./ 10 points of margin of success)</text:span></text:p>
      <text:p text:style-name="Standard"><text:span text:style-name="T6">Target:</text:span><text:span text:style-name="T4"> One creature</text:span></text:p>
      <text:p text:style-name="Standard"><text:span text:style-name="T6">Duration:</text:span><text:span text:style-name="T4"> Permanent; see text</text:span></text:p>
      <text:p text:style-name="P8"/>
      <text:p text:style-name="Standard"><text:span text:style-name="T2">Trap the soul </text:span><text:span text:style-name="T4">forces a creature’s life force (and its material body) into a gem. The gem holds the trapped entity indefinitely or until the gem is broken and the life force is released, which allows the material body to reform. If the trapped creature is a powerful creature from another plane it can be required to perform a service immediately upon being freed. Otherwise, the creature can go free once the gem imprisoning it is broken.</text:span></text:p>
      <text:p text:style-name="P13">Depending on the version selected, the spell can be triggered in one of two ways.</text:p>
      <text:p text:style-name="Standard"><text:span text:style-name="T2">Spell Completion: </text:span><text:span text:style-name="T4">First, the spell can be completed by speaking its final word as a standard action as if you were casting a regular spell at the subject. This allows a Magical RR to avoid the effect. If the creature’s name is spoken as well, it receives a -20 penalty to its RR. If the resistance is successful, the gem shatters.</text:span></text:p>
      <text:p text:style-name="Standard"><text:span text:style-name="T2">Trigger Object: </text:span><text:span text:style-name="T4">The second method is far more insidious, for it tricks the subject into accepting a trigger object inscribed </text:span><text:soft-page-break/><text:span text:style-name="T4">with the final spell word, automatically placing the creature’s soul in the trap. To use this method, both the creature’s name and the trigger word must be inscribed on the trigger object when the gem is enspelled. <text:s/>As soon as the subject picks up or accepts the trigger object, its life force is automatically transferred to the gem without the benefit of resistance.</text:span></text:p>
      <text:p text:style-name="P9"/>
      <text:p text:style-name="P9"/>
      <text:p text:style-name="P46">Ninth Order</text:p>
      <text:p text:style-name="P3"/>
      <text:p text:style-name="P3">Mage’s Disjunction (Arcane)</text:p>
      <text:p text:style-name="Standard"><text:span text:style-name="T6">Power: </text:span><text:span text:style-name="T4">25</text:span></text:p>
      <text:p text:style-name="Standard"><text:span text:style-name="T6">Range:</text:span><text:span text:style-name="T4"> Close (25 ft. + 5 ft./ 10 points of margin of success)</text:span></text:p>
      <text:p text:style-name="Standard"><text:span text:style-name="T6">Area:</text:span><text:span text:style-name="T4"> All magical effects and magic items within a 40-ft.-radius burst</text:span></text:p>
      <text:p text:style-name="Standard"><text:span text:style-name="T6">Duration:</text:span><text:span text:style-name="T4"> Instantaneous</text:span></text:p>
      <text:p text:style-name="P8"/>
      <text:p text:style-name="Standard"><text:span text:style-name="T4">All magical effects and magic items within the radius of the spell, except for those that you carry or touch, are disjoined. That is, spells and spell-like effects are separated into their individual components (ending the effect as a </text:span><text:span text:style-name="T2">dispel magic </text:span><text:span text:style-name="T4">spell does), and each permanent magic item must make a successful RR or be turned into a normal item. An item in a creature’s possession uses its own Magical RR bonus or its possessor’s Magical RR bonus, whichever is higher.</text:span></text:p>
      <text:p text:style-name="Standard"><text:span text:style-name="T4">Even artifacts are subject to </text:span><text:span text:style-name="T2">disjunction, </text:span><text:span text:style-name="T4">though there is only a 1% chance per caster level of actually affecting such powerful items. Additionally, if an artifact is destroyed, you must make a DC 150 Magical RR or permanently lose all spellcasting abilities. (These abilities cannot be recovered by mortal magic)</text:span></text:p>
      <text:p text:style-name="P3"/>
      <text:p text:style-name="P5"><text:span text:style-name="T25">Meteor Swarm </text:span><text:span text:style-name="T25">(Arcane)</text:span></text:p>
      <text:p text:style-name="Standard"><text:span text:style-name="T6">Power:</text:span><text:span text:style-name="T4"> 25</text:span></text:p>
      <text:p text:style-name="Standard"><text:span text:style-name="T6">Range:</text:span><text:span text:style-name="T4"> Long (400 ft. + 40 ft./10 points of margin of success)</text:span></text:p>
      <text:p text:style-name="Standard"><text:span text:style-name="T6">Area:</text:span><text:span text:style-name="T4"> Four 40-ft.-radius spreads; see text</text:span></text:p>
      <text:p text:style-name="Standard"><text:span text:style-name="T6">Duration:</text:span><text:span text:style-name="T4"> Instantaneous</text:span></text:p>
      <text:p text:style-name="P8"/>
      <text:p text:style-name="Standard"><text:span text:style-name="T2">Meteor swarm </text:span><text:span text:style-name="T4">is a very powerful and spectacular spell that is similar to </text:span><text:span text:style-name="T2">fireball </text:span><text:span text:style-name="T4">in many aspects. When you cast it, four 2- foot-diameter spheres spring from your outstretched hand and streak in straight lines to the spots you select. The meteor spheres leave a fiery trail of sparks.</text:span></text:p>
      <text:p text:style-name="P13">If you aim a sphere at a specific creature, you may make a ranged attack to strike the target with the meteor. Any creature struck by one of these spheres takes 2d6 points of area bludgeoning damage, in addition to the sphere’s fire damage (see below). If a targeted sphere misses its target, it simply explodes at the nearest corner of the target’s space. You may aim more than one meteor at the same target.</text:p>
      <text:p text:style-name="P13">Once a sphere reaches its destination, it explodes in a 40-foot-radius spread, dealing 6d6 points of area fire damage to each creature in the area.</text:p>
      <text:p text:style-name="P13"/>
      <text:p text:style-name="P7">Mind Blank (Arcane)</text:p>
      <text:p text:style-name="Standard"><text:span text:style-name="T6">Power:</text:span><text:span text:style-name="T4"> 25</text:span></text:p>
      <text:p text:style-name="Standard"><text:span text:style-name="T6">Range:</text:span><text:span text:style-name="T4"> Close (25 ft. + 5 ft./20 points of margin of success)</text:span></text:p>
      <text:p text:style-name="Standard"><text:span text:style-name="T6">Target:</text:span><text:span text:style-name="T4"> One creature</text:span></text:p>
      <text:p text:style-name="Standard"><text:span text:style-name="T6">Duration:</text:span><text:span text:style-name="T4"> 24 hours</text:span></text:p>
      <text:p text:style-name="P8"/>
      <text:p text:style-name="Standard"><text:span text:style-name="T4">The subject is protected from all devices and spells that detect, influence, or read emotions or thoughts. This spell protects against all mind-affecting spells and effects as well as information gathering by divination spells or effects. In the case of scrying that scans an area the creature is in, such as </text:span><text:span text:style-name="T2">arcane eye, </text:span><text:span text:style-name="T4">the spell works but the creature simply isn’t detected. Scrying attempts that are targeted specifically at the subject do not work at all.</text:span></text:p>
      <text:p text:style-name="P9"/>
      <text:p text:style-name="P24">Power Word Kill <text:span text:style-name="T23">(Divine/Arcane)</text:span></text:p>
      <text:p text:style-name="Standard"><text:span text:style-name="T8">Power:</text:span><text:span text:style-name="T9"> 25</text:span></text:p>
      <text:p text:style-name="Standard"><text:span text:style-name="T6">Range:</text:span><text:span text:style-name="T4"> Close (25 ft. + 5 ft./10 points of margin of success)</text:span></text:p>
      <text:p text:style-name="Standard"><text:span text:style-name="T6">Target:</text:span><text:span text:style-name="T4"> One living creature</text:span></text:p>
      <text:p text:style-name="Standard"><text:span text:style-name="T6">Duration:</text:span><text:span text:style-name="T4"> Instantaneous</text:span></text:p>
      <text:p text:style-name="P8"/>
      <text:p text:style-name="P13">You utter a single word of power that instantly kills one creature of your choice, whether the creature can hear the word or not.</text:p>
      <text:p text:style-name="P9"/>
      <text:p text:style-name="P3">Shapechange (Arcane)</text:p>
      <text:p text:style-name="Standard"><text:span text:style-name="T6">Power:</text:span><text:span text:style-name="T4"> 25</text:span></text:p>
      <text:p text:style-name="Standard"><text:span text:style-name="T6">Range:</text:span><text:span text:style-name="T4"> Personal</text:span></text:p>
      <text:p text:style-name="Standard"><text:span text:style-name="T6">Target:</text:span><text:span text:style-name="T4"> You</text:span></text:p>
      <text:p text:style-name="Standard"><text:soft-page-break/><text:span text:style-name="T6">Duration:</text:span><text:span text:style-name="T4"> 10 min. +10min/10 points of margin of success</text:span></text:p>
      <text:p text:style-name="P13"/>
      <text:p text:style-name="Standard"><text:span text:style-name="T4">This spell functions like </text:span><text:span text:style-name="T2">polymorph, </text:span><text:span text:style-name="T4">except that it enables you to assume the form of any single nonunique creature (of any type) from Fine to Colossal size. The assumed form cannot be higher in level than you. Unlike </text:span><text:span text:style-name="T2">polymorph, </text:span><text:span text:style-name="T4">this spell allows incorporeal or gaseous forms to be assumed.</text:span></text:p>
      <text:p text:style-name="P13">You gain all extraordinary and supernatural abilities (both attacks and qualities) of the assumed form, but you lose your own supernatural abilities. You also gain the type of the new form in place of your own. The new form does not disorient you. Parts of your body or pieces of equipment that are separated from you do not revert to their origi<text:span text:style-name="T33">nal forms.</text:span></text:p>
      <text:p text:style-name="P18">You can become just about anything you are familiar with. You can change form once each round as a free action. The change takes place either immediately before your regular action or immediately after it, but not during the action.</text:p>
      <text:p text:style-name="P18"/>
      <text:p text:style-name="P53"><text:span text:style-name="T16">Soul Bind </text:span><text:span text:style-name="T16">(Arcane/Divine)</text:span></text:p>
      <text:p text:style-name="P53"><text:span text:style-name="T18">Power</text:span><text:span text:style-name="T18">:</text:span><text:span text:style-name="T17"> </text:span><text:span text:style-name="T17">25</text:span></text:p>
      <text:p text:style-name="P53"><text:span text:style-name="T18">Range:</text:span><text:span text:style-name="T17"> Close (25 ft. + 5 ft./</text:span><text:span text:style-name="T17">10 points of margine of success</text:span><text:span text:style-name="T17">)</text:span></text:p>
      <text:p text:style-name="P53"><text:span text:style-name="T18">Target:</text:span><text:span text:style-name="T17"> Corpse</text:span></text:p>
      <text:p text:style-name="P53"><text:span text:style-name="T18">Duration:</text:span><text:span text:style-name="T17"> Permanent</text:span></text:p>
      <text:p text:style-name="P50"/>
      <text:p text:style-name="P53"><text:span text:style-name="T17">You draw the soul from a newly dead body and imprison it in a black sapphire gem </text:span><text:span text:style-name="T17">of at least 1000sp value</text:span><text:span text:style-name="T17">. The subject must have been dead no more than 1 round per caster level. The soul, once trapped in the gem, cannot be returned through </text:span><text:span text:style-name="T19">raise dead, resurrection </text:span><text:span text:style-name="T17">or even </text:span><text:span text:style-name="T17">divine intervention</text:span><text:span text:style-name="T19">. </text:span><text:span text:style-name="T17">Only by destroying the gem or dispelling the spell on the gem can one free the soul (which is then still dead).</text:span></text:p>
      <text:p text:style-name="P50"/>
      <text:p text:style-name="P54"><text:span text:style-name="T15">Storm of Vengeance </text:span><text:span text:style-name="T15">(Divine)</text:span></text:p>
      <text:p text:style-name="P53"><text:span text:style-name="T18">Power</text:span><text:span text:style-name="T18">:</text:span><text:span text:style-name="T17"> </text:span><text:span text:style-name="T17">25</text:span></text:p>
      <text:p text:style-name="P53"><text:span text:style-name="T18">Range:</text:span><text:span text:style-name="T17"> Long (400 ft. + 40 ft./</text:span><text:span text:style-name="T17">10 points of margin of success)</text:span></text:p>
      <text:p text:style-name="P53"><text:span text:style-name="T18">Effect:</text:span><text:span text:style-name="T17"> 360-ft.-radius storm cloud</text:span></text:p>
      <text:p text:style-name="P53"><text:span text:style-name="T18">Duration:</text:span><text:span text:style-name="T17"> Concentration (maximum 10 rounds)</text:span></text:p>
      <text:p text:style-name="P50"/>
      <text:p text:style-name="P53"><text:span text:style-name="T17">This spell creates an enormous black storm cloud. Lightning and crashing claps of thunder appear within the storm. Each creature beneath the cloud must succeed on a </text:span><text:span text:style-name="T17">Physical</text:span><text:span text:style-name="T17"> </text:span><text:span text:style-name="T17">RR </text:span><text:span text:style-name="T17">or be deafened for 1d4x10 minutes.</text:span></text:p>
      <text:p text:style-name="P50">If you do not maintain concentration on the spell after casting it, the spell ends. <text:s/>If you continue to concentrate, the spell generates additional effects in each following round, as noted below. Each effect occurs during your turn.</text:p>
      <text:p text:style-name="P53"><text:span text:style-name="T19">2nd Round: </text:span><text:span text:style-name="T17">Acid rains down in the area, dealing 1d6 points of acid </text:span><text:span text:style-name="T17">area</text:span><text:span text:style-name="T17"> damage (no </text:span><text:span text:style-name="T17">RR</text:span><text:span text:style-name="T17">).</text:span></text:p>
      <text:p text:style-name="P53"><text:span text:style-name="T19">3rd Round: </text:span><text:span text:style-name="T17">You call six bolts of lightning down from the cloud. You decide where the bolts strike. No two bolts may be directed at the same target. Each bolt deals </text:span><text:span text:style-name="T17">5</text:span><text:span text:style-name="T17">d6 points of electricity </text:span><text:span text:style-name="T17">area</text:span><text:span text:style-name="T17"> damage. A creature struck can attempt </text:span><text:span text:style-name="T17">a Magical RR</text:span><text:span text:style-name="T17"> for half damage.</text:span></text:p>
      <text:p text:style-name="P53"><text:span text:style-name="T19">4th Round: </text:span><text:span text:style-name="T17">Hailstones rain down in the area, dealing </text:span><text:span text:style-name="T17">2</text:span><text:span text:style-name="T17">d6 points of bludgeoning </text:span><text:span text:style-name="T17">area </text:span><text:span text:style-name="T17">damage (no </text:span><text:span text:style-name="T17">RR</text:span><text:span text:style-name="T17">).</text:span></text:p>
      <text:p text:style-name="P53"><text:span text:style-name="T19">5th through 10th Rounds: </text:span><text:span text:style-name="T17">Violent rain and wind gusts reduce visibility. The rain obscures all sight, including darkvision, beyond 5 feet. A creature 5 feet away has concealment (attacks have a 20% miss chance). Creatures farther away have total concealment (50% miss chance, and the attacker cannot use sight to locate the target). Speed is reduced by three-quarters.</text:span></text:p>
      <text:p text:style-name="P53"><text:span text:style-name="T17">Ranged attacks within the area of the storm are impossible. Spells cast within the area are disrupted unless the caster succeeds on a Concentration check against a DC equal to the </text:span><text:span text:style-name="T19">storm of vengeance</text:span><text:span text:style-name="T17">’s </text:span><text:span text:style-name="T17">RR</text:span><text:span text:style-name="T17"> DC.</text:span></text:p>
      <text:p text:style-name="P50"/>
      <text:p text:style-name="P4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21:41:12</meta:creation-date>
    <dc:date>2013-07-23T15:04:17.02</dc:date>
    <meta:editing-duration>PT2H31M54S</meta:editing-duration>
    <meta:editing-cycles>30</meta:editing-cycles>
    <meta:generator>OpenOffice.org/3.4$Win32 OpenOffice.org_project/340m1$Build-9590</meta:generator>
    <dc:creator>Max </dc:creator>
    <meta:document-statistic meta:table-count="6" meta:image-count="0" meta:object-count="0" meta:page-count="43" meta:paragraph-count="1181" meta:word-count="23003" meta:character-count="132401"/>
  </office:meta>
</office:document-meta>
</file>