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6.999cm" table:align="margins" style:writing-mode="lr-tb"/>
    </style:style>
    <style:style style:name="Tabella3.A" style:family="table-column">
      <style:table-column-properties style:column-width="3.817cm" style:rel-column-width="14718*"/>
    </style:style>
    <style:style style:name="Tabella3.B" style:family="table-column">
      <style:table-column-properties style:column-width="1.034cm" style:rel-column-width="3986*"/>
    </style:style>
    <style:style style:name="Tabella3.C" style:family="table-column">
      <style:table-column-properties style:column-width="1.182cm" style:rel-column-width="4555*"/>
    </style:style>
    <style:style style:name="Tabella3.D" style:family="table-column">
      <style:table-column-properties style:column-width="0.986cm" style:rel-column-width="3798*"/>
    </style:style>
    <style:style style:name="Tabella3.E" style:family="table-column">
      <style:table-column-properties style:column-width="2.464cm" style:rel-column-width="9499*"/>
    </style:style>
    <style:style style:name="Tabella3.F" style:family="table-column">
      <style:table-column-properties style:column-width="6.403cm" style:rel-column-width="24687*"/>
    </style:style>
    <style:style style:name="Tabella3.G" style:family="table-column">
      <style:table-column-properties style:column-width="1.113cm" style:rel-column-width="4292*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normal" style:font-name-asian="MS Mincho" style:font-size-asian="12pt" style:language-asian="ja" style:country-asian="JP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" style:font-size-asian="12pt" style:language-asian="ja" style:country-asian="JP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italic" fo:font-weight="normal" style:font-name-asian="MS Mincho" style:font-size-asian="12pt" style:language-asian="ja" style:country-asian="JP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normal" fo:font-weight="normal" style:font-name-asian="MS Mincho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NUOVA SPERANZA?</text:p>
      <text:p text:style-name="P1"/>
      <text:p text:style-name="P2">Corridoio:</text:p>
      <text:p text:style-name="P1">Il corridoio è protetto da una serie di glifi anti-magia: è impossibile teleportarsi e ogni altro incantesimo deve superare un TR contro il 30° per avere effetto.</text:p>
      <text:p text:style-name="P1">5 trappole-lama: attacchi +100 da Spada a Due Mani, Medie da disattivare, Molto Difficili da evitare.</text:p>
      <text:p text:style-name="P1"/>
      <text:p text:style-name="P2">Prima Sala:</text:p>
      <text:p text:style-name="P3">Muro Illusorio: Lord Shura crea un muro di terra illusorio, tipo quelli di Yonker, per rallentare il party.</text:p>
      <text:p text:style-name="P3"/>
      <text:p text:style-name="P3">È una sala abbastanza grande (8x8), decorata con finte colonne sporgenti dal muro e preziosi bassorilievi.</text:p>
      <text:p text:style-name="P3">Al centro della stanza c'è quello che pare un sarcofago di pietra che, in realtà, è l'accesso ad un livello inferiore. Il coperchio del sarcofago è protetto da un simbolo di Stun Cloud XX (crea una nube di 6 metri di diametro). </text:p>
      <text:p text:style-name="P3">A seconda di quanto ci mettono i PG possono arrivare che Shura sta aprendo il coperchio e la nube inizia a formarsi oppure che S è già passato e la nube si è formata.</text:p>
      <text:p text:style-name="P3"/>
      <text:p text:style-name="P2">Scale:</text:p>
      <text:p text:style-name="P3">Breve scala a chiocciola di pietra con sopra castato uno Earthen Spikes permanente: ovunque spuntano punte e lame di pura roccia affilatissime. Tutti devono fare 5 manovre “Estremamente Difficili”(se camminano piano) per arrivare in fondo, ogni manovra fallita subiscono un “A” da Punta (che LS ignora). <text:s/>Il soffitto è antimagico, per cui chi prova a volare subisce un attacco da caduta +20 e 1-3 critici “C” da punta.</text:p>
      <text:p text:style-name="P3">Se i PG sono troppo vicini LS userà delle illusioni per complicargli la vita.</text:p>
      <text:p text:style-name="P3"/>
      <text:p text:style-name="P2">Secondo Corridoio:</text:p>
      <text:p text:style-name="P3">Un corridoio simile al primo, con però due stretti camminatoi ai lati e quella che pare una passerella di legno in mezzo. Passare sui camminatoi è una manovra “Media” di Equilibrismo, la passerella copre una voragine di 15m irta di spuntoni (attacco +45 da Caduta e 1-10 colpi critici “D” da Punta).</text:p>
      <text:p text:style-name="P3">Anche qui, LS può provare a intralciare i PG con illusioni.</text:p>
      <text:p text:style-name="P3"/>
      <text:p text:style-name="P2">La Sala di Hurin:</text:p>
      <text:p text:style-name="P3">Ecco infine la sospirata sala di Hurin: lo scheletro del re si trova qui, con tutte le sue ricchezze. Chi riuscirà ad ottenere il corno?</text:p>
      <text:p text:style-name="P3"/>
      <text:p text:style-name="P3">Oltre al corno, ci sono molte altre cose: circa 5000mo in denaro e gioielli, un'armatura nanica completa (TA20, +15, ingombra come TA 17); il Martello del Mondo Sotterraneo (Adamantio +50, danno triplo, colpi critici da Impatto e Sbilanciamento addizionale) e lo Scudo di Hurin (Scudo a Torre +25, +20 ai TR). Ovviamente sottrarre qualcosa al tesoro di Hurin non è una cosa molto bella e non sarà apprezzata dai nani.</text:p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4">Nome </text:p>
          </table:table-cell>
          <table:table-cell table:style-name="Tabella3.A1" office:value-type="string">
            <text:p text:style-name="P4">Lvl</text:p>
          </table:table-cell>
          <table:table-cell table:style-name="Tabella3.A1" office:value-type="string">
            <text:p text:style-name="P4">Tag </text:p>
          </table:table-cell>
          <table:table-cell table:style-name="Tabella3.A1" office:value-type="string">
            <text:p text:style-name="P5">PF</text:p>
          </table:table-cell>
          <table:table-cell table:style-name="Tabella3.A1" office:value-type="string">
            <text:p text:style-name="P5">TA (BD)</text:p>
          </table:table-cell>
          <table:table-cell table:style-name="Tabella3.A1" office:value-type="string">
            <text:p text:style-name="P4">BO</text:p>
          </table:table-cell>
          <table:table-cell table:style-name="Tabella3.G1" office:value-type="string">
            <text:p text:style-name="P4">Iniz </text:p>
          </table:table-cell>
        </table:table-row>
        <table:table-row>
          <table:table-cell table:style-name="Tabella3.A2" office:value-type="string">
            <text:p text:style-name="P4">Lord Shura Ferito</text:p>
          </table:table-cell>
          <table:table-cell table:style-name="Tabella3.A2" office:value-type="string">
            <text:p text:style-name="P4">20°</text:p>
          </table:table-cell>
          <table:table-cell table:style-name="Tabella3.A2" office:value-type="string">
            <text:p text:style-name="P4">La#</text:p>
          </table:table-cell>
          <table:table-cell table:style-name="Tabella3.A2" office:value-type="string">
            <text:p text:style-name="P5">80</text:p>
          </table:table-cell>
          <table:table-cell table:style-name="Tabella3.A2" office:value-type="string">
            <text:p text:style-name="P5">18(75)</text:p>
          </table:table-cell>
          <table:table-cell table:style-name="Tabella3.A2" office:value-type="string">
            <text:p text:style-name="P4">90Staff/Spells/120FBolt (-20)</text:p>
          </table:table-cell>
          <table:table-cell table:style-name="Tabella3.G2" office:value-type="string">
            <text:p text:style-name="P4">+16</text:p>
          </table:table-cell>
        </table:table-row>
        <table:table-row>
          <table:table-cell table:style-name="Tabella3.A2" office:value-type="string">
            <text:p text:style-name="P4">Guardia Scheletrica</text:p>
          </table:table-cell>
          <table:table-cell table:style-name="Tabella3.A2" office:value-type="string">
            <text:p text:style-name="P4">10°</text:p>
          </table:table-cell>
          <table:table-cell table:style-name="Tabella3.A2" office:value-type="string">
            <text:p text:style-name="P4">La#</text:p>
          </table:table-cell>
          <table:table-cell table:style-name="Tabella3.A2" office:value-type="string">
            <text:p text:style-name="P5">150</text:p>
          </table:table-cell>
          <table:table-cell table:style-name="Tabella3.A2" office:value-type="string">
            <text:p text:style-name="P5">17(50)</text:p>
          </table:table-cell>
          <table:table-cell table:style-name="Tabella3.A2" office:value-type="string">
            <text:p text:style-name="P4">100Thsw[Heat]/Drain (3/rnd)</text:p>
          </table:table-cell>
          <table:table-cell table:style-name="Tabella3.G2" office:value-type="string">
            <text:p text:style-name="P4">+10</text:p>
          </table:table-cell>
        </table:table-row>
        <table:table-row>
          <table:table-cell table:style-name="Tabella3.A2" office:value-type="string">
            <text:p text:style-name="P4">Hothrog (I)</text:p>
          </table:table-cell>
          <table:table-cell table:style-name="Tabella3.A2" office:value-type="string">
            <text:p text:style-name="P4">2°</text:p>
          </table:table-cell>
          <table:table-cell table:style-name="Tabella3.A2" office:value-type="string">
            <text:p text:style-name="P4">I</text:p>
          </table:table-cell>
          <table:table-cell table:style-name="Tabella3.A2" office:value-type="string">
            <text:p text:style-name="P5">60</text:p>
          </table:table-cell>
          <table:table-cell table:style-name="Tabella3.A2" office:value-type="string">
            <text:p text:style-name="P5">11(15)</text:p>
          </table:table-cell>
          <table:table-cell table:style-name="Tabella3.A2" office:value-type="string">
            <text:p text:style-name="P4">50MCl(x2)+100MBi</text:p>
          </table:table-cell>
          <table:table-cell table:style-name="Tabella3.G2" office:value-type="string">
            <text:p text:style-name="P4">+0</text:p>
          </table:table-cell>
        </table:table-row>
      </table:table>
      <text:p text:style-name="Standard"/>
      <text:p text:style-name="P3"><text:span text:style-name="T1">“Inferno”, la Staffa delle Fiamme: </text:span>89 cariche, con una carica lancia Fire Bolt, con 2 cariche lancia Fire Ball e con 3 Fire Storm, colpo critico addizionale da Calore.</text:p>
      <text:p text:style-name="P2">Medaglione del Potere: <text:span text:style-name="T2">moltiplicatore x3 di PM (solo Essenza e Flusso), Extension II una volta al giorno.</text:span></text:p>
      <text:p text:style-name="P2">Anello della Difesa Arcana: <text:span text:style-name="T2">Bladeturn 2 volte al giorno, +10 ai TR contro la magia.</text:span></text:p>
      <text:p text:style-name="P3"/>
      <text:p text:style-name="P6">Liste:</text:p>
      <text:p text:style-name="P6">Necromancy (rnk:20/bns:45)</text:p>
      <text:p text:style-name="P6">Shield Mastery (rnk:15/bns:40)</text:p>
      <text:p text:style-name="P6">Liste Illusionista (rnk 20/bns:45)</text:p>
      <text:p text:style-name="P6">Erosione Fisica (rnk 20/bns:45)</text:p>
      <text:p text:style-name="P6">Evocazione di Entità (rnk20/bns45)</text:p>
      <text:p text:style-name="P6">Contatti Oscuri (rnk20/bns45)</text:p>
      <text:p text:style-name="P6">Oscurità (rnk20/bns45)</text:p>
      <text:p text:style-name="P6">Distruzione Materia (rnk20/bns45)</text:p>
      <text:p text:style-name="P6">Studi di Invisibilità (rnk15/bns45)</text:p>
      <text:p text:style-name="P6">Lofty Bridges (rnk:9/bns34)</text:p>
      <text:p text:style-name="P6"/>
      <text:p text:style-name="P6"/>
      <text:p text:style-name="P7">Ricompensa dei nani:</text:p>
      <text:p text:style-name="P6"/>
      <text:p text:style-name="P6"><text:span text:style-name="T3">Surya:</text:span> Armatura riforgiata in Acciaio Nanico, protegge come TA18 ma ingombra come TA17 e un Arco Lungo Magico +10.</text:p>
      <text:p text:style-name="P8">Yonker: <text:span text:style-name="T4">Corpetto del Fabbro:</text:span><text:span text:style-name="T5"> un corpetto nero (con due martelli disegnati in oro sul petto) di cuoio rigido (TA9) +5, protegge dal calore della forgia (Heatarmor costante: +20 BD e TR contro il Calore), +10 a Conoscenza Metalli e a Lavorare Metalli.</text:span></text:p>
      <text:p text:style-name="P8">Isidoro:<text:span text:style-name="T5"> 1 dose di Aljira e un </text:span><text:span text:style-name="T4">Amuleto degli Antichi</text:span></text:p>
      <text:p text:style-name="P8">Han:<text:span text:style-name="T5"> </text:span><text:span text:style-name="T4">Bracciale della Possanza:</text:span><text:span text:style-name="T5"> in genere usato da alcuni sacerdoti nanici, un bracciale d'oro a forma di serpente che si morde la coda. +2 al bonus di Co; 1 volta al giorno permette di colpire a mani nude sulla tabella della Mazza.</text:span></text:p>
      <text:p text:style-name="P9">E un Arco Corto Magico +10.</text:p>
      <text:p text:style-name="P8">Baudolino:<text:span text:style-name="T5"> Cotta di Maglia Nanica (TA 16, ingombra come TA13) e 5 Frecce Sanguinarie.</text:span></text:p>
      <text:p text:style-name="P9"/>
      <text:p text:style-name="P9"/>
      <text:p text:style-name="P9"/>
      <text:p text:style-name="P8"><text:span text:style-name="T4">Amuleto degli Antichi: </text:span><text:span text:style-name="T5">misterioso manufatto probabilmente risalente agli Adepti, a forma di ottaedro, in un metallo simile al platino (una manovra “Folle” di Conoscenza Metalli rivela che si tratta di Numidium, una rarissima lega composta di Mithril, Adamantio e alcuni metalli extraplanari). Quando è inattivo emana una tenue aurea Arcana, se attivato l'aura diventa molto forte.</text:span></text:p>
      <text:p text:style-name="P9"><text:span text:style-name="T2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02T18:32:27</meta:creation-date>
    <dc:creator>max</dc:creator>
    <dc:date>2007-05-04T15:02:37</dc:date>
    <dc:language>en-US</dc:language>
    <meta:editing-cycles>13</meta:editing-cycles>
    <meta:editing-duration>PT1H46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8" meta:word-count="759" meta:character-count="4372"/>
  </office:meta>
</office:document-meta>
</file>