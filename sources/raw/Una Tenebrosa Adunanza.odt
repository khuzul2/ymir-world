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Wingdings 2" svg:font-family="'Wingdings 2'" style:font-charset="x-symbol"/>
    <style:font-face style:name="StarSymbol" svg:font-family="StarSymbol"/>
    <style:font-face style:name="StarSymbol1" svg:font-family="StarSymbol, 'Arial Unicode MS'"/>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5" style:family="table">
      <style:table-properties style:width="17.431cm" table:align="margins" style:writing-mode="lr-tb"/>
    </style:style>
    <style:style style:name="Tabella5.A" style:family="table-column">
      <style:table-column-properties style:column-width="3.875cm" style:rel-column-width="14569*"/>
    </style:style>
    <style:style style:name="Tabella5.B" style:family="table-column">
      <style:table-column-properties style:column-width="1.05cm" style:rel-column-width="3945*"/>
    </style:style>
    <style:style style:name="Tabella5.C" style:family="table-column">
      <style:table-column-properties style:column-width="1.199cm" style:rel-column-width="4509*"/>
    </style:style>
    <style:style style:name="Tabella5.D" style:family="table-column">
      <style:table-column-properties style:column-width="1cm" style:rel-column-width="3760*"/>
    </style:style>
    <style:style style:name="Tabella5.E" style:family="table-column">
      <style:table-column-properties style:column-width="2.501cm" style:rel-column-width="9403*"/>
    </style:style>
    <style:style style:name="Tabella5.F" style:family="table-column">
      <style:table-column-properties style:column-width="6.5cm" style:rel-column-width="24438*"/>
    </style:style>
    <style:style style:name="Tabella5.G" style:family="table-column">
      <style:table-column-properties style:column-width="1.307cm" style:rel-column-width="4911*"/>
    </style:style>
    <style:style style:name="Tabella5.1" style:family="table-row">
      <style:table-row-properties style:keep-together="true"/>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G1" style:family="table-cell">
      <style:table-cell-properties style:vertical-align="top" fo:padding-left="0.123cm" fo:padding-right="0.123cm" fo:padding-top="0cm" fo:padding-bottom="0cm" fo:border="0.018cm solid #000000"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 style:family="table">
      <style:table-properties style:width="16.999cm" table:align="margins" style:writing-mode="lr-tb"/>
    </style:style>
    <style:style style:name="Tabella1.A" style:family="table-column">
      <style:table-column-properties style:column-width="3.778cm" style:rel-column-width="14569*"/>
    </style:style>
    <style:style style:name="Tabella1.B" style:family="table-column">
      <style:table-column-properties style:column-width="1.023cm" style:rel-column-width="3945*"/>
    </style:style>
    <style:style style:name="Tabella1.C" style:family="table-column">
      <style:table-column-properties style:column-width="1.169cm" style:rel-column-width="4509*"/>
    </style:style>
    <style:style style:name="Tabella1.D" style:family="table-column">
      <style:table-column-properties style:column-width="0.975cm" style:rel-column-width="3760*"/>
    </style:style>
    <style:style style:name="Tabella1.E" style:family="table-column">
      <style:table-column-properties style:column-width="2.439cm" style:rel-column-width="9403*"/>
    </style:style>
    <style:style style:name="Tabella1.F" style:family="table-column">
      <style:table-column-properties style:column-width="6.339cm" style:rel-column-width="24438*"/>
    </style:style>
    <style:style style:name="Tabella1.G" style:family="table-column">
      <style:table-column-properties style:column-width="1.274cm" style:rel-column-width="4911*"/>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language="it" fo:country="IT" fo:font-weight="normal" style:font-weight-asian="normal" style:font-weight-complex="normal"/>
    </style:style>
    <style:style style:name="P4" style:family="paragraph" style:parent-style-name="Standard">
      <style:paragraph-properties fo:text-align="justify" style:justify-single-word="false"/>
      <style:text-properties style:use-window-font-color="true" fo:font-size="12pt" fo:language="it" fo:country="IT" style:font-name-asian="MS Mincho" style:font-size-asian="12pt" style:language-asian="ja" style:country-asian="JP" style:font-name-complex="Times New Roman" style:font-size-complex="12pt" style:language-complex="ar" style:country-complex="SA"/>
    </style:style>
    <style:style style:name="P5" style:family="paragraph" style:parent-style-name="Standard">
      <style:paragraph-properties fo:text-align="center" style:justify-single-word="false" fo:break-before="page"/>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font-weight-complex="bold"/>
    </style:style>
    <style:style style:name="P6"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7" style:family="paragraph" style:parent-style-name="Standard">
      <style:paragraph-properties fo:text-align="center" style:justify-single-word="false" style:snap-to-layout-grid="false"/>
      <style:text-properties style:use-window-font-color="true" style:font-name="Garamond" fo:font-size="10pt" fo:language="en" fo:country="GB" style:font-name-asian="MS Mincho" style:font-size-asian="10pt" style:language-asian="ja" style:country-asian="JP" style:font-name-complex="Times New Roman" style:font-size-complex="10pt" style:language-complex="ar" style:country-complex="SA"/>
    </style:style>
    <style:style style:name="P8" style:family="paragraph" style:parent-style-name="Standard">
      <style:paragraph-properties fo:text-align="center" style:justify-single-word="false" style:snap-to-layout-grid="false"/>
      <style:text-properties style:font-name="Garamond" fo:font-size="10pt" style:font-size-asian="10pt" style:font-size-complex="10pt"/>
    </style:style>
    <style:style style:name="P9" style:family="paragraph" style:parent-style-name="Standard">
      <style:paragraph-properties fo:text-align="center" style:justify-single-word="false" style:snap-to-layout-grid="false"/>
      <style:text-properties style:font-name="Garamond" fo:font-size="10pt" fo:language="fr" fo:country="FR" style:font-size-asian="10pt" style:font-size-complex="10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use-window-font-color="true" fo:font-size="12pt" fo:language="it" fo:country="IT" fo:font-style="italic" style:font-name-asian="MS Mincho" style:font-size-asian="12pt" style:language-asian="ja" style:country-asian="JP" style:font-style-asian="italic" style:font-name-complex="Times New Roman" style:font-size-complex="12pt" style:language-complex="ar" style:country-complex="SA" style:font-style-complex="italic"/>
    </style:style>
    <style:style style:name="P12" style:family="paragraph" style:parent-style-name="Standard">
      <style:paragraph-properties fo:text-align="justify" style:justify-single-word="false"/>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13" style:family="paragraph" style:parent-style-name="Standard" style:list-style-name="WW8Num1">
      <style:paragraph-properties fo:text-align="justify" style:justify-single-word="false">
        <style:tab-stops>
          <style:tab-stop style:position="1.879cm"/>
        </style:tab-stops>
      </style:paragraph-properties>
      <style:text-properties style:use-window-font-color="true" fo:font-size="12pt" fo:language="it" fo:country="IT" style:font-name-asian="MS Mincho" style:font-size-asian="12pt" style:language-asian="ja" style:country-asian="JP" style:font-name-complex="Times New Roman" style:font-size-complex="12pt" style:language-complex="ar" style:country-complex="SA"/>
    </style:style>
    <style:style style:name="P14" style:family="paragraph" style:parent-style-name="Standard" style:list-style-name="WW8Num1">
      <style:paragraph-properties fo:text-align="justify" style:justify-single-word="false">
        <style:tab-stops>
          <style:tab-stop style:position="1.879cm"/>
        </style:tab-stops>
      </style:paragraph-properties>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15" style:family="paragraph" style:parent-style-name="Standard">
      <style:paragraph-properties fo:text-align="justify" style:justify-single-word="false">
        <style:tab-stops>
          <style:tab-stop style:position="1.879cm"/>
        </style:tab-stops>
      </style:paragraph-properties>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16" style:family="paragraph" style:parent-style-name="Standard">
      <style:paragraph-properties fo:text-align="justify" style:justify-single-word="false"/>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style>
    <style:style style:name="P17"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style:use-window-font-color="true" fo:font-size="12pt" fo:language="it" fo:country="IT" fo:font-style="italic" fo:font-weight="normal" style:font-name-asian="MS Mincho" style:font-size-asian="12pt" style:language-asian="ja" style:country-asian="JP" style:font-style-asian="italic" style:font-weight-asian="normal" style:font-name-complex="Times New Roman" style:font-size-complex="12pt" style:language-complex="ar" style:country-complex="SA" style:font-style-complex="italic" style:font-weight-complex="normal"/>
    </style:style>
    <style:style style:name="P19" style:family="paragraph" style:parent-style-name="Standard" style:list-style-name="L1">
      <style:paragraph-properties fo:text-align="justify" style:justify-single-word="false"/>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20" style:family="paragraph" style:parent-style-name="Standard" style:list-style-name="L1">
      <style:paragraph-properties fo:text-align="justify" style:justify-single-word="false" style:writing-mode="lr-tb"/>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21" style:family="paragraph" style:parent-style-name="Standard">
      <style:paragraph-properties fo:margin-left="1.217cm" fo:margin-right="0cm" fo:text-align="justify" style:justify-single-word="false" fo:text-indent="0cm" style:auto-text-indent="false">
        <style:tab-stops>
          <style:tab-stop style:position="1.879cm"/>
        </style:tab-stops>
      </style:paragraph-properties>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22" style:family="paragraph" style:parent-style-name="Standard">
      <style:paragraph-properties fo:text-align="center" style:justify-single-word="false" fo:break-before="page">
        <style:tab-stops>
          <style:tab-stop style:position="1.879cm"/>
        </style:tab-stops>
      </style:paragraph-properties>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font-weight-complex="bold"/>
    </style:style>
    <style:style style:name="P23" style:family="paragraph" style:parent-style-name="Standard">
      <style:paragraph-properties fo:text-align="justify" style:justify-single-word="false">
        <style:tab-stops>
          <style:tab-stop style:position="1.879cm"/>
        </style:tab-stops>
      </style:paragraph-properties>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font-weight-complex="bold"/>
    </style:style>
    <style:style style:name="P24" style:family="paragraph" style:parent-style-name="Standard" style:list-style-name="WW8Num3">
      <style:paragraph-properties fo:text-align="justify" style:justify-single-word="false">
        <style:tab-stops>
          <style:tab-stop style:position="1.27cm"/>
        </style:tab-stops>
      </style:paragraph-properties>
      <style:text-properties style:use-window-font-color="true" fo:font-size="12pt" fo:language="it" fo:country="IT" style:font-name-asian="MS Mincho" style:font-size-asian="12pt" style:language-asian="ja" style:country-asian="JP" style:font-name-complex="Times New Roman" style:font-size-complex="12pt" style:language-complex="ar" style:country-complex="SA"/>
    </style:style>
    <style:style style:name="T1" style:family="text">
      <style:text-properties style:use-window-font-color="true" fo:font-size="12pt" fo:language="it" fo:country="IT" style:font-name-asian="MS Mincho" style:font-size-asian="12pt" style:language-asian="ja" style:country-asian="JP" style:font-name-complex="Times New Roman" style:font-size-complex="12pt" style:language-complex="ar" style:country-complex="SA"/>
    </style:style>
    <style:style style:name="T2" style:family="text">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style>
    <style:style style:name="T3" style:family="text">
      <style:text-properties fo:font-weight="bold" style:font-weight-asian="bold"/>
    </style:style>
    <style:style style:name="T4" style:family="text">
      <style:text-properties fo:font-weight="normal" style:font-weight-asian="normal" style:font-weight-complex="normal"/>
    </style:style>
    <style:style style:name="T5" style:family="text">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T6" style:family="text">
      <style:text-properties fo:font-weight="bold" style:font-weight-asian="bold" style:font-weight-complex="bold"/>
    </style:style>
    <style:style style:name="T7" style:family="text">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font-weight-complex="bold"/>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A TENEBROSA ADUNANZA</text:p>
      <text:p text:style-name="P1"/>
      <text:p text:style-name="P1"/>
      <text:p text:style-name="P2">QUERCETO</text:p>
      <text:p text:style-name="P3">Querceto è un piccolo villaggio, che deve il suo nome al boschetto di querce che lo circonda. Le case hanno un aspetto antico e l'abitato è circondato da un alto muro di cinta in pietra, pare che l'avanzare della tecnica non sia arrivato in quest'angolo dei Regni Giovani. Un poco sopraelevato rispetto al paese, sempre entro la cinta delle mura, c'è un piccolo castello decrepito dall'aspetto gotico, probabilmente un tempo è stata la residenza estiva di qualche nobile.</text:p>
      <text:p text:style-name="P4"/>
      <text:p text:style-name="P4">&gt; PG arrivano, vengono inviati al castello, dove li accoglie Keveth (trattato come un servitore)</text:p>
      <text:p text:style-name="P4">&gt; Incontrano Galamorn, che li crede adepti di Abigor e rivela loro parte del piano</text:p>
      <text:p text:style-name="P4">&gt; (Keveth chiede aiuto)</text:p>
      <text:p text:style-name="P4">&gt; La sera arriva una carrozza (con Natalya) ma non fanno in tempo a vedere chi è perché sono convocati da Markus</text:p>
      <text:p text:style-name="P4">&gt; Riunione finale con tutti, PG sgamati, battaglia.</text:p>
      <text:p text:style-name="P5">CATTIVI</text:p>
      <text:p text:style-name="P4"/>
      <text:p text:style-name="P4"><draw:frame draw:style-name="fr1" draw:name="Cornice2" text:anchor-type="char" svg:x="-0.132cm" svg:y="0.09cm" svg:width="17.431cm" draw:z-index="0"><draw:text-box fo:min-height="0.041cm"><table:table table:name="Tabella5" table:style-name="Tabella5"><table:table-column table:style-name="Tabella5.A"/><table:table-column table:style-name="Tabella5.B"/><table:table-column table:style-name="Tabella5.C"/><table:table-column table:style-name="Tabella5.D"/><table:table-column table:style-name="Tabella5.E"/><table:table-column table:style-name="Tabella5.F"/><table:table-column table:style-name="Tabella5.G"/><table:table-row table:style-name="Tabella5.1"><table:table-cell table:style-name="Tabella5.A1" office:value-type="string"><text:p text:style-name="P6">Nome </text:p></table:table-cell><table:table-cell table:style-name="Tabella5.A1" office:value-type="string"><text:p text:style-name="P6">Lvl</text:p></table:table-cell><table:table-cell table:style-name="Tabella5.A1" office:value-type="string"><text:p text:style-name="P6">Tag </text:p></table:table-cell><table:table-cell table:style-name="Tabella5.A1" office:value-type="string"><text:p text:style-name="P6">PF</text:p></table:table-cell><table:table-cell table:style-name="Tabella5.A1" office:value-type="string"><text:p text:style-name="P6">TA (BD)</text:p></table:table-cell><table:table-cell table:style-name="Tabella5.A1" office:value-type="string"><text:p text:style-name="P6">BO</text:p></table:table-cell><table:table-cell table:style-name="Tabella5.G1" office:value-type="string"><text:p text:style-name="P6">Iniz </text:p></table:table-cell></table:table-row><table:table-row table:style-name="Tabella5.1"><table:table-cell table:style-name="Tabella5.A2" office:value-type="string"><text:p text:style-name="P6">Galamorn</text:p></table:table-cell><table:table-cell table:style-name="Tabella5.A2" office:value-type="string"><text:p text:style-name="P6">10°</text:p></table:table-cell><table:table-cell table:style-name="Tabella5.A2" office:value-type="string"><text:p text:style-name="P6">M</text:p></table:table-cell><table:table-cell table:style-name="Tabella5.A2" office:value-type="string"><text:p text:style-name="P6">120</text:p></table:table-cell><table:table-cell table:style-name="Tabella5.A2" office:value-type="string"><text:p text:style-name="P6">17(20)</text:p></table:table-cell><table:table-cell table:style-name="Tabella5.A2" office:value-type="string"><text:p text:style-name="P6">120ms/Spells</text:p></table:table-cell><table:table-cell table:style-name="Tabella5.G2" office:value-type="string"><text:p text:style-name="P6">+10</text:p></table:table-cell></table:table-row><table:table-row table:style-name="Tabella5.1"><table:table-cell table:style-name="Tabella5.A2" office:value-type="string"><text:p text:style-name="P6">Leonard (V)</text:p></table:table-cell><table:table-cell table:style-name="Tabella5.A2" office:value-type="string"><text:p text:style-name="P6">15°</text:p></table:table-cell><table:table-cell table:style-name="Tabella5.A2" office:value-type="string"><text:p text:style-name="P6">La#</text:p></table:table-cell><table:table-cell table:style-name="Tabella5.A2" office:value-type="string"><text:p text:style-name="P6">120</text:p></table:table-cell><table:table-cell table:style-name="Tabella5.A2" office:value-type="string"><text:p text:style-name="P6">2(90)</text:p></table:table-cell><table:table-cell table:style-name="Tabella5.A2" office:value-type="string"><text:p text:style-name="P7">130Sw[Cold]/90MBi+special/Spells</text:p></table:table-cell><table:table-cell table:style-name="Tabella5.G2" office:value-type="string"><text:p text:style-name="P6">+12</text:p></table:table-cell></table:table-row><table:table-row table:style-name="Tabella5.1"><table:table-cell table:style-name="Tabella5.A2" office:value-type="string"><text:p text:style-name="P6">Marcus (IV)</text:p></table:table-cell><table:table-cell table:style-name="Tabella5.A2" office:value-type="string"><text:p text:style-name="P6">10°</text:p></table:table-cell><table:table-cell table:style-name="Tabella5.A2" office:value-type="string"><text:p text:style-name="P6">II#</text:p></table:table-cell><table:table-cell table:style-name="Tabella5.A2" office:value-type="string"><text:p text:style-name="P6">110</text:p></table:table-cell><table:table-cell table:style-name="Tabella5.A2" office:value-type="string"><text:p text:style-name="P6">17(55)</text:p></table:table-cell><table:table-cell table:style-name="Tabella5.A2" office:value-type="string"><text:p text:style-name="P7">90Sw[Cold]/70Mbi+special/Spells</text:p></table:table-cell><table:table-cell table:style-name="Tabella5.G2" office:value-type="string"><text:p text:style-name="P6">+12</text:p></table:table-cell></table:table-row><table:table-row table:style-name="Tabella5.1"><table:table-cell table:style-name="Tabella5.A2" office:value-type="string"><text:p text:style-name="P6">Natalya</text:p></table:table-cell><table:table-cell table:style-name="Tabella5.A2" office:value-type="string"><text:p text:style-name="P6">15°</text:p></table:table-cell><table:table-cell table:style-name="Tabella5.A2" office:value-type="string"><text:p text:style-name="P6">M</text:p></table:table-cell><table:table-cell table:style-name="Tabella5.A2" office:value-type="string"><text:p text:style-name="P6">80</text:p></table:table-cell><table:table-cell table:style-name="Tabella5.A2" office:value-type="string"><text:p text:style-name="P6">2(20)</text:p></table:table-cell><table:table-cell table:style-name="Tabella5.A2" office:value-type="string"><text:p text:style-name="P7">120CBolt/110IBolt</text:p></table:table-cell><table:table-cell table:style-name="Tabella5.G2" office:value-type="string"><text:p text:style-name="P6">+10</text:p></table:table-cell></table:table-row><table:table-row table:style-name="Tabella5.1"><table:table-cell table:style-name="Tabella5.A2" office:value-type="string"><text:p text:style-name="P6">Segugio Gelido</text:p></table:table-cell><table:table-cell table:style-name="Tabella5.A2" office:value-type="string"><text:p text:style-name="P6">6°</text:p></table:table-cell><table:table-cell table:style-name="Tabella5.A2" office:value-type="string"><text:p text:style-name="P6">M</text:p></table:table-cell><table:table-cell table:style-name="Tabella5.A2" office:value-type="string"><text:p text:style-name="P6">90</text:p></table:table-cell><table:table-cell table:style-name="Tabella5.A2" office:value-type="string"><text:p text:style-name="P6">4(30)</text:p></table:table-cell><table:table-cell table:style-name="Tabella5.A2" office:value-type="string"><text:p text:style-name="P7">70MBi/50IBreath</text:p></table:table-cell><table:table-cell table:style-name="Tabella5.G2" office:value-type="string"><text:p text:style-name="P6">+8</text:p></table:table-cell></table:table-row><table:table-row table:style-name="Tabella5.1"><table:table-cell table:style-name="Tabella5.A2" office:value-type="string"><text:p text:style-name="P6">Cultista</text:p></table:table-cell><table:table-cell table:style-name="Tabella5.A2" office:value-type="string"><text:p text:style-name="P8">4°</text:p></table:table-cell><table:table-cell table:style-name="Tabella5.A2" office:value-type="string"><text:p text:style-name="P8">M</text:p></table:table-cell><table:table-cell table:style-name="Tabella5.A2" office:value-type="string"><text:p text:style-name="P9">70</text:p></table:table-cell><table:table-cell table:style-name="Tabella5.A2" office:value-type="string"><text:p text:style-name="P9">9(20)</text:p></table:table-cell><table:table-cell table:style-name="Tabella5.A2" office:value-type="string"><text:p text:style-name="P8">80Sword/80Dart</text:p></table:table-cell><table:table-cell table:style-name="Tabella5.G2" office:value-type="string"><text:p text:style-name="P8">+8</text:p></table:table-cell></table:table-row></table:table></draw:text-box></draw:frame></text:p>
      <text:p text:style-name="P10"><text:span text:style-name="T1">Nota: Il morso di un vampiro non causa alcun critico ma paralizza (chi fallisce un TR </text:span><text:span text:style-name="T2">Essenza</text:span><text:span text:style-name="T1">) e causa la perdita di 11-20pf e di 1-3 punti Co.</text:span></text:p>
      <text:p text:style-name="P4">Tutti i Vampiri hanno un bonus di +100 a Muoversi Silenziosamente.</text:p>
      <text:p text:style-name="P4">I Vampiri sono vulnerabili solo alle armi magiche, ai colpi critici da Impalamento alle magie di Forza o Elementali (Acqua e Elettricità)</text:p>
      <text:p text:style-name="P4"/>
      <text:p text:style-name="P11"><text:span text:style-name="T3"><text:s/>&gt; Galamorn </text:span><text:span text:style-name="T4">(Paladino di Abigor livello 10°)</text:span></text:p>
      <text:p text:style-name="P12"/>
      <text:p text:style-name="P12">Liste: </text:p>
      <text:list text:style-name="WW8Num1">
        <text:list-item>
          <text:p text:style-name="P13">Holy Arms (rnk:10, bns: 30)</text:p>
        </text:list-item>
        <text:list-item>
          <text:p text:style-name="P14">Holy Shields (rnk:10, bns: 30)</text:p>
        </text:list-item>
        <text:list-item>
          <text:p text:style-name="P14">Inspiring Ways (rnk: 5, bns: 30)</text:p>
        </text:list-item>
        <text:list-item>
          <text:p text:style-name="P14">Wounding (rnk:10, bns: 30)</text:p>
        </text:list-item>
      </text:list>
      <text:p text:style-name="P15"/>
      <text:p text:style-name="P12">Oggetti: Morning Star magico +15</text:p>
      <text:p text:style-name="P16"/>
      <text:p text:style-name="P17"><text:span text:style-name="T1">&gt; Marcus </text:span><text:span text:style-name="T5">(Vampiro Inferiore livello 10°)</text:span></text:p>
      <text:p text:style-name="P18"/>
      <text:list text:style-name="L1">
        <text:list-header>
          <text:p text:style-name="P19">PP:100</text:p>
          <text:p text:style-name="P20">Liste: </text:p>
        </text:list-header>
      </text:list>
      <text:list text:style-name="WW8Num1">
        <text:list-item text:start-value="1">
          <text:p text:style-name="P14">Tutte quelle del Mentalismo Malvagio (rnk:10; bns:30)</text:p>
        </text:list-item>
      </text:list>
      <text:p text:style-name="P16"/>
      <text:p text:style-name="P11"><text:span text:style-name="T3">&gt; Leonard Rinato </text:span>(Vampiro livello 15°)</text:p>
      <text:p text:style-name="P4"/>
      <text:p text:style-name="P4">Dopo esser stato sconfitto e distrutto dai PG, Leonard è stato riportato allo stato di non-vita usando la Macchina della Resurrezione.</text:p>
      <text:p text:style-name="P4"/>
      <text:p text:style-name="P4">PP: 150</text:p>
      <text:p text:style-name="P10"><text:span text:style-name="T5">Liste:</text:span><text:span text:style-name="T1"> Tutte quelle del Mentalismo Malvagio (rnk:15; bns:35)</text:span></text:p>
      <text:list text:style-name="WW8Num1">
        <text:list-item text:start-value="1">
          <text:p text:style-name="P13">Darkness (rnk: 10; bns:20)</text:p>
        </text:list-item>
        <text:list-item>
          <text:p text:style-name="P13">Lofty Bridge (rnk:10; bns:20)</text:p>
        </text:list-item>
      </text:list>
      <text:p text:style-name="P4"/>
      <text:p text:style-name="P4"><text:span text:style-name="T6">&gt; Natalya Vararthim</text:span> (Elementalista Ghiaccio 15°)</text:p>
      <text:p text:style-name="P12"/>
      <text:p text:style-name="P21">Liste:</text:p>
      <text:list text:style-name="WW8Num1">
        <text:list-item text:start-value="1">
          <text:p text:style-name="P13">Elementalista Gelo (rnk: 20; bns:42)</text:p>
        </text:list-item>
        <text:list-item>
          <text:p text:style-name="P13">Lofty Bridge (rnk: 16; bns: 38)</text:p>
        </text:list-item>
        <text:list-item>
          <text:p text:style-name="P13">Shield Mastery (rnk: 15; bns: 39)</text:p>
        </text:list-item>
        <text:list-item>
          <text:p text:style-name="P13">Spirit Mastery (rnk: 20; bns: 42)</text:p>
        </text:list-item>
        <text:list-item>
          <text:p text:style-name="P13">Dispelling Ways (rnk: 15, bns: 39)</text:p>
        </text:list-item>
      </text:list>
      <text:p text:style-name="P21"/>
      <text:p text:style-name="P22">BUONI</text:p>
      <text:p text:style-name="P15"/>
      <text:p text:style-name="P15"/>
      <text:p text:style-name="P4"/>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6">Nome </text:p>
          </table:table-cell>
          <table:table-cell table:style-name="Tabella1.A1" office:value-type="string">
            <text:p text:style-name="P6">Lvl</text:p>
          </table:table-cell>
          <table:table-cell table:style-name="Tabella1.A1" office:value-type="string">
            <text:p text:style-name="P6">Tag </text:p>
          </table:table-cell>
          <table:table-cell table:style-name="Tabella1.A1" office:value-type="string">
            <text:p text:style-name="P6">PF</text:p>
          </table:table-cell>
          <table:table-cell table:style-name="Tabella1.A1" office:value-type="string">
            <text:p text:style-name="P6">TA (BD)</text:p>
          </table:table-cell>
          <table:table-cell table:style-name="Tabella1.A1" office:value-type="string">
            <text:p text:style-name="P6">BO</text:p>
          </table:table-cell>
          <table:table-cell table:style-name="Tabella1.G1" office:value-type="string">
            <text:p text:style-name="P6">Iniz </text:p>
          </table:table-cell>
        </table:table-row>
        <table:table-row>
          <table:table-cell table:style-name="Tabella1.A2" office:value-type="string">
            <text:p text:style-name="P6">Raghind</text:p>
          </table:table-cell>
          <table:table-cell table:style-name="Tabella1.A2" office:value-type="string">
            <text:p text:style-name="P6">4°</text:p>
          </table:table-cell>
          <table:table-cell table:style-name="Tabella1.A2" office:value-type="string">
            <text:p text:style-name="P6">M</text:p>
          </table:table-cell>
          <table:table-cell table:style-name="Tabella1.A2" office:value-type="string">
            <text:p text:style-name="P6">90</text:p>
          </table:table-cell>
          <table:table-cell table:style-name="Tabella1.A2" office:value-type="string">
            <text:p text:style-name="P6">10(15)</text:p>
          </table:table-cell>
          <table:table-cell table:style-name="Tabella1.A2" office:value-type="string">
            <text:p text:style-name="P6">85SSw/Spells</text:p>
          </table:table-cell>
          <table:table-cell table:style-name="Tabella1.G2" office:value-type="string">
            <text:p text:style-name="P6">+8</text:p>
          </table:table-cell>
        </table:table-row>
        <table:table-row>
          <table:table-cell table:style-name="Tabella1.A2" office:value-type="string">
            <text:p text:style-name="P6">Keveth</text:p>
          </table:table-cell>
          <table:table-cell table:style-name="Tabella1.A2" office:value-type="string">
            <text:p text:style-name="P6">7°</text:p>
          </table:table-cell>
          <table:table-cell table:style-name="Tabella1.A2" office:value-type="string">
            <text:p text:style-name="P6">M</text:p>
          </table:table-cell>
          <table:table-cell table:style-name="Tabella1.A2" office:value-type="string">
            <text:p text:style-name="P6">110</text:p>
          </table:table-cell>
          <table:table-cell table:style-name="Tabella1.A2" office:value-type="string">
            <text:p text:style-name="P6">13(30)</text:p>
          </table:table-cell>
          <table:table-cell table:style-name="Tabella1.A2" office:value-type="string">
            <text:p text:style-name="P6">110Sw/110DtGun</text:p>
          </table:table-cell>
          <table:table-cell table:style-name="Tabella1.G2" office:value-type="string">
            <text:p text:style-name="P6">+12</text:p>
          </table:table-cell>
        </table:table-row>
        <table:table-row>
          <table:table-cell table:style-name="Tabella1.A2" office:value-type="string">
            <text:p text:style-name="P6">Valentine</text:p>
          </table:table-cell>
          <table:table-cell table:style-name="Tabella1.A2" office:value-type="string">
            <text:p text:style-name="P6">10°</text:p>
          </table:table-cell>
          <table:table-cell table:style-name="Tabella1.A2" office:value-type="string">
            <text:p text:style-name="P6">M</text:p>
          </table:table-cell>
          <table:table-cell table:style-name="Tabella1.A2" office:value-type="string">
            <text:p text:style-name="P6">110</text:p>
          </table:table-cell>
          <table:table-cell table:style-name="Tabella1.A2" office:value-type="string">
            <text:p text:style-name="P6">10(30)</text:p>
          </table:table-cell>
          <table:table-cell table:style-name="Tabella1.A2" office:value-type="string">
            <text:p text:style-name="P6">105whip</text:p>
          </table:table-cell>
          <table:table-cell table:style-name="Tabella1.G2" office:value-type="string">
            <text:p text:style-name="P6">+10</text:p>
          </table:table-cell>
        </table:table-row>
      </table:table>
      <text:p text:style-name="P15"/>
      <text:p text:style-name="P15"/>
      <text:p text:style-name="P23">Raghnid<text:span text:style-name="T4"> (Nana Vendicatrice Adamantina livello 4°)</text:span></text:p>
      <text:p text:style-name="P15"/>
      <text:p text:style-name="P15">Liste: Paladino Livello 4° (Tutte)</text:p>
      <text:p text:style-name="P15">Oggetti: Spada Magica +15</text:p>
      <text:p text:style-name="P15"/>
      <text:p text:style-name="P23">Keveth <text:span text:style-name="T4">(Bandito Umano livello 7°)</text:span></text:p>
      <text:p text:style-name="P15"/>
      <text:p text:style-name="P15">Oggetti: Spada Magica +10</text:p>
      <text:p text:style-name="P15"/>
      <text:p text:style-name="P15"><text:span text:style-name="T6">Valentine</text:span>, Segretaria di Belengard (Campione Elementale Gelo livello 10°)</text:p>
      <text:p text:style-name="P15"/>
      <text:list text:style-name="WW8Num3">
        <text:list-item>
          <text:p text:style-name="P24">Frusta Magica +10, 10% di trattare tutte le TA come TA1</text:p>
        </text:list-item>
        <text:list-item>
          <text:p text:style-name="P24">Armatura di Cuoio, +20 TR e BD contro il Fuoco</text:p>
        </text:list-item>
      </text:list>
      <text:p text:style-name="P4"/>
      <text:p text:style-name="P15">Liste: Combat Links (rnk:10/bns:20); Elemental Armor (rnk10/bns:20); Elemental Companions (rnk12/bns22); Elemental Weapons (rnk11/bns21); Lesser Elemental Changes (rnk11/bns21); Lesser Elemental Protections (rnk7/bns17)</text:p>
      <text:p text:style-name="P15"/>
      <text:p text:style-name="P15">COMPARSE</text:p>
      <text:p text:style-name="P15"/>
      <text:p text:style-name="P10"><text:span text:style-name="T7">Ibarella</text:span><text:span text:style-name="T1">, amica di Isidoro (Umana, Elementalista Fuoco livello 8°)</text:span></text:p>
      <text:p text:style-name="P10"><text:span text:style-name="T7">Corinne</text:span><text:span text:style-name="T1">, amica di Isidoro (Umana, Elementalista Acqua livello 7°)</text:span></text:p>
      <text:p text:style-name="P15"><text:span text:style-name="T6">Hormus</text:span>, amico di Isidoro (Umli, Elementalista Terra livello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Wingdings 2" svg:font-family="'Wingdings 2'" style:font-charset="x-symbol"/>
    <style:font-face style:name="StarSymbol" svg:font-family="StarSymbol"/>
    <style:font-face style:name="StarSymbol1" svg:font-family="StarSymbol, 'Arial Unicode MS'"/>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Times New Roman" style:font-name-asian="MS Mincho" style:font-name-complex="Times New Roman"/>
    </style:style>
    <style:style style:name="WW8Num1z0" style:family="text">
      <style:text-properties style:font-name="Times New Roman" style:font-name-asian="MS Mincho" style:font-name-complex="Times New Roman"/>
    </style:style>
    <style:style style:name="WW8Num3z0" style:family="text">
      <style:text-properties style:font-name="Wingdings"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space-before="1.244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244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7-01T14:50:26</meta:creation-date>
    <dc:creator>x</dc:creator>
    <dc:date>2007-07-06T15:17:07</dc:date>
    <dc:language>en-US</dc:language>
    <meta:editing-cycles>29</meta:editing-cycles>
    <meta:editing-duration>PT1H51M43S</meta:editing-duration>
    <meta:user-defined meta:name="Info 1"/>
    <meta:user-defined meta:name="Info 2"/>
    <meta:user-defined meta:name="Info 3"/>
    <meta:user-defined meta:name="Info 4"/>
    <meta:document-statistic meta:table-count="2" meta:image-count="0" meta:object-count="0" meta:page-count="3" meta:paragraph-count="127" meta:word-count="561" meta:character-count="3227"/>
  </office:meta>
</office:document-meta>
</file>