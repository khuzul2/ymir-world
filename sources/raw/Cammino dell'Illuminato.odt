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MS Mincho" svg:font-family="'MS Mincho', 'ＭＳ 明朝'" style:font-family-generic="modern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4" style:family="table">
      <style:table-properties style:width="16.999cm" table:align="margins" style:writing-mode="lr-tb"/>
    </style:style>
    <style:style style:name="Tabella4.A" style:family="table-column">
      <style:table-column-properties style:column-width="3.801cm" style:rel-column-width="14658*"/>
    </style:style>
    <style:style style:name="Tabella4.B" style:family="table-column">
      <style:table-column-properties style:column-width="1.03cm" style:rel-column-width="3969*"/>
    </style:style>
    <style:style style:name="Tabella4.C" style:family="table-column">
      <style:table-column-properties style:column-width="1.177cm" style:rel-column-width="4537*"/>
    </style:style>
    <style:style style:name="Tabella4.D" style:family="table-column">
      <style:table-column-properties style:column-width="0.981cm" style:rel-column-width="3783*"/>
    </style:style>
    <style:style style:name="Tabella4.E" style:family="table-column">
      <style:table-column-properties style:column-width="2.454cm" style:rel-column-width="9461*"/>
    </style:style>
    <style:style style:name="Tabella4.F" style:family="table-column">
      <style:table-column-properties style:column-width="6.378cm" style:rel-column-width="24587*"/>
    </style:style>
    <style:style style:name="Tabella4.G" style:family="table-column">
      <style:table-column-properties style:column-width="1.178cm" style:rel-column-width="4540*"/>
    </style:style>
    <style:style style:name="Tabella4.1" style:family="table-row">
      <style:table-row-properties style:keep-together="true"/>
    </style:style>
    <style:style style:name="Tabella4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la4.G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la4.A2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la4.G2" style:family="table-cell">
      <style:table-cell-properties style:vertical-align="top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Tabella1" style:family="table">
      <style:table-properties style:width="16.999cm" table:align="margins" style:writing-mode="lr-tb"/>
    </style:style>
    <style:style style:name="Tabella1.A" style:family="table-column">
      <style:table-column-properties style:column-width="3.801cm" style:rel-column-width="14658*"/>
    </style:style>
    <style:style style:name="Tabella1.B" style:family="table-column">
      <style:table-column-properties style:column-width="1.03cm" style:rel-column-width="3969*"/>
    </style:style>
    <style:style style:name="Tabella1.C" style:family="table-column">
      <style:table-column-properties style:column-width="1.177cm" style:rel-column-width="4537*"/>
    </style:style>
    <style:style style:name="Tabella1.D" style:family="table-column">
      <style:table-column-properties style:column-width="0.981cm" style:rel-column-width="3783*"/>
    </style:style>
    <style:style style:name="Tabella1.E" style:family="table-column">
      <style:table-column-properties style:column-width="2.454cm" style:rel-column-width="9461*"/>
    </style:style>
    <style:style style:name="Tabella1.F" style:family="table-column">
      <style:table-column-properties style:column-width="6.378cm" style:rel-column-width="24587*"/>
    </style:style>
    <style:style style:name="Tabella1.G" style:family="table-column">
      <style:table-column-properties style:column-width="1.178cm" style:rel-column-width="4540*"/>
    </style:style>
    <style:style style:name="Tabella1.1" style:family="table-row">
      <style:table-row-properties style:keep-together="true"/>
    </style:style>
    <style:style style:name="Tabella1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la1.G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la1.A2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la1.G2" style:family="table-cell">
      <style:table-cell-properties style:vertical-align="top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text-align="justify" style:justify-single-word="false"/>
      <style:text-properties fo:font-style="normal" style:font-style-asian="normal" style:font-style-complex="normal"/>
    </style:style>
    <style:style style:name="P4" style:family="paragraph" style:parent-style-name="Standard">
      <style:paragraph-properties fo:text-align="justify" style:justify-single-word="false"/>
      <style:text-properties fo:font-style="italic" style:font-style-asian="italic" style:font-style-complex="italic"/>
    </style:style>
    <style:style style:name="P5" style:family="paragraph" style:parent-style-name="Standard" style:list-style-name="L1">
      <style:paragraph-properties fo:text-align="justify" style:justify-single-word="false"/>
      <style:text-properties fo:font-style="normal" style:font-style-asian="normal" style:font-style-complex="normal"/>
    </style:style>
    <style:style style:name="P6" style:family="paragraph" style:parent-style-name="Standard" style:list-style-name="L1">
      <style:paragraph-properties fo:text-align="center" style:justify-single-word="false"/>
      <style:text-properties fo:font-style="italic" style:font-style-asian="italic" style:font-style-complex="italic"/>
    </style:style>
    <style:style style:name="P7" style:family="paragraph" style:parent-style-name="Standard" style:list-style-name="L1">
      <style:paragraph-properties fo:text-align="center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P8" style:family="paragraph" style:parent-style-name="Standard" style:list-style-name="L1">
      <style:paragraph-properties fo:text-align="center" style:justify-single-word="false"/>
      <style:text-properties fo:font-style="normal" style:font-style-asian="normal" style:font-style-complex="normal"/>
    </style:style>
    <style:style style:name="P9" style:family="paragraph" style:parent-style-name="Standard">
      <style:paragraph-properties fo:text-align="center" style:justify-single-word="false"/>
      <style:text-properties fo:font-style="italic" style:font-style-asian="italic" style:font-style-complex="italic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use-window-font-color="true" style:font-name="Garamond" fo:font-size="10pt" fo:language="it" fo:country="IT" style:font-name-asian="MS Mincho" style:font-size-asian="10pt" style:language-asian="ja" style:country-asian="JP" style:font-name-complex="Times New Roman" style:font-size-complex="10pt" style:language-complex="ar" style:country-complex="SA"/>
    </style:style>
    <style:style style:name="P11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L CAMMINO DELL'ILLUMINATO</text:p>
      <text:p text:style-name="Standard"/>
      <text:p text:style-name="Standard"/>
      <text:p text:style-name="P2">SCRITTE SU UN MURO</text:p>
      <text:p text:style-name="P3">Sul primo muro disponibile i PG (anche quelli che non sanno leggere) vedono questa scritta.</text:p>
      <text:p text:style-name="P4"/>
      <text:p text:style-name="P4">Superate le folli Tenebre dell'Incubo e abbattuto il Dubbio dell'Illusione, non resta che lacerare l'ultimo Velo perché il Cammino dell'Illuminato risplenda. Il Velo è di fronte a voi, chiunque cerchi una strada non troverà altro che una strada.</text:p>
      <text:p text:style-name="P3"/>
      <text:p text:style-name="P3">Per procedere nella loro ricerca devono dissolvere l'Armora illusoria che li circonda, frutto dei loro sogni. Come riuscirci sta a loro ^_^ </text:p>
      <text:p text:style-name="P3"/>
      <text:p text:style-name="P3">Aprire la strada è un <text:span text:style-name="T1">Minor Goal</text:span></text:p>
      <text:p text:style-name="P3"/>
      <text:p text:style-name="P3">IL GIUDICE</text:p>
      <text:p text:style-name="P3">Dissolta l'illusione i PG si trovano su una larga piattaforma, in apparenza sospesa nel vuoto. Al centro dello spiazzo si trova una grande statua: raffigura un uomo seduto su uno scranno, in posa pensosa. Ha una lunga barba ma la sua faccia è stata cancellata. Ai suoi piedi giace una bilancia spezzata. Sulla base della statua si trova un scritta:</text:p>
      <text:p text:style-name="P3"/>
      <text:p text:style-name="P4">Guidati dal Fato e dalla brama di Saggezza in questo luogo sarete giudicati con ingiusto giudizio.</text:p>
      <text:p text:style-name="P4"/>
      <text:p text:style-name="P3">Non c'è nessun Goal in questa scena</text:p>
      <text:p text:style-name="P3"/>
      <text:p text:style-name="P3">L'ASCESA</text:p>
      <text:p text:style-name="P3">Un cammino in salita si presenta davanti ai PG, la strada si snoda verso l'alto, avvolta dalle nubi. A distanza regolare si intravedono delle costruzioni, simili a grandi capitelli. La fine della salita è però occultata alla vista da una coltre di nuvole, a guardare dal basso pare non finire mai.</text:p>
      <text:p text:style-name="P3">Le costruzioni sono 6 santuari: uno per divinità elementale. Seguendo il percorso si arriva a visitarli tutti, ma superato l'ultimo si ritorna al primo, in un circolo senza fine.</text:p>
      <text:p text:style-name="P3"/>
      <text:list text:style-name="L1">
        <text:list-item>
          <text:p text:style-name="P5">Acqua, Hudemia: Quattro colonne di marmo azzurro sorreggono un tetto dello stesso colore. In mezzo si trova un altare, che sorregge un lastra, anch'essa azzurra. Su di essa è scritto</text:p>
          <text:p text:style-name="P6">Sacrificandoci sul nostro stesso altare</text:p>
          <text:p text:style-name="P6">Piegammo le leggi del Cosmo al nostro volere</text:p>
        </text:list-item>
        <text:list-item>
          <text:p text:style-name="P5">Vento, Heis: Simile al primo, ma composto di una pietra argentea. Qui la scritta è</text:p>
          <text:p text:style-name="P6">Con Furia ci avventammo</text:p>
          <text:p text:style-name="P6">Rivendicando come nostro il Fato</text:p>
        </text:list-item>
        <text:list-item>
          <text:p text:style-name="P5">Terra, Therios: Questo è composto di un materiale simile all'Ossidiana.</text:p>
          <text:p text:style-name="P7">La vita stessa asservimmo</text:p>
          <text:p text:style-name="P8"><text:s/><text:span text:style-name="T2">ed essa si inchinò ai nostri piedi</text:span></text:p>
        </text:list-item>
        <text:list-item>
          <text:p text:style-name="P5">Ghiaccio, Varshnak: Questo sembra fatto di marmo bianco.</text:p>
          <text:p text:style-name="P6">Attraverso le mura del Mondo</text:p>
          <text:p text:style-name="P6">il nostro urlo zittì la furia degli elementi</text:p>
        </text:list-item>
        <text:list-item>
          <text:p text:style-name="P5">Luce, Dingir: Questo è d'oro massiccio.</text:p>
          <text:p text:style-name="P6">I Tre Reami assieme al più Antico</text:p>
          <text:p text:style-name="P6">splendono della nostra Saggezza</text:p>
        </text:list-item>
        <text:list-item>
          <text:p text:style-name="P5">Fuoco, Diis: Questo è costruito con una pietra simile al rubino</text:p>
        </text:list-item>
      </text:list>
      <text:p text:style-name="P9">Attingendo al fuoco Astrale</text:p>
      <text:p text:style-name="P9">nella nostra Forgia ricreammo l'Essenza</text:p>
      <text:p text:style-name="P9"/>
      <text:p text:style-name="P3">Girando intorno agli altari si nota che il retro è liscio come uno specchio, un tiro di Osservazione svela un meccanismo che serve a far ruotare gli altari.</text:p>
      <text:p text:style-name="P3">Una delle arcate degli altari mostra un'illusione: un tempio simile, traslucido e cangiante. Tuttavia, uscendo dagli altari l'illusione sparisce.</text:p>
      <text:p text:style-name="P3">Ruotando tutti gli altari verso l'illusione si apre un portale che vi conduce... </text:p>
      <text:p text:style-name="P3"/>
      <text:p text:style-name="P3">Raggiungere il settimo santuario è un altro <text:span text:style-name="T1">Minor Goal</text:span></text:p>
      <text:p text:style-name="P3"/>
      <text:p text:style-name="P3">IL SETTIMO SANTUARIO</text:p>
      <text:p text:style-name="P3">I PG si trovano nuovamente in città, in una larga piazza. Al centro della piazza, proprio davanti a loro, si trova il santuario che hanno visto dagli altri. Oltre il santuario si vede l'accesso a un grande edificio: la Biblioteca...</text:p>
      <text:p text:style-name="P3">Se i PG analizzano il Santuario noteranno che anche questo reca un'incisione</text:p>
      <text:p text:style-name="P9">Spezzammo ogni Legge </text:p>
      <text:p text:style-name="P9">Atteggiandoci a Legislatori</text:p>
      <text:p text:style-name="P9">Liberandoci dai vincoli del Fato</text:p>
      <text:p text:style-name="P9"><text:s/>Incatenammo il mondo a un tristo Destino</text:p>
      <text:p text:style-name="P9">Creammo vuoti simulacri</text:p>
      <text:p text:style-name="P9">Fingendo che fossero vivi</text:p>
      <text:p text:style-name="P9">Sfaldando le mura del Mondo</text:p>
      <text:p text:style-name="P9">Dagli elementi fummo posseduti</text:p>
      <text:p text:style-name="P9">Più antica della nostra follia</text:p>
      <text:p text:style-name="P9">La magia riluce del proprio incanto</text:p>
      <text:p text:style-name="P9">Nella nostra immane Arroganza</text:p>
      <text:p text:style-name="P9">Lordammo la perfezione dell'Essenza</text:p>
      <text:p text:style-name="P3"/>
      <text:p text:style-name="P3">Se procedono verso la biblioteca arriveranno davanti alla sua entrata: qui la statua di un grande angelo, circondato da due enormi leoni alati, pare custodire la porta dell'edificio.</text:p>
      <text:p text:style-name="P3">Una voce possente riecheggerà nelle menti dei PG:</text:p>
      <text:p text:style-name="P3"/>
      <text:p text:style-name="P4">Mortali! Lasciate questo luogo! La Verità non fa per voi! Meglio vivere nelle tenebre dell'ignoranza, che perire nella fiamma di un sapere terribile!</text:p>
      <text:p text:style-name="P3"/>
      <text:p text:style-name="P3">Se non se ne vanno le statue diventano vere, attaccandoli...</text:p>
      <text:p text:style-name="Standard"/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column table:style-name="Tabella4.E"/>
        <table:table-column table:style-name="Tabella4.F"/>
        <table:table-column table:style-name="Tabella4.G"/>
        <table:table-row table:style-name="Tabella4.1">
          <table:table-cell table:style-name="Tabella4.A1" office:value-type="string">
            <text:p text:style-name="P10">Nome</text:p>
          </table:table-cell>
          <table:table-cell table:style-name="Tabella4.A1" office:value-type="string">
            <text:p text:style-name="P10">Lvl</text:p>
          </table:table-cell>
          <table:table-cell table:style-name="Tabella4.A1" office:value-type="string">
            <text:p text:style-name="P10">Tag</text:p>
          </table:table-cell>
          <table:table-cell table:style-name="Tabella4.A1" office:value-type="string">
            <text:p text:style-name="P10">PF</text:p>
          </table:table-cell>
          <table:table-cell table:style-name="Tabella4.A1" office:value-type="string">
            <text:p text:style-name="P10">TA (BD)</text:p>
          </table:table-cell>
          <table:table-cell table:style-name="Tabella4.A1" office:value-type="string">
            <text:p text:style-name="P10">BO</text:p>
          </table:table-cell>
          <table:table-cell table:style-name="Tabella4.G1" office:value-type="string">
            <text:p text:style-name="P10">Iniz</text:p>
          </table:table-cell>
        </table:table-row>
        <table:table-row table:style-name="Tabella4.1">
          <table:table-cell table:style-name="Tabella4.A2" office:value-type="string">
            <text:p text:style-name="P10">Campione Onirico</text:p>
          </table:table-cell>
          <table:table-cell table:style-name="Tabella4.A2" office:value-type="string">
            <text:p text:style-name="P10">20°</text:p>
          </table:table-cell>
          <table:table-cell table:style-name="Tabella4.A2" office:value-type="string">
            <text:p text:style-name="P10">La@</text:p>
          </table:table-cell>
          <table:table-cell table:style-name="Tabella4.A2" office:value-type="string">
            <text:p text:style-name="P10">200</text:p>
          </table:table-cell>
          <table:table-cell table:style-name="Tabella4.A2" office:value-type="string">
            <text:p text:style-name="P10">14(80)</text:p>
          </table:table-cell>
          <table:table-cell table:style-name="Tabella4.A2" office:value-type="string">
            <text:p text:style-name="P10">200BSw(2D)/Spells</text:p>
          </table:table-cell>
          <table:table-cell table:style-name="Tabella4.G2" office:value-type="string">
            <text:p text:style-name="P10">+12</text:p>
          </table:table-cell>
        </table:table-row>
        <table:table-row table:style-name="Tabella4.1">
          <table:table-cell table:style-name="Tabella4.A2" office:value-type="string">
            <text:p text:style-name="P10">Lammasu</text:p>
          </table:table-cell>
          <table:table-cell table:style-name="Tabella4.A2" office:value-type="string">
            <text:p text:style-name="P10">10°</text:p>
          </table:table-cell>
          <table:table-cell table:style-name="Tabella4.A2" office:value-type="string">
            <text:p text:style-name="P10">La</text:p>
          </table:table-cell>
          <table:table-cell table:style-name="Tabella4.A2" office:value-type="string">
            <text:p text:style-name="P10">150</text:p>
          </table:table-cell>
          <table:table-cell table:style-name="Tabella4.A2" office:value-type="string">
            <text:p text:style-name="P10">4(30)</text:p>
          </table:table-cell>
          <table:table-cell table:style-name="Tabella4.A2" office:value-type="string">
            <text:p text:style-name="P10">140LCl(2x)/160MBI/Spells</text:p>
          </table:table-cell>
          <table:table-cell table:style-name="Tabella4.G2" office:value-type="string">
            <text:p text:style-name="P10">+12</text:p>
          </table:table-cell>
        </table:table-row>
      </table:table>
      <text:p text:style-name="Standard"/>
      <text:p text:style-name="P2">Incantesimi: Campione -&gt; Paladino / Lammasu -&gt; Animista</text:p>
      <text:p text:style-name="P2"/>
      <text:p text:style-name="P2">Superare la battaglia è un <text:span text:style-name="T1">Minor Goal</text:span></text:p>
      <text:p text:style-name="P11"/>
      <text:p text:style-name="P11">LA GRANDE BIBLIOTECA</text:p>
      <text:p text:style-name="P11">Non appena entrano i PG si ritrovano trasportati in mezzo ad una battaglia infernale.</text:p>
      <text:p text:style-name="P11">Non riescono a capire dove si trovano, sembra una fortezza o una grande città... tuttavia non hanno molto tempo per guardarsi intorno: dal cielo piovono fiamme e un'orda di creature demoniache sta assaltando la città. Loro si trovano proprio in mezzo alla battaglia. Vicino a loro un generale in armatura scintillante falcia demoni urlando “Resistete! Resistete! Dobbiamo dargli abbastanza tempo per completare il rituale!”</text:p>
      <text:p text:style-name="P11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row table:style-name="Tabella1.1">
          <table:table-cell table:style-name="Tabella1.A1" office:value-type="string">
            <text:p text:style-name="P10">Nome</text:p>
          </table:table-cell>
          <table:table-cell table:style-name="Tabella1.A1" office:value-type="string">
            <text:p text:style-name="P10">Lvl</text:p>
          </table:table-cell>
          <table:table-cell table:style-name="Tabella1.A1" office:value-type="string">
            <text:p text:style-name="P10">Tag</text:p>
          </table:table-cell>
          <table:table-cell table:style-name="Tabella1.A1" office:value-type="string">
            <text:p text:style-name="P10">PF</text:p>
          </table:table-cell>
          <table:table-cell table:style-name="Tabella1.A1" office:value-type="string">
            <text:p text:style-name="P10">TA (BD)</text:p>
          </table:table-cell>
          <table:table-cell table:style-name="Tabella1.A1" office:value-type="string">
            <text:p text:style-name="P10">BO</text:p>
          </table:table-cell>
          <table:table-cell table:style-name="Tabella1.G1" office:value-type="string">
            <text:p text:style-name="P10">Iniz</text:p>
          </table:table-cell>
        </table:table-row>
        <table:table-row table:style-name="Tabella1.1">
          <table:table-cell table:style-name="Tabella1.A2" office:value-type="string">
            <text:p text:style-name="P10">Demone IV</text:p>
          </table:table-cell>
          <table:table-cell table:style-name="Tabella1.A2" office:value-type="string">
            <text:p text:style-name="P10">13°</text:p>
          </table:table-cell>
          <table:table-cell table:style-name="Tabella1.A2" office:value-type="string">
            <text:p text:style-name="P10">La</text:p>
          </table:table-cell>
          <table:table-cell table:style-name="Tabella1.A2" office:value-type="string">
            <text:p text:style-name="P10">200</text:p>
          </table:table-cell>
          <table:table-cell table:style-name="Tabella1.A2" office:value-type="string">
            <text:p text:style-name="P10">4(60)</text:p>
          </table:table-cell>
          <table:table-cell table:style-name="Tabella1.A2" office:value-type="string">
            <text:p text:style-name="P10">90we/60wp(2D)/spells</text:p>
          </table:table-cell>
          <table:table-cell table:style-name="Tabella1.G2" office:value-type="string">
            <text:p text:style-name="P10">+8</text:p>
          </table:table-cell>
        </table:table-row>
      </table:table>
      <text:p text:style-name="Standard">Dopo qualche round di combattimento i PG si trovano fianco a fianco col generale... proprio allora un colossale ragno di fuoco sfonda le mura e con un colpo solo lo polverizza...</text:p>
      <text:p text:style-name="Standard"/>
      <text:p text:style-name="Standard">I PG si trovano in una larga sala vuota, un grande pendolo oscilla in mezzo alla stanza.</text:p>
      <text:p text:style-name="Standard">“Non siete i primi a giungere fin qui... e suppongo non sarete gli ultimi. Tuttavia immagino voi abbiate delle domande. Siete pronti ad affrontare le conseguenze delle risposte?”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MS Mincho" svg:font-family="'MS Mincho', 'ＭＳ 明朝'" style:font-family-generic="modern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it" fo:country="IT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it" fo:country="IT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Win32 OpenOffice.org_project/680m6$Build-9095</meta:generator>
    <meta:creation-date>2008-03-25T14:37:36</meta:creation-date>
    <dc:creator>x</dc:creator>
    <dc:date>2008-03-28T19:30:14</dc:date>
    <dc:language>it-IT</dc:language>
    <meta:editing-cycles>28</meta:editing-cycles>
    <meta:editing-duration>PT2H25M54S</meta:editing-duration>
    <meta:user-defined meta:name="Info 1"/>
    <meta:user-defined meta:name="Info 2"/>
    <meta:user-defined meta:name="Info 3"/>
    <meta:user-defined meta:name="Info 4"/>
    <meta:document-statistic meta:table-count="2" meta:image-count="0" meta:object-count="0" meta:page-count="3" meta:paragraph-count="97" meta:word-count="865" meta:character-count="5234"/>
  </office:meta>
</office:document-meta>
</file>