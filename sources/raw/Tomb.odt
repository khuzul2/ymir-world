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MS Mincho1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3.801cm" style:rel-column-width="14658*"/>
    </style:style>
    <style:style style:name="Tabella1.B" style:family="table-column">
      <style:table-column-properties style:column-width="1.03cm" style:rel-column-width="3969*"/>
    </style:style>
    <style:style style:name="Tabella1.C" style:family="table-column">
      <style:table-column-properties style:column-width="1.177cm" style:rel-column-width="4537*"/>
    </style:style>
    <style:style style:name="Tabella1.D" style:family="table-column">
      <style:table-column-properties style:column-width="0.981cm" style:rel-column-width="3783*"/>
    </style:style>
    <style:style style:name="Tabella1.E" style:family="table-column">
      <style:table-column-properties style:column-width="2.454cm" style:rel-column-width="9461*"/>
    </style:style>
    <style:style style:name="Tabella1.F" style:family="table-column">
      <style:table-column-properties style:column-width="6.378cm" style:rel-column-width="24587*"/>
    </style:style>
    <style:style style:name="Tabella1.G" style:family="table-column">
      <style:table-column-properties style:column-width="1.178cm" style:rel-column-width="4540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99cm" table:align="margins" style:writing-mode="lr-tb"/>
    </style:style>
    <style:style style:name="Tabella2.A" style:family="table-column">
      <style:table-column-properties style:column-width="3.801cm" style:rel-column-width="14658*"/>
    </style:style>
    <style:style style:name="Tabella2.B" style:family="table-column">
      <style:table-column-properties style:column-width="1.03cm" style:rel-column-width="3969*"/>
    </style:style>
    <style:style style:name="Tabella2.C" style:family="table-column">
      <style:table-column-properties style:column-width="1.177cm" style:rel-column-width="4537*"/>
    </style:style>
    <style:style style:name="Tabella2.D" style:family="table-column">
      <style:table-column-properties style:column-width="0.981cm" style:rel-column-width="3783*"/>
    </style:style>
    <style:style style:name="Tabella2.E" style:family="table-column">
      <style:table-column-properties style:column-width="2.454cm" style:rel-column-width="9461*"/>
    </style:style>
    <style:style style:name="Tabella2.F" style:family="table-column">
      <style:table-column-properties style:column-width="6.378cm" style:rel-column-width="24587*"/>
    </style:style>
    <style:style style:name="Tabella2.G" style:family="table-column">
      <style:table-column-properties style:column-width="1.178cm" style:rel-column-width="4540*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2pt" fo:language="it" fo:country="IT" style:font-name-asian="MS Mincho1" style:font-size-asian="12pt" style:language-asian="ja" style:country-asian="JP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/>
    </style:style>
    <style:style style:name="P7" style:family="paragraph" style:parent-style-name="Standard" style:list-style-name="WW8Num2">
      <style:paragraph-properties fo:text-align="justify" style:justify-single-word="false">
        <style:tab-stops>
          <style:tab-stop style:position="1.879cm"/>
        </style:tab-stops>
      </style:paragraph-properties>
    </style:style>
    <style:style style:name="P8" style:family="paragraph" style:parent-style-name="Standard" style:list-style-name="WW8Num2">
      <style:paragraph-properties fo:text-align="justify" style:justify-single-word="false">
        <style:tab-stops>
          <style:tab-stop style:position="1.879cm"/>
        </style:tab-stops>
      </style:paragraph-properties>
      <style:text-properties style:use-window-font-color="true" fo:font-size="12pt" fo:language="it" fo:country="IT" fo:font-style="italic" fo:font-weight="normal" style:font-name-asian="MS Mincho1" style:font-size-asian="12pt" style:language-asian="ja" style:country-asian="JP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" style:family="paragraph" style:parent-style-name="Standard" style:list-style-name="WW8Num2">
      <style:paragraph-properties fo:text-align="justify" style:justify-single-word="false">
        <style:tab-stops>
          <style:tab-stop style:position="1.879cm"/>
        </style:tab-stops>
      </style:paragraph-properties>
      <style:text-properties style:use-window-font-color="true" fo:font-size="12pt" fo:language="it" fo:country="IT" fo:font-style="normal" fo:font-weight="normal" style:font-name-asian="MS Mincho1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879cm"/>
        </style:tab-stops>
      </style:paragraph-properties>
      <style:text-properties style:use-window-font-color="true" fo:font-size="12pt" fo:language="it" fo:country="IT" fo:font-style="normal" fo:font-weight="normal" style:font-name-asian="MS Mincho1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>
        <style:tab-stops>
          <style:tab-stop style:position="1.879cm"/>
        </style:tab-stops>
      </style:paragraph-properties>
      <style:text-properties style:use-window-font-color="true" fo:font-size="12pt" fo:language="it" fo:country="IT" fo:font-style="normal" fo:font-weight="bold" style:font-name-asian="MS Mincho1" style:font-size-asian="12pt" style:language-asian="ja" style:country-asian="JP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" style:family="paragraph" style:parent-style-name="Standard" style:list-style-name="L2">
      <style:paragraph-properties fo:text-align="justify" style:justify-single-word="false">
        <style:tab-stops>
          <style:tab-stop style:position="1.879cm"/>
        </style:tab-stops>
      </style:paragraph-properties>
      <style:text-properties style:use-window-font-color="true" fo:font-size="12pt" fo:language="it" fo:country="IT" fo:font-style="normal" fo:font-weight="normal" style:font-name-asian="MS Mincho1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it" fo:country="IT" style:font-name-asian="MS Mincho1" style:font-size-asian="10pt" style:language-asian="ja" style:country-asian="JP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style:font-name="Garamond" fo:font-size="10pt" fo:language="en" fo:country="GB" style:font-name-asian="MS Mincho1" style:font-size-asian="10pt" style:language-asian="ja" style:country-asian="JP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style="normal" style:font-name-asian="MS Mincho1" style:font-size-asian="12pt" style:language-asian="ja" style:country-asian="JP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style="normal" fo:font-weight="normal" style:font-name-asian="MS Mincho1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fo:language="it" fo:country="IT" fo:font-style="italic" fo:font-weight="normal" style:font-name-asian="MS Mincho1" style:font-size-asian="12pt" style:language-asian="ja" style:country-asian="JP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style:use-window-font-color="true" fo:font-size="12pt" fo:language="it" fo:country="IT" fo:font-style="normal" fo:font-weight="normal" style:font-name-asian="MS Mincho1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style:use-window-font-color="true" fo:font-size="12pt" fo:language="it" fo:country="IT" fo:font-style="normal" fo:font-weight="bold" style:font-name-asian="MS Mincho1" style:font-size-asian="12pt" style:language-asian="ja" style:country-asian="JP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fo:language="it" fo:country="IT" fo:font-weight="bold" style:font-name-asian="MS Mincho1" style:font-size-asian="12pt" style:language-asian="ja" style:country-asian="JP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2pt" fo:language="it" fo:country="IT" style:font-name-asian="MS Mincho1" style:font-size-asian="12pt" style:language-asian="ja" style:country-asian="JP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2pt" fo:language="it" fo:country="IT" fo:font-style="italic" style:font-name-asian="MS Mincho1" style:font-size-asian="12pt" style:language-asian="ja" style:country-asian="JP" style:font-style-asian="italic" style:font-name-complex="Times New Roman" style:font-size-complex="12pt" style:language-complex="ar" style:country-complex="SA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TOMBA DI NEMELATEKH</text:p>
      <text:p text:style-name="P2"/>
      <text:p text:style-name="P2">UNA VECCHIA CONOSCENZA</text:p>
      <text:p text:style-name="P2"/>
      <text:p text:style-name="P2">Leonard si trova con degli alleati nella tomba, cercherà di convincere i PG ad unirsi alle forze del Tecnocrate... dato che probabilmente non ci riuscirà dovrebbe essere giunto il tempo della tanto attesa resa dei conti.</text:p>
      <text:p text:style-name="P2"/>
      <text:p text:style-name="P2">Gli avversari sono:</text:p>
      <text:list text:style-name="L1">
        <text:list-item>
          <text:p text:style-name="P3"><text:span text:style-name="T1">Leonard:</text:span> questa volta il vampiro cercherà in ogni modo di sbarazzarsi dei PG</text:p>
        </text:list-item>
      </text:list>
      <text:p text:style-name="P4">I Vampiri sono vulnerabili solo alle armi magiche, ai colpi critici da Impalamento alle magie di Forza o Elementali (Acqua e Elettricità).</text:p>
      <text:p text:style-name="P4">Morso risucchia 1-5 punti Co e 1d10+20 pf...</text:p>
      <text:p text:style-name="P4"/>
      <text:p text:style-name="P4">PP: 92</text:p>
      <text:p text:style-name="P5"><text:span text:style-name="T2">Liste:</text:span><text:span text:style-name="T3"> Tutte quelle del Mentalismo Malvagio fino al 15° livello (gratis e senza manovre)</text:span></text:p>
      <text:p text:style-name="P4">Più vedi scheda.</text:p>
      <text:p text:style-name="P4"/>
      <text:p text:style-name="P6">Oggetti di Nota: </text:p>
      <text:list text:style-name="WW8Num2">
        <text:list-item>
          <text:p text:style-name="P7"><text:span text:style-name="T4">Anello del Potere:</text:span><text:span text:style-name="T3"> Addizionatore +3 <text:s/>per l'Essenza</text:span></text:p>
        </text:list-item>
        <text:list-item>
          <text:p text:style-name="P7"><text:span text:style-name="T4">Cintura Protettiva:</text:span><text:span text:style-name="T3"> +10 BD</text:span></text:p>
        </text:list-item>
        <text:list-item>
          <text:p text:style-name="P8">Spada: “Cerberus” <text:span text:style-name="T5">forgiata dal Tecnocrate per rimpiazzare la perduta Hydra, somiglia a un incrocio fra una spada e una motosega. In mithril, +25, se azionata fa colpi critici Tearing Ripping.</text:span></text:p>
        </text:list-item>
        <text:list-item>
          <text:p text:style-name="P9">100 mo</text:p>
        </text:list-item>
      </text:list>
      <text:p text:style-name="P10">Vedi anche la scheda...</text:p>
      <text:p text:style-name="P10"/>
      <text:list text:style-name="L2">
        <text:list-item>
          <text:p text:style-name="P11">Uccisore Meccanico: <text:span text:style-name="T6">Uno dei costrutti del Tecnocrate, una scolopendra meccanica gigante... decisamente poco simpatico.</text:span></text:p>
        </text:list-item>
        <text:list-item>
          <text:p text:style-name="P11">Ghoul Meccanico: <text:span text:style-name="T6">Uno o due a seconda del numero di PG presenti</text:span></text:p>
        </text:list-item>
        <text:list-item>
          <text:p text:style-name="P11">Rufia: <text:span text:style-name="T6">Una servitrice del tecnocrate mandata a spalleggiare Leonard (Magent/Cecchina).</text:span></text:p>
          <text:p text:style-name="P12">Ha con sé:</text:p>
          <text:p text:style-name="P12"><text:span text:style-name="T7">-<text:tab/>Lente Monoculare Migliorata: </text:span>Riduce di un quarto le penalità per la distanza con le armi da tiro. In più la lente è incantata con Darkvision costante.</text:p>
          <text:p text:style-name="P12">-<text:tab/><text:span text:style-name="T7">Sputadardi Leggera: </text:span>Magica +20</text:p>
          <text:p text:style-name="P12">-<text:tab/><text:span text:style-name="T7">Armatura Camaleontica: </text:span>TA9, +25 a Stalking/Hiding</text:p>
          <text:p text:style-name="P12">-<text:tab/><text:span text:style-name="T7">Anello Giornaliero: </text:span><text:s/>Stun Relief 1 al giorno</text:p>
          <text:p text:style-name="P12">-<text:tab/>25 mo</text:p>
        </text:list-item>
      </text:list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13">Nome</text:p>
          </table:table-cell>
          <table:table-cell table:style-name="Tabella1.A1" office:value-type="string">
            <text:p text:style-name="P13">Lvl</text:p>
          </table:table-cell>
          <table:table-cell table:style-name="Tabella1.A1" office:value-type="string">
            <text:p text:style-name="P13">Tag</text:p>
          </table:table-cell>
          <table:table-cell table:style-name="Tabella1.A1" office:value-type="string">
            <text:p text:style-name="P13">PF</text:p>
          </table:table-cell>
          <table:table-cell table:style-name="Tabella1.A1" office:value-type="string">
            <text:p text:style-name="P13">TA (BD)</text:p>
          </table:table-cell>
          <table:table-cell table:style-name="Tabella1.A1" office:value-type="string">
            <text:p text:style-name="P13">BO</text:p>
          </table:table-cell>
          <table:table-cell table:style-name="Tabella1.G1" office:value-type="string">
            <text:p text:style-name="P13">Iniz</text:p>
          </table:table-cell>
        </table:table-row>
        <table:table-row table:style-name="Tabella1.1">
          <table:table-cell table:style-name="Tabella1.A2" office:value-type="string">
            <text:p text:style-name="P13">Leonard</text:p>
          </table:table-cell>
          <table:table-cell table:style-name="Tabella1.A2" office:value-type="string">
            <text:p text:style-name="P13">15°</text:p>
          </table:table-cell>
          <table:table-cell table:style-name="Tabella1.A2" office:value-type="string">
            <text:p text:style-name="P13">La#</text:p>
          </table:table-cell>
          <table:table-cell table:style-name="Tabella1.A2" office:value-type="string">
            <text:p text:style-name="P13">129</text:p>
          </table:table-cell>
          <table:table-cell table:style-name="Tabella1.A2" office:value-type="string">
            <text:p text:style-name="P13">1(63)</text:p>
          </table:table-cell>
          <table:table-cell table:style-name="Tabella1.A2" office:value-type="string">
            <text:p text:style-name="P13">155BrSw[Tearing]/83MBi+Spec</text:p>
          </table:table-cell>
          <table:table-cell table:style-name="Tabella1.G2" office:value-type="string">
            <text:p text:style-name="P13">+11</text:p>
          </table:table-cell>
        </table:table-row>
        <table:table-row table:style-name="Tabella1.1">
          <table:table-cell table:style-name="Tabella1.A2" office:value-type="string">
            <text:p text:style-name="P13">Ghoul Meccanico</text:p>
          </table:table-cell>
          <table:table-cell table:style-name="Tabella1.A2" office:value-type="string">
            <text:p text:style-name="P13">10°</text:p>
          </table:table-cell>
          <table:table-cell table:style-name="Tabella1.A2" office:value-type="string">
            <text:p text:style-name="P13">II#</text:p>
          </table:table-cell>
          <table:table-cell table:style-name="Tabella1.A2" office:value-type="string">
            <text:p text:style-name="P13">110</text:p>
          </table:table-cell>
          <table:table-cell table:style-name="Tabella1.A2" office:value-type="string">
            <text:p text:style-name="P13">1(70)</text:p>
          </table:table-cell>
          <table:table-cell table:style-name="Tabella1.A2" office:value-type="string">
            <text:p text:style-name="P14">90Dag/70Mbi+special</text:p>
          </table:table-cell>
          <table:table-cell table:style-name="Tabella1.G2" office:value-type="string">
            <text:p text:style-name="P13">+12</text:p>
          </table:table-cell>
        </table:table-row>
        <table:table-row table:style-name="Tabella1.1">
          <table:table-cell table:style-name="Tabella1.A2" office:value-type="string">
            <text:p text:style-name="P13">Uccisore Meccanico</text:p>
          </table:table-cell>
          <table:table-cell table:style-name="Tabella1.A2" office:value-type="string">
            <text:p text:style-name="P13">14°</text:p>
          </table:table-cell>
          <table:table-cell table:style-name="Tabella1.A2" office:value-type="string">
            <text:p text:style-name="P13">La#</text:p>
          </table:table-cell>
          <table:table-cell table:style-name="Tabella1.A2" office:value-type="string">
            <text:p text:style-name="P13">300</text:p>
          </table:table-cell>
          <table:table-cell table:style-name="Tabella1.A2" office:value-type="string">
            <text:p text:style-name="P13">20(70)</text:p>
          </table:table-cell>
          <table:table-cell table:style-name="Tabella1.A2" office:value-type="string">
            <text:p text:style-name="P14">130LPi+Poison/130LBa</text:p>
          </table:table-cell>
          <table:table-cell table:style-name="Tabella1.G2" office:value-type="string">
            <text:p text:style-name="P13">+21</text:p>
          </table:table-cell>
        </table:table-row>
        <table:table-row table:style-name="Tabella1.1">
          <table:table-cell table:style-name="Tabella1.A2" office:value-type="string">
            <text:p text:style-name="P13">Rufia</text:p>
          </table:table-cell>
          <table:table-cell table:style-name="Tabella1.A2" office:value-type="string">
            <text:p text:style-name="P13">10°</text:p>
          </table:table-cell>
          <table:table-cell table:style-name="Tabella1.A2" office:value-type="string">
            <text:p text:style-name="P13">M</text:p>
          </table:table-cell>
          <table:table-cell table:style-name="Tabella1.A2" office:value-type="string">
            <text:p text:style-name="P13">90</text:p>
          </table:table-cell>
          <table:table-cell table:style-name="Tabella1.A2" office:value-type="string">
            <text:p text:style-name="P13">9(30)</text:p>
          </table:table-cell>
          <table:table-cell table:style-name="Tabella1.A2" office:value-type="string">
            <text:p text:style-name="P14">115LXBow/80SSw</text:p>
          </table:table-cell>
          <table:table-cell table:style-name="Tabella1.G2" office:value-type="string">
            <text:p text:style-name="P13">+10</text:p>
          </table:table-cell>
        </table:table-row>
      </table:table>
      <text:p text:style-name="P5"/>
      <text:p text:style-name="P5"/>
      <text:p text:style-name="P5">LA SALA DEL MARTELLO</text:p>
      <text:p text:style-name="P5"/>
      <text:p text:style-name="P15">Trappola: <text:span text:style-name="T5">Subito dopo la svolta c'è un classico trabocchetto (camuffato in modo da essere “Estremamente Difficile” [-30] da notare) , il pavimento cede aprendo una botola profonda 9 metri, su un pavimento coperto di spuntoni (oltre all'attacco da caduta viene colpito da 1d5 spuntoni, attacco da Pugnale col BO della caduta +10 ogni spuntone oltre il primo). La trappola è incantata in modo da richiudersi dopo un'ora</text:span></text:p>
      <text:p text:style-name="P16"/>
      <text:p text:style-name="P16"><text:span text:style-name="T7">Armatura: </text:span><text:s/>Costruita in modo da sembrare un minaccioso costrutto, in realtà è un oggetto magico semi intelligente. Se percepisce “Presenze” entro sei metri in fronte a sé attiva un cono di potente forza telecinetica: chi fallisce un TR contro l'Essenza di 25° livello viene respinto indietro di mezzo metro per 10 di fallimento. Chi ha oggetti metallici riceve una penalità compresa fra -10 e -50 al TR, a seconda della quantità di metallo che ha con sé.</text:p>
      <text:p text:style-name="P16"/>
      <text:p text:style-name="P15">La stanza: <text:span text:style-name="T5">è Wardata contro ogni tipo di Teleport.</text:span></text:p>
      <text:p text:style-name="P16"/>
      <text:p text:style-name="P17">OEDRING, IL MARTELLO DEL MONDO SOTTERRANEO</text:p>
      <text:p text:style-name="P18"><text:span text:style-name="T1">POTERI: </text:span><text:span text:style-name="T6">Martello da Guerra +30 (colpisce come Mithril), Indistruttibile, Doppio Danno, colpo critico addizionale da Krush, crea una sfera di magnetismo intorno al portatore che gli conferisce un bonus di +20 al BD contro le armi di ferro, permette di creare oggetti in giorni invece che in settimane, ogni oggetto forgiato col suo ausilio guadagna 2d10 di PC (Terra). </text:span>Estremamente intelligente, comunica attraverso Telepatia.</text:p>
      <text:p text:style-name="P18"/>
      <text:p text:style-name="P18">LA VERA TOMBA DI <text:span text:style-name="T6">NEMELATEKH</text:span></text:p>
      <text:p text:style-name="P19"/>
      <text:p text:style-name="P20">Il Guardiano:<text:span text:style-name="T5"> </text:span></text:p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13">Nome</text:p>
          </table:table-cell>
          <table:table-cell table:style-name="Tabella2.A1" office:value-type="string">
            <text:p text:style-name="P13">Lvl</text:p>
          </table:table-cell>
          <table:table-cell table:style-name="Tabella2.A1" office:value-type="string">
            <text:p text:style-name="P13">Tag</text:p>
          </table:table-cell>
          <table:table-cell table:style-name="Tabella2.A1" office:value-type="string">
            <text:p text:style-name="P13">PF</text:p>
          </table:table-cell>
          <table:table-cell table:style-name="Tabella2.A1" office:value-type="string">
            <text:p text:style-name="P13">TA (BD)</text:p>
          </table:table-cell>
          <table:table-cell table:style-name="Tabella2.A1" office:value-type="string">
            <text:p text:style-name="P13">BO</text:p>
          </table:table-cell>
          <table:table-cell table:style-name="Tabella2.G1" office:value-type="string">
            <text:p text:style-name="P13">Iniz</text:p>
          </table:table-cell>
        </table:table-row>
        <table:table-row table:style-name="Tabella2.1">
          <table:table-cell table:style-name="Tabella2.A2" office:value-type="string">
            <text:p text:style-name="P13">Black Reaver</text:p>
          </table:table-cell>
          <table:table-cell table:style-name="Tabella2.A2" office:value-type="string">
            <text:p text:style-name="P13">50°</text:p>
          </table:table-cell>
          <table:table-cell table:style-name="Tabella2.A2" office:value-type="string">
            <text:p text:style-name="P13">SL#</text:p>
          </table:table-cell>
          <table:table-cell table:style-name="Tabella2.A2" office:value-type="string">
            <text:p text:style-name="P13">600</text:p>
          </table:table-cell>
          <table:table-cell table:style-name="Tabella2.A2" office:value-type="string">
            <text:p text:style-name="P13">20(60)</text:p>
          </table:table-cell>
          <table:table-cell table:style-name="Tabella2.A2" office:value-type="string">
            <text:p text:style-name="P13">250BAx(3D)(x2)/200HBa(2D)</text:p>
          </table:table-cell>
          <table:table-cell table:style-name="Tabella2.G2" office:value-type="string">
            <text:p text:style-name="P13">+15</text:p>
          </table:table-cell>
        </table:table-row>
      </table:table>
      <text:p text:style-name="P19"/>
      <text:p text:style-name="P19">Sconfiggere il Guardiano è un <text:span text:style-name="T1">Minor Goal Absurd</text:span></text:p>
      <text:p text:style-name="P19"/>
      <text:p text:style-name="P20">Il Tesoro: </text:p>
      <text:list text:style-name="L3">
        <text:list-item>
          <text:p text:style-name="P21">1000mo</text:p>
        </text:list-item>
        <text:list-item>
          <text:p text:style-name="P22">Cintura della Focalizzazione: <text:span text:style-name="T6">+2 al bonus di SD; +10 a Rimuovere Stordimento; ogni round rimuove automaticamente un round di stordimento (anche senza parare), fino ad un massimo pari al bonus di SD del personaggio ogni giorno.</text:span></text:p>
        </text:list-item>
        <text:list-item>
          <text:p text:style-name="P21"><text:span text:style-name="T1">Pozione della Forma di Drago: </text:span>chi la beve sviluppa grandi ali membranose, dure scaglie (TA12) e può sputare fuoco (Fire Bolt) una volta ogni 3 round, per 6 ore.</text:p>
        </text:list-item>
        <text:list-item>
          <text:p text:style-name="P21"><text:span text:style-name="T1">Tunica dell'Arcimago: </text:span>TA2, +10 al BD, il portatore conta come se fosse di 1 livello più alto quando lancia incantesimi (sia per TR che per le manovre di lancio)</text:p>
        </text:list-item>
        <text:list-item>
          <text:p text:style-name="P21"><text:span text:style-name="T1">Bastone della Disgregazione: </text:span>50 cariche, 1 carica causa <text:span text:style-name="T7">Cracks Call, </text:span>5 cariche causano <text:span text:style-name="T7">Shatter</text:span> e 15 cariche causano <text:span text:style-name="T7">Disintegration.</text:span></text:p>
        </text:list-item>
        <text:list-item>
          <text:p text:style-name="P22">Sfera della Veggenza: <text:span text:style-name="T6">una sfera di vetro, </text:span><text:span text:style-name="T8">può lanciare </text:span><text:span text:style-name="T9">Divination </text:span><text:span text:style-name="T8">una volta al giorno. La sfera ha anche altre capacità, a seconda della volontà dell'utilizzatore, ma se usata in questo modo è incredibilmente spossante e può anche causare danni a chi la usa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MS Mincho1" svg:font-family="'MS Mincho', 'ＭＳ 明朝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Times New Roman" style:font-name-asian="MS Mincho1" style:font-name-complex="Times New Roman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space-before="1.244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1-16T22:14:19</meta:creation-date>
    <dc:creator>x</dc:creator>
    <dc:date>2008-01-22T22:59:09</dc:date>
    <dc:language>it-IT</dc:language>
    <meta:editing-cycles>30</meta:editing-cycles>
    <meta:editing-duration>PT4H20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90" meta:word-count="717" meta:character-count="4273"/>
  </office:meta>
</office:document-meta>
</file>