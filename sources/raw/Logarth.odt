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atang" svg:font-family="Batang, 바탕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817cm" style:rel-column-width="14718*"/>
    </style:style>
    <style:style style:name="Tabella1.B" style:family="table-column">
      <style:table-column-properties style:column-width="1.034cm" style:rel-column-width="3986*"/>
    </style:style>
    <style:style style:name="Tabella1.C" style:family="table-column">
      <style:table-column-properties style:column-width="1.182cm" style:rel-column-width="4555*"/>
    </style:style>
    <style:style style:name="Tabella1.D" style:family="table-column">
      <style:table-column-properties style:column-width="0.986cm" style:rel-column-width="3798*"/>
    </style:style>
    <style:style style:name="Tabella1.E" style:family="table-column">
      <style:table-column-properties style:column-width="2.464cm" style:rel-column-width="9499*"/>
    </style:style>
    <style:style style:name="Tabella1.F" style:family="table-column">
      <style:table-column-properties style:column-width="6.403cm" style:rel-column-width="24687*"/>
    </style:style>
    <style:style style:name="Tabella1.G" style:family="table-column">
      <style:table-column-properties style:column-width="1.113cm" style:rel-column-width="4292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Garamond" fo:font-size="10pt" fo:language="fr" fo:country="FR" style:font-size-asian="10pt" style:font-size-complex="10pt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style="normal" fo:font-weight="bold" style:font-name-asian="Batang" style:font-size-asian="12pt" style:language-asian="ko" style:country-asian="K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style="normal" fo:font-weight="normal" style:font-name-asian="Batang" style:font-size-asian="12pt" style:language-asian="ko" style:country-asian="K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size="12pt" fo:language="it" fo:country="IT" style:font-name-asian="Batang" style:font-size-asian="12pt" style:language-asian="ko" style:country-asian="KR" style:font-name-complex="Times New Roman" style:font-size-complex="12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ARTH (LOSSARMAUG L'ASTUTO)</text:p>
      <text:p text:style-name="P1"/>
      <text:p text:style-name="P2">Dragone dell'Aria Antico (in forma umana), lvl:30°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3">Nome </text:p>
          </table:table-cell>
          <table:table-cell table:style-name="Tabella1.A1" office:value-type="string">
            <text:p text:style-name="P3">Lvl</text:p>
          </table:table-cell>
          <table:table-cell table:style-name="Tabella1.A1" office:value-type="string">
            <text:p text:style-name="P3">Tag </text:p>
          </table:table-cell>
          <table:table-cell table:style-name="Tabella1.A1" office:value-type="string">
            <text:p text:style-name="P4">PF</text:p>
          </table:table-cell>
          <table:table-cell table:style-name="Tabella1.A1" office:value-type="string">
            <text:p text:style-name="P4">TA (BD)</text:p>
          </table:table-cell>
          <table:table-cell table:style-name="Tabella1.A1" office:value-type="string">
            <text:p text:style-name="P3">BO</text:p>
          </table:table-cell>
          <table:table-cell table:style-name="Tabella1.G1" office:value-type="string">
            <text:p text:style-name="P3">Iniz </text:p>
          </table:table-cell>
        </table:table-row>
        <table:table-row table:style-name="Tabella1.1">
          <table:table-cell table:style-name="Tabella1.A2" office:value-type="string">
            <text:p text:style-name="P3">Lossarmaug (Drago)</text:p>
          </table:table-cell>
          <table:table-cell table:style-name="Tabella1.A2" office:value-type="string">
            <text:p text:style-name="P3">30°</text:p>
          </table:table-cell>
          <table:table-cell table:style-name="Tabella1.A2" office:value-type="string">
            <text:p text:style-name="P3">SL</text:p>
          </table:table-cell>
          <table:table-cell table:style-name="Tabella1.A2" office:value-type="string">
            <text:p text:style-name="P4">400</text:p>
          </table:table-cell>
          <table:table-cell table:style-name="Tabella1.A2" office:value-type="string">
            <text:p text:style-name="P4">20(50)</text:p>
          </table:table-cell>
          <table:table-cell table:style-name="Tabella1.A2" office:value-type="string">
            <text:p text:style-name="P3">120HBi/120HCl/120Hba/90Hho/120Force</text:p>
          </table:table-cell>
          <table:table-cell table:style-name="Tabella1.G2" office:value-type="string">
            <text:p text:style-name="P3">+8</text:p>
          </table:table-cell>
        </table:table-row>
        <table:table-row table:style-name="Tabella1.1">
          <table:table-cell table:style-name="Tabella1.A2" office:value-type="string">
            <text:p text:style-name="P3">Lossarmaug (Umano)</text:p>
          </table:table-cell>
          <table:table-cell table:style-name="Tabella1.A2" office:value-type="string">
            <text:p text:style-name="P3">30°</text:p>
          </table:table-cell>
          <table:table-cell table:style-name="Tabella1.A2" office:value-type="string">
            <text:p text:style-name="P3">SL</text:p>
          </table:table-cell>
          <table:table-cell table:style-name="Tabella1.A2" office:value-type="string">
            <text:p text:style-name="P4">400</text:p>
          </table:table-cell>
          <table:table-cell table:style-name="Tabella1.A2" office:value-type="string">
            <text:p text:style-name="P4">20(70)</text:p>
          </table:table-cell>
          <table:table-cell table:style-name="Tabella1.A2" office:value-type="string">
            <text:p text:style-name="P3">180Sw/160LBow/130Bolt/Spells</text:p>
          </table:table-cell>
          <table:table-cell table:style-name="Tabella1.G2" office:value-type="string">
            <text:p text:style-name="P3">+12</text:p>
          </table:table-cell>
        </table:table-row>
      </table:table>
      <text:p text:style-name="Standard"/>
      <text:p text:style-name="P5">Liste (rnk:30/bns:50 tutte):</text:p>
      <text:p text:style-name="P6">Spirit Mastery</text:p>
      <text:p text:style-name="P6">Spell Reins</text:p>
      <text:p text:style-name="P6">Dispelling Ways</text:p>
      <text:p text:style-name="P6">Essence's Perceptions</text:p>
      <text:p text:style-name="P6">Elemental Summons</text:p>
      <text:p text:style-name="P6">Elemental Counters</text:p>
      <text:p text:style-name="P6">Elemental Defenses</text:p>
      <text:p text:style-name="P6">Air Control</text:p>
      <text:p text:style-name="P6">Wind Law</text:p>
      <text:p text:style-name="P6">Wind Mastery</text:p>
      <text:p text:style-name="P6"/>
      <text:p text:style-name="P7">PM:<text:span text:style-name="T1"> (300) 1200</text:span></text:p>
      <text:p text:style-name="P6"/>
      <text:p text:style-name="P8">Oggetti:</text:p>
      <text:p text:style-name="P1">Anello del Mascheramento: <text:span text:style-name="T1">il drago portatore è trasformato in una razza umanoide a sua scelta, mantenendo tutte le sue caratteristiche fisiche (TA, BD, PF, sensi e critici). Il drago apparirà di quella razza anche a indagini magiche.</text:span></text:p>
      <text:p text:style-name="P1">Anello del Potere Draconico:<text:span text:style-name="T1"> Moltiplicatore PMx4, </text:span><text:span text:style-name="T2">Extension III, Ranging III, Increased Radius III</text:span><text:span text:style-name="T3"> ognuno 2 volte al giorno.</text:span></text:p>
      <text:p text:style-name="P1">Mantello della Notte:<text:span text:style-name="T1"> +30 a Nascondersi, può lanciare</text:span><text:span text:style-name="T2"> Fly II</text:span><text:span text:style-name="T3">, </text:span><text:span text:style-name="T2">Shadow </text:span><text:span text:style-name="T3">e</text:span><text:span text:style-name="T2"> Displacement II</text:span><text:span text:style-name="T3"> ognuno 2 volte al giorno.</text:span></text:p>
      <text:p text:style-name="P7">Stivali di Logarth:<text:span text:style-name="T1"> +30 a Muoversi Silenziosamente, possono lanciare </text:span><text:span text:style-name="T2">Fast Sprint</text:span><text:span text:style-name="T1"> e </text:span><text:span text:style-name="T2">Haste V</text:span><text:span text:style-name="T1"> ognuno 2 volte al giorno.</text:span></text:p>
      <text:p text:style-name="P7">Cintura Difensiva:<text:span text:style-name="T1"> +20BD, può lanciare</text:span><text:span text:style-name="T2"> Protection II</text:span><text:span text:style-name="T1">, </text:span><text:span text:style-name="T2">Deflections I</text:span><text:span text:style-name="T1"> e </text:span><text:span text:style-name="T2">Bladeturn I </text:span><text:span text:style-name="T1">ognuno 3 volte al giorno.</text:span></text:p>
      <text:p text:style-name="P9"><text:span text:style-name="T4">Elethar, il Cacciatore:</text:span> Un arco magico reperito in Helgedad. <text:span text:style-name="T5">Arco Lungo Magico +20, Doppia Gittata, Utilizza solo il 40% del round per ricaricare.</text:span></text:p>
      <text:p text:style-name="P10">Vento del Destino:<text:span text:style-name="T1"> Lama Elementale dell'Aria Maggiore. Spada +30 in Eog Bianco, Colpi Critici Addizionali da Sbilanciamento, Sterminatrice di Non Morti, -2 alla possibilità di Fallimento Critico, Indistruttibile, Danni da Sanguinamento inflitti x3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atang" svg:font-family="Batang, 바탕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4-19T21:25:31</meta:creation-date>
    <dc:creator>x</dc:creator>
    <dc:date>2007-09-19T03:52:46</dc:date>
    <dc:language>it-IT</dc:language>
    <meta:editing-cycles>10</meta:editing-cycles>
    <meta:editing-duration>PT40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3" meta:word-count="240" meta:character-count="1520"/>
  </office:meta>
</office:document-meta>
</file>