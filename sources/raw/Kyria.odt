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MS Mincho" svg:font-family="'MS Mincho', 'ＭＳ 明朝'" style:font-family-generic="moder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 style:writing-mode="lr-tb"/>
    </style:style>
    <style:style style:name="Tabella1.A" style:family="table-column">
      <style:table-column-properties style:column-width="3.801cm" style:rel-column-width="14658*"/>
    </style:style>
    <style:style style:name="Tabella1.B" style:family="table-column">
      <style:table-column-properties style:column-width="1.03cm" style:rel-column-width="3969*"/>
    </style:style>
    <style:style style:name="Tabella1.C" style:family="table-column">
      <style:table-column-properties style:column-width="1.177cm" style:rel-column-width="4537*"/>
    </style:style>
    <style:style style:name="Tabella1.D" style:family="table-column">
      <style:table-column-properties style:column-width="0.981cm" style:rel-column-width="3783*"/>
    </style:style>
    <style:style style:name="Tabella1.E" style:family="table-column">
      <style:table-column-properties style:column-width="2.454cm" style:rel-column-width="9461*"/>
    </style:style>
    <style:style style:name="Tabella1.F" style:family="table-column">
      <style:table-column-properties style:column-width="6.378cm" style:rel-column-width="24587*"/>
    </style:style>
    <style:style style:name="Tabella1.G" style:family="table-column">
      <style:table-column-properties style:column-width="1.178cm" style:rel-column-width="4540*"/>
    </style:style>
    <style:style style:name="Tabella1.1" style:family="table-row">
      <style:table-row-properties style:keep-together="true"/>
    </style:style>
    <style:style style:name="Tabel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1.G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1.G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a3" style:family="table">
      <style:table-properties style:width="16.999cm" table:align="margins" style:writing-mode="lr-tb"/>
    </style:style>
    <style:style style:name="Tabella3.A" style:family="table-column">
      <style:table-column-properties style:column-width="3.801cm" style:rel-column-width="14658*"/>
    </style:style>
    <style:style style:name="Tabella3.B" style:family="table-column">
      <style:table-column-properties style:column-width="1.03cm" style:rel-column-width="3969*"/>
    </style:style>
    <style:style style:name="Tabella3.C" style:family="table-column">
      <style:table-column-properties style:column-width="1.177cm" style:rel-column-width="4537*"/>
    </style:style>
    <style:style style:name="Tabella3.D" style:family="table-column">
      <style:table-column-properties style:column-width="0.981cm" style:rel-column-width="3783*"/>
    </style:style>
    <style:style style:name="Tabella3.E" style:family="table-column">
      <style:table-column-properties style:column-width="2.454cm" style:rel-column-width="9461*"/>
    </style:style>
    <style:style style:name="Tabella3.F" style:family="table-column">
      <style:table-column-properties style:column-width="6.378cm" style:rel-column-width="24587*"/>
    </style:style>
    <style:style style:name="Tabella3.G" style:family="table-column">
      <style:table-column-properties style:column-width="1.178cm" style:rel-column-width="4540*"/>
    </style:style>
    <style:style style:name="Tabella3.1" style:family="table-row">
      <style:table-row-properties style:keep-together="true"/>
    </style:style>
    <style:style style:name="Tabel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3.G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3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3.G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use-window-font-color="true" style:font-name="Garamond" fo:font-size="10pt" fo:language="it" fo:country="IT" style:font-name-asian="MS Mincho" style:font-size-asian="10pt" style:language-asian="ja" style:country-asian="JP" style:font-name-complex="Times New Roman" style:font-size-complex="10pt" style:language-complex="ar" style:country-complex="SA"/>
    </style:style>
    <style:style style:name="P4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fo:font-size="12pt" fo:language="it" fo:country="IT" style:font-name-asian="MS Mincho" style:font-size-asian="12pt" style:language-asian="ja" style:country-asian="JP" style:font-name-complex="Times New Roman" style:font-size-complex="12pt" style:language-complex="ar" style:country-complex="SA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YRIA</text:p>
      <text:p text:style-name="P1"/>
      <text:p text:style-name="P2">NESSA</text:p>
      <text:p text:style-name="P2">Raggiungere Nessa in aereonave conta come un <text:span text:style-name="T1">Light Minor Goal.</text:span></text:p>
      <text:p text:style-name="P2">All'aeroporto incontro con una grossa nave di Armora: la “Roc”, che trasporta due ambasciatori.</text:p>
      <text:p text:style-name="P2">Uno è Balthazaar Solinvicti, ambasciatore armorita, l'altro è <text:span text:style-name="T2">Vessh’Ke, della Zaalesha.</text:span></text:p>
      <text:p text:style-name="P2">Balthazaar può essere utile ai PG in diversi modi: innanzitutto può renderli partecipi del fatto che Armora si sta preparando per una grande offensiva finale, secondariamente può aiutarli a reperire uomini e viveri, oltre che ad ottenere il favore della regina Estalia.</text:p>
      <text:p text:style-name="P2">Guadagnare l'aiuto di Bathazaar è un <text:span text:style-name="T1">Medium Minor Goal</text:span>.</text:p>
      <text:p text:style-name="P2"/>
      <text:p text:style-name="P2">KYRIA</text:p>
      <text:p text:style-name="P2"/>
      <text:p text:style-name="P2">Per raggiungere la Kyria servono appena 3 giorni di volo, partendo con una ciurma normale.</text:p>
      <text:p text:style-name="P2">Il terzo giorno viene avvistata un'altra aereonave davanti alla loro: si tratta di quella di Leonard e Co.</text:p>
      <text:p text:style-name="P2">Inizia un furioso inseguimento e si arriva in vista di un fittissimo banco di nebbia, ogni marchingegno magico nella nebbia si disattiva e la nave comincerà a perdere quota.</text:p>
      <text:p text:style-name="P2">Non c'è niente che i PG possono fare per evitarlo, la nave dovrà fare un atterraggio di fortuna in mezzo alla nebbia...</text:p>
      <text:p text:style-name="P2">Arrivare a Kyria è un <text:span text:style-name="T1">Hard Major Goal</text:span>.</text:p>
      <text:p text:style-name="P2"/>
      <text:p text:style-name="P2">BENVENUTO</text:p>
      <text:p text:style-name="P2">Nota che Kyria è parzialmente nel Mondo dei Sogni, le invocazioni di demoni richiamano Incubi.</text:p>
      <text:p text:style-name="P2"/>
      <text:p text:style-name="P2">Sull'isola quando i PG atterrano è già in corso un combattimento: la ciurma di Leonard è stata assalita da un gruppo di Ur-Tanoth armati di lance e fiancheggiati da giganti.</text:p>
      <text:p text:style-name="P2"/>
      <text:p text:style-name="P2">La nave dei pg viene subito avvolta dai viticci avvolgenti di alcuni Ucorni, mentre un distaccamento di abitanti dell'isola attacca anche loro.</text:p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office:value-type="string">
            <text:p text:style-name="P3">Nome</text:p>
          </table:table-cell>
          <table:table-cell table:style-name="Tabella1.A1" office:value-type="string">
            <text:p text:style-name="P3">Lvl</text:p>
          </table:table-cell>
          <table:table-cell table:style-name="Tabella1.A1" office:value-type="string">
            <text:p text:style-name="P3">Tag</text:p>
          </table:table-cell>
          <table:table-cell table:style-name="Tabella1.A1" office:value-type="string">
            <text:p text:style-name="P3">PF</text:p>
          </table:table-cell>
          <table:table-cell table:style-name="Tabella1.A1" office:value-type="string">
            <text:p text:style-name="P3">TA (BD)</text:p>
          </table:table-cell>
          <table:table-cell table:style-name="Tabella1.A1" office:value-type="string">
            <text:p text:style-name="P3">BO</text:p>
          </table:table-cell>
          <table:table-cell table:style-name="Tabella1.G1" office:value-type="string">
            <text:p text:style-name="P3">Iniz</text:p>
          </table:table-cell>
        </table:table-row>
        <table:table-row table:style-name="Tabella1.1">
          <table:table-cell table:style-name="Tabella1.A2" office:value-type="string">
            <text:p text:style-name="P3">Ucorno</text:p>
          </table:table-cell>
          <table:table-cell table:style-name="Tabella1.A2" office:value-type="string">
            <text:p text:style-name="P3">10°</text:p>
          </table:table-cell>
          <table:table-cell table:style-name="Tabella1.A2" office:value-type="string">
            <text:p text:style-name="P3">La@</text:p>
          </table:table-cell>
          <table:table-cell table:style-name="Tabella1.A2" office:value-type="string">
            <text:p text:style-name="P3">250</text:p>
          </table:table-cell>
          <table:table-cell table:style-name="Tabella1.A2" office:value-type="string">
            <text:p text:style-name="P3">11(40)</text:p>
          </table:table-cell>
          <table:table-cell table:style-name="Tabella1.A2" office:value-type="string">
            <text:p text:style-name="P3">80LBa(x3)/70LGr+80LCr</text:p>
          </table:table-cell>
          <table:table-cell table:style-name="Tabella1.G2" office:value-type="string">
            <text:p text:style-name="P3">+4</text:p>
          </table:table-cell>
        </table:table-row>
        <table:table-row table:style-name="Tabella1.1">
          <table:table-cell table:style-name="Tabella1.A2" office:value-type="string">
            <text:p text:style-name="P3">Gigante delle Nuvole</text:p>
          </table:table-cell>
          <table:table-cell table:style-name="Tabella1.A2" office:value-type="string">
            <text:p text:style-name="P3">12°</text:p>
          </table:table-cell>
          <table:table-cell table:style-name="Tabella1.A2" office:value-type="string">
            <text:p text:style-name="P3">SL</text:p>
          </table:table-cell>
          <table:table-cell table:style-name="Tabella1.A2" office:value-type="string">
            <text:p text:style-name="P3">400</text:p>
          </table:table-cell>
          <table:table-cell table:style-name="Tabella1.A2" office:value-type="string">
            <text:p text:style-name="P3">16(70s)</text:p>
          </table:table-cell>
          <table:table-cell table:style-name="Tabella1.A2" office:value-type="string">
            <text:p text:style-name="P3">140Sw(4D)/90ro/Spells</text:p>
          </table:table-cell>
          <table:table-cell table:style-name="Tabella1.G2" office:value-type="string">
            <text:p text:style-name="P3">+8</text:p>
          </table:table-cell>
        </table:table-row>
        <table:table-row table:style-name="Tabella1.1">
          <table:table-cell table:style-name="Tabella1.A2" office:value-type="string">
            <text:p text:style-name="P3">Guerriero Ur-Tanoth</text:p>
          </table:table-cell>
          <table:table-cell table:style-name="Tabella1.A2" office:value-type="string">
            <text:p text:style-name="P3">8°</text:p>
          </table:table-cell>
          <table:table-cell table:style-name="Tabella1.A2" office:value-type="string">
            <text:p text:style-name="P3">M</text:p>
          </table:table-cell>
          <table:table-cell table:style-name="Tabella1.A2" office:value-type="string">
            <text:p text:style-name="P3">160</text:p>
          </table:table-cell>
          <table:table-cell table:style-name="Tabella1.A2" office:value-type="string">
            <text:p text:style-name="P3">4(40)</text:p>
          </table:table-cell>
          <table:table-cell table:style-name="Tabella1.A2" office:value-type="string">
            <text:p text:style-name="P3">120Sp/100LBo</text:p>
          </table:table-cell>
          <table:table-cell table:style-name="Tabella1.G2" office:value-type="string">
            <text:p text:style-name="P3">+12</text:p>
          </table:table-cell>
        </table:table-row>
      </table:table>
      <text:p text:style-name="P2"><text:s/></text:p>
      <text:p text:style-name="P2">Gigante Nuvole, liste: Liquid Alteration, Essence Hand, Lofty Bridges, Wind Law</text:p>
      <text:p text:style-name="P2"/>
      <text:p text:style-name="P2">Dopo 3 round (o se le cose si mettono male): contro i PG interviene anche un gruppo di animisti Ur-Tanoth: ogni round castano da 1 a 3 True Hold contro il loro gruppo (ogni pg deve fare un TR contro il Flusso o essere ridotto al 25% delle azioni).</text:p>
      <text:p text:style-name="P2">Lo scontro finisce se i PG si arrendono.</text:p>
      <text:p text:style-name="P2">Sopravvivere allo scontro è un <text:span text:style-name="T1">Extremely Hard Minor Goal</text:span>, uccidere o mandare KO almeno un Gigante conta come un extra <text:span text:style-name="T1">Very Hard Minor Goal.</text:span></text:p>
      <text:p text:style-name="P2"/>
      <text:p text:style-name="P2">THONIS</text:p>
      <text:p text:style-name="P2">I PG vengono dunque scortati fino a Thonis, l'unica città esistente su Kyria: il gruppo che li scorta è guidato da un anziano Tanoth bianco, chiamato <text:span text:style-name="T3">Sanghar</text:span><text:span text:style-name="T4">.</text:span></text:p>
      <text:p text:style-name="P2">Qui i PG verranno a sapere che sono prigionieri di un gruppo governato dal drago Gildiss, una sorta di ordine segreto che si autodefinisce la “Legione Sognante” (anche semplicemente “la Legione”).</text:p>
      <text:p text:style-name="P2">Raggiungere Thonis è un <text:span text:style-name="T1">Medium Minor Goal.</text:span></text:p>
      <text:p text:style-name="P1"/>
      <text:p text:style-name="P2">A Thonis i PG possono imparare molte cose...</text:p>
      <text:list text:style-name="L1">
        <text:list-item>
          <text:p text:style-name="P4">L'Isola di Kyria è stata occultata parzialmente all'interno del Mondo dei Sogni molti secoli fa, per nasconderla alla vista dei Demoni Sovrani</text:p>
        </text:list-item>
        <text:list-item>
          <text:p text:style-name="P4">La Legione Sognante è un gruppo che si addestra da secoli per combattere nell'ultima battaglia contro i Demoni Sovrani: è stata fondata da Gildiss e comprende uomini, tanoth, giganti e altre creature.</text:p>
        </text:list-item>
        <text:list-item>
          <text:p text:style-name="P4">Gli abitanti dell'isola paiono ignorare gli effetti del tempo (nel mondo dei sogni il tempi passa in modo diverso), ciò potrebbe interessare a Samael: per lui scoprire informazioni più dettagliate conta come un <text:span text:style-name="T1">Medium Minor Goal.</text:span></text:p>
        </text:list-item>
        <text:list-item>
          <text:p text:style-name="P4">Valhetchka, un evocatrice, ex-demonologa, sottolineerà il ruolo della Legione nella lotta all'Essenza Corrotta: illustrerà i pericoli della corruzione e rivelerà che è possibile evocare entità non collegate con essa... ottenere conoscenze in questo campo per Drusilde è un <text:span text:style-name="T1">Hard Minor Goal</text:span></text:p>
        </text:list-item>
        <text:list-item>
          <text:p text:style-name="P4">Da diverse persone è possibile imparare che Gildiss è in grado di rimuovere l'ombra dell'Essenza Corrotta (<text:span text:style-name="T1">Medium Minor Goal</text:span>). Intraprendere questa via potrebbe contare come un altro Goal e anche come un cambio di vita...</text:p>
        </text:list-item>
        <text:list-item>
          <text:p text:style-name="P4">Da Gildiss vengono a conoscenza della location della Reliquia: una rovina xebechana abbandonata sulle montagne. </text:p>
        </text:list-item>
      </text:list>
      <text:p text:style-name="P2"/>
      <text:p text:style-name="P2">PNG DI THONIS</text:p>
      <text:p text:style-name="P1">Sanghar: <text:span text:style-name="T5">Saggio Animista Tanoth </text:span></text:p>
      <text:p text:style-name="P1">Lucius Valor: <text:span text:style-name="T5">Paladino di famiglia Letia, inizialmente sarà l'incaricato alla sorveglianza dei PG</text:span> </text:p>
      <text:p text:style-name="P1">Valhetchka: <text:span text:style-name="T5">Evocatrice Xattva</text:span></text:p>
      <text:p text:style-name="P1">Gildiss: <text:span text:style-name="T5">Drago dei Sogni seguace di Topramesk</text:span></text:p>
      <text:p text:style-name="P2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 table:style-name="Tabella3.1">
          <table:table-cell table:style-name="Tabella3.A1" office:value-type="string">
            <text:p text:style-name="P3">Nome</text:p>
          </table:table-cell>
          <table:table-cell table:style-name="Tabella3.A1" office:value-type="string">
            <text:p text:style-name="P3">Lvl</text:p>
          </table:table-cell>
          <table:table-cell table:style-name="Tabella3.A1" office:value-type="string">
            <text:p text:style-name="P3">Tag</text:p>
          </table:table-cell>
          <table:table-cell table:style-name="Tabella3.A1" office:value-type="string">
            <text:p text:style-name="P3">PF</text:p>
          </table:table-cell>
          <table:table-cell table:style-name="Tabella3.A1" office:value-type="string">
            <text:p text:style-name="P3">TA (BD)</text:p>
          </table:table-cell>
          <table:table-cell table:style-name="Tabella3.A1" office:value-type="string">
            <text:p text:style-name="P3">BO</text:p>
          </table:table-cell>
          <table:table-cell table:style-name="Tabella3.G1" office:value-type="string">
            <text:p text:style-name="P3">Iniz</text:p>
          </table:table-cell>
        </table:table-row>
        <table:table-row table:style-name="Tabella3.1">
          <table:table-cell table:style-name="Tabella3.A2" office:value-type="string">
            <text:p text:style-name="P3">Gildiss</text:p>
          </table:table-cell>
          <table:table-cell table:style-name="Tabella3.A2" office:value-type="string">
            <text:p text:style-name="P3">60°</text:p>
          </table:table-cell>
          <table:table-cell table:style-name="Tabella3.A2" office:value-type="string">
            <text:p text:style-name="P3">SL</text:p>
          </table:table-cell>
          <table:table-cell table:style-name="Tabella3.A2" office:value-type="string">
            <text:p text:style-name="P3">570</text:p>
          </table:table-cell>
          <table:table-cell table:style-name="Tabella3.A2" office:value-type="string">
            <text:p text:style-name="P3">20(60)</text:p>
          </table:table-cell>
          <table:table-cell table:style-name="Tabella3.A2" office:value-type="string">
            <text:p text:style-name="P3">170HBi/140HCl/150HBa/200SBr/Spells</text:p>
          </table:table-cell>
          <table:table-cell table:style-name="Tabella3.G2" office:value-type="string">
            <text:p text:style-name="P3">+8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MS Mincho" svg:font-family="'MS Mincho', 'ＭＳ 明朝'" style:font-family-generic="moder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it" fo:country="IT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it" fo:country="IT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2z0" style:family="text">
      <style:text-properties style:font-name="Times New Roman" style:font-name-asian="MS Mincho" style:font-name-complex="Times New Roman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space-before="1.244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8-01-26T18:02:51</meta:creation-date>
    <dc:creator>x</dc:creator>
    <dc:date>2008-02-13T18:04:05</dc:date>
    <dc:language>it-IT</dc:language>
    <meta:editing-cycles>31</meta:editing-cycles>
    <meta:editing-duration>PT3H33M5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80" meta:word-count="692" meta:character-count="4143"/>
  </office:meta>
</office:document-meta>
</file>